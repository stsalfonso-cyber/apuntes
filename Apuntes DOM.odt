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fo:font-weight="bold" style:font-weight-asian="bold" fo:font-size="12pt" style:font-size-asian="12pt"/>
    </style:style>
    <style:style style:name="T4" style:parent-style-name="Fuentedepárrafopredeter." style:family="text">
      <style:text-properties fo:font-weight="bold" style:font-weight-asian="bold" fo:font-size="12pt" style:font-size-asian="12pt"/>
    </style:style>
    <style:style style:name="P5" style:parent-style-name="Párrafodelista" style:list-style-name="LFO1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fo:font-weight="bold" style:font-weight-asian="bold" fo:font-size="12pt" style:font-size-asian="12pt"/>
    </style:style>
    <style:style style:name="P7" style:parent-style-name="Párrafodelista" style:list-style-name="LFO1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fo:font-weight="bold" style:font-weight-asian="bold"/>
    </style:style>
    <style:style style:name="P9" style:parent-style-name="Párrafodelista" style:list-style-name="LFO1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0" style:parent-style-name="Fuentedepárrafopredeter." style:family="text">
      <style:text-properties fo:font-weight="bold" style:font-weight-asian="bold" fo:font-size="12pt" style:font-size-asian="12pt"/>
    </style:style>
    <style:style style:name="P11" style:parent-style-name="Párrafodelista" style:list-style-name="LFO1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" style:parent-style-name="Párrafodelista" style:list-style-name="LFO1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3" style:parent-style-name="Párrafodelista" style:list-style-name="LFO1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4" style:parent-style-name="Párrafodelista" style:list-style-name="LFO1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5" style:parent-style-name="Párrafodelista" style:list-style-name="LFO1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6" style:parent-style-name="Párrafodelista" style:list-style-name="LFO3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7" style:parent-style-name="Párrafodelista" style:list-style-name="LFO2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Manipular el DOM desde Javascript</text:p>
      <text:list text:style-name="LFO1" text:continue-numbering="true">
        <text:list-item>
          <text:p text:style-name="P2">Acceder a elementos por su ID, su CLASS o su tipo de etiqueta:</text:p>
        </text:list-item>
      </text:list>
      <text:p text:style-name="Normal">const element = document.getElementBy<text:span text:style-name="T3">Id</text:span>(‘nameId’)</text:p>
      <text:p text:style-name="Normal">(devuelve un objeto)</text:p>
      <text:p text:style-name="Normal">const elements =<text:s/>document.getElementsBy<text:span text:style-name="T4">Class</text:span>Name(‘nameClass’)</text:p>
      <text:p text:style-name="Normal">(devuelve una colección de objetos, array)</text:p>
      <text:p text:style-name="Normal">const element = document.getElementByClassName(‘nameClass’)[0]</text:p>
      <text:list text:style-name="LFO1" text:continue-numbering="true">
        <text:list-item>
          <text:p text:style-name="P5">Accede al primer elemento que encuentra en la colección de objetos</text:p>
        </text:list-item>
      </text:list>
      <text:p text:style-name="Normal">const element = document.getElementsBy<text:span text:style-name="T6">Tag</text:span>Name(‘p’)</text:p>
      <text:p text:style-name="Normal">devuelve una colección de objetos</text:p>
      <text:list text:style-name="LFO1" text:continue-numbering="true">
        <text:list-item>
          <text:p text:style-name="P7">Acceder a un elemento según varios criterios de un selector CSS</text:p>
        </text:list-item>
      </text:list>
      <text:p text:style-name="Normal">const element = document.<text:span text:style-name="T8">querySelector</text:span>(‘#nameId’) o …(‘nameClass’)</text:p>
      <text:p text:style-name="Normal">O combinando varios selectores</text:p>
      <text:p text:style-name="Normal">const element = document.querySelector(‘.nameClass1.nameClass2’)</text:p>
      <text:p text:style-name="Normal">const element = document.querySelector(‘div p.nameClass2’)</text:p>
      <text:list text:style-name="LFO1" text:continue-numbering="true">
        <text:list-item>
          <text:p text:style-name="P9">Seleccionar elementos que no sean de una clase</text:p>
        </text:list-item>
      </text:list>
      <text:p text:style-name="Normal">const element = document.querySelector(‘div p:<text:span text:style-name="T10">not</text:span>(.nameClass2)’)</text:p>
      <text:p text:style-name="Normal">const element = document.querySelectorALL(‘)</text:p>
      <text:p text:style-name="Normal">devuelve una colección de objetos, con todos los elementos que cumplen ese criterio</text:p>
      <text:list text:style-name="LFO1" text:continue-numbering="true">
        <text:list-item>
          <text:p text:style-name="P11">Cambiar el estilo de las etiquetas desde javascript</text:p>
        </text:list-item>
      </text:list>
      <text:p text:style-name="Normal">element.style.backgroundColor = ‘blue’</text:p>
      <text:list text:style-name="LFO1" text:continue-numbering="true">
        <text:list-item>
          <text:p text:style-name="P12">Obtener y modificar el texto contenida en una etiqueta</text:p>
        </text:list-item>
      </text:list>
      <text:p text:style-name="Normal">element.innerText<text:tab/>(devuelve el texto)</text:p>
      <text:p text:style-name="Normal">element.textContent<text:tab/>(devuelve el texto pero con los espacios de tabulación del código html</text:p>
      <text:p text:style-name="Normal">element.innerHTML<text:tab/>(devuelve el texto HTML que contiene</text:p>
      <text:p text:style-name="Normal">element.innerText = “Nuevo texto”</text:p>
      <text:list text:style-name="LFO1" text:continue-numbering="true">
        <text:list-item>
          <text:p text:style-name="P13">Modificar los atributos de un elemento</text:p>
        </text:list-item>
      </text:list>
      <text:p text:style-name="Normal">HTML… &lt;a href=’http://esetese.com’&gt;Esetese&lt;/a&gt;</text:p>
      <text:p text:style-name="Normal">JS… const enlaces = getElementsByTagName(‘a’)</text:p>
      <text:p text:style-name="Normal">enlaces[0].getAttribute(‘href’)<text:tab/><text:tab/>(devuelve el valor del atributo)</text:p>
      <text:p text:style-name="Normal">enlaces[0].removeAttribute(‘href’)<text:tab/>(elimina ese atributo)</text:p>
      <text:soft-page-break/>
      <text:p text:style-name="Normal">enlaces[0].setAttribute(‘href’,’https://spagnolo.es’)) (actualiza el atributo)</text:p>
      <text:list text:style-name="LFO1" text:continue-numbering="true">
        <text:list-item>
          <text:p text:style-name="P14">Agregar o eliminar clases de un elemento</text:p>
        </text:list-item>
      </text:list>
      <text:p text:style-name="Normal">element.classList <text:s/>(devuelve un listado de todas las clases de este elemento)</text:p>
      <text:p text:style-name="Normal">element.classList.length <text:s text:c="3"/>(devuelve el numero de clases de ese elemento)</text:p>
      <text:p text:style-name="Normal">element.classList[0] <text:s text:c="4"/>devuelve el nombre de la primera clase que encuentra</text:p>
      <text:p text:style-name="Normal">element.classList.value <text:s text:c="2"/>devuelve el nombre de todas las clases</text:p>
      <text:p text:style-name="Normal">element.classList.add(‘miClase1’, ‘miClase2’) <text:s/><text:tab/>añade esa/s clase/s</text:p>
      <text:p text:style-name="Normal">element.classList.remove(‘miClase’)<text:tab/>elimina esa clase</text:p>
      <text:p text:style-name="Normal">element.classList.contains(‘miClase’) <text:s/>comprueba<text:s/>si tiene esa clase y devuelve true o false</text:p>
      <text:p text:style-name="Normal">element.classList.replace</text:p>
      <text:list text:style-name="LFO1" text:continue-numbering="true">
        <text:list-item>
          <text:p text:style-name="P15">Crear y eliminar elementos al DOM</text:p>
        </text:list-item>
      </text:list>
      <text:p text:style-name="Normal">const listado = document.getElementById(‘lista’) <text:s/>es donde se va a añadir</text:p>
      <text:p text:style-name="Normal">const newElemList = document.createElement(‘li’) es el nuevo elemento pero sin<text:s/>ubicar</text:p>
      <text:p text:style-name="Normal">newElemList.classList.add(‘nombClass1’) se le añade clases para que tenga estilo</text:p>
      <text:p text:style-name="Normal">newElemList.innerText = “texto” se le añade contenido</text:p>
      <text:p text:style-name="Normal">listado.append(newElemList)<text:tab/>agrega el elemento nuevo dentro de otro elemento</text:p>
      <text:p text:style-name="Normal">newElemList.remove()<text:tab/><text:tab/>elimina ese elemento</text:p>
      <text:list text:style-name="LFO3" text:continue-numbering="true">
        <text:list-item>
          <text:p text:style-name="P16">Recorrer el DOM</text:p>
        </text:list-item>
      </text:list>
      <text:p text:style-name="Normal">elemento.parentElement<text:tab/>se refiere al elemento padre que lo contiene</text:p>
      <text:p text:style-name="Normal">elemento.children<text:tab/>Se refiere a los elementos hijos. Es una colección</text:p>
      <text:p text:style-name="Normal">elemento.firstChild<text:tab/>se refiere al primer nodo hijo es mas aconsejable usar elem.children[0]</text:p>
      <text:p text:style-name="Normal">elemento.firstElementChild<text:tab/>esta si se refiere al primer elemento hijo</text:p>
      <text:p text:style-name="Normal">elemento.previousElementSibling<text:tab/>Se refiere al hermano anterior</text:p>
      <text:p text:style-name="Normal">elemento.nextElementSibling<text:tab/>Se refiere al siguiente</text:p>
      <text:list text:style-name="LFO2" text:continue-numbering="true">
        <text:list-item>
          <text:p text:style-name="P17">Eventos en el DOM</text:p>
        </text:list-item>
      </text:list>
      <text:p text:style-name="P18">Elemento Target (blanco/objetivo)</text:p>
      <text:p text:style-name="Normal">Es el elemento donde se desencadena el evento<text:s/>(botón)</text:p>
      <text:p text:style-name="P19">Trigger</text:p>
      <text:p text:style-name="Normal">Acción que hace desencadenar el evento (click)</text:p>
      <text:p text:style-name="P20">Event handler</text:p>
      <text:p text:style-name="Normal">Función que se ejecuta cuando se desencadene el evento</text:p>
      <text:p text:style-name="Normal"/>
      <text:p text:style-name="P21">Event<text:s/>listener</text:p>
      <text:p text:style-name="Normal">Es la asociación en JS entre el elemento y la acción que desencadenan el evento y la función</text:p>
      <text:p text:style-name="Normal">Añadir un eventListener en JS</text:p>
      <text:p text:style-name="Normal">Elemento.eventListener(‘click’,nombreFuncion);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fonso Santos</meta:initial-creator>
    <dc:creator>Alfonso Santos</dc:creator>
    <meta:creation-date>2024-09-06T17:48:00Z</meta:creation-date>
    <dc:date>2024-09-07T16:17:00Z</dc:date>
    <meta:template xlink:href="Normal" xlink:type="simple"/>
    <meta:editing-cycles>4</meta:editing-cycles>
    <meta:editing-duration>PT8940S</meta:editing-duration>
    <meta:document-statistic meta:page-count="3" meta:paragraph-count="7" meta:word-count="554" meta:character-count="3594" meta:row-count="25" meta:non-whitespace-character-count="3047"/>
  </office:meta>
</office:document-meta>
</file>