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Berlin Sans FB Demi" svg:font-family="Berlin Sans FB Demi" style:font-family-generic="swiss" style:font-pitch="variable" svg:panose-1="2 14 8 2 2 5 2 2 3 6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in" style:line-height-at-least="0.1979in" fo:background-color="#1F1F1F"/>
    </style:style>
    <style:style style:name="T3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4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5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6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7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8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9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10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11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12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13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14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15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16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17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18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19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20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21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22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P23" style:parent-style-name="Normal" style:family="paragraph">
      <style:paragraph-properties fo:margin-bottom="0in" style:line-height-at-least="0.1979in" fo:background-color="#1F1F1F"/>
    </style:style>
    <style:style style:name="T24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25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26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2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8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2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0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3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2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3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4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35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3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7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3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9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40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41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42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P43" style:parent-style-name="Normal" style:family="paragraph">
      <style:paragraph-properties fo:margin-bottom="0in" style:line-height-at-least="0.1979in" fo:background-color="#1F1F1F"/>
    </style:style>
    <style:style style:name="T44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45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46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47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48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49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50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51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52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53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54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55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P56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P57" style:parent-style-name="Normal" style:family="paragraph">
      <style:paragraph-properties fo:margin-bottom="0in" style:line-height-at-least="0.1979in" fo:background-color="#1F1F1F"/>
    </style:style>
    <style:style style:name="T58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59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60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61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62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63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64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P65" style:parent-style-name="Normal" style:family="paragraph">
      <style:paragraph-properties fo:margin-bottom="0in" style:line-height-at-least="0.1979in" fo:background-color="#1F1F1F"/>
    </style:style>
    <style:style style:name="T66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67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68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69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70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71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72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P73" style:parent-style-name="Normal" style:family="paragraph">
      <style:paragraph-properties fo:margin-bottom="0in" style:line-height-at-least="0.1979in" fo:background-color="#1F1F1F"/>
    </style:style>
    <style:style style:name="T74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75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76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77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78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79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80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81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P82" style:parent-style-name="Normal" style:family="paragraph">
      <style:paragraph-properties fo:margin-bottom="0in" style:line-height-at-least="0.1979in" fo:background-color="#1F1F1F"/>
    </style:style>
    <style:style style:name="T83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84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85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86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87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88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89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90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P91" style:parent-style-name="Normal" style:family="paragraph">
      <style:paragraph-properties fo:margin-bottom="0in" style:line-height-at-least="0.1979in" fo:background-color="#1F1F1F"/>
    </style:style>
    <style:style style:name="T92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93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94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95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96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97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98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99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100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101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102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103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P104" style:parent-style-name="Normal" style:family="paragraph">
      <style:paragraph-properties fo:margin-bottom="0in" style:line-height-at-least="0.1979in" fo:background-color="#1F1F1F"/>
    </style:style>
    <style:style style:name="T105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106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107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108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109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110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111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112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113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114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115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116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P117" style:parent-style-name="Normal" style:family="paragraph">
      <style:paragraph-properties fo:margin-bottom="0in" style:line-height-at-least="0.1979in" fo:background-color="#1F1F1F"/>
    </style:style>
    <style:style style:name="T118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119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120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121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P122" style:parent-style-name="Normal" style:family="paragraph">
      <style:paragraph-properties fo:margin-bottom="0in" style:line-height-at-least="0.1979in" fo:background-color="#1F1F1F"/>
    </style:style>
    <style:style style:name="T123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124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125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126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127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128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129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130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P131" style:parent-style-name="Normal" style:family="paragraph">
      <style:paragraph-properties fo:margin-bottom="0in" style:line-height-at-least="0.1979in" fo:background-color="#1F1F1F"/>
    </style:style>
    <style:style style:name="T132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133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134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135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136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137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138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139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140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141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142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143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P144" style:parent-style-name="Normal" style:family="paragraph">
      <style:paragraph-properties fo:margin-bottom="0in" style:line-height-at-least="0.1979in" fo:background-color="#1F1F1F"/>
    </style:style>
    <style:style style:name="T145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146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147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148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149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150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151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152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153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154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155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156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P157" style:parent-style-name="Normal" style:family="paragraph">
      <style:paragraph-properties fo:margin-bottom="0in" style:line-height-at-least="0.1979in" fo:background-color="#1F1F1F"/>
    </style:style>
    <style:style style:name="T158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159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160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161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162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163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164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165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166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167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168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169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P170" style:parent-style-name="Normal" style:family="paragraph">
      <style:paragraph-properties fo:margin-bottom="0in" style:line-height-at-least="0.1979in" fo:background-color="#1F1F1F"/>
    </style:style>
    <style:style style:name="T171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172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173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174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P175" style:parent-style-name="Normal" style:family="paragraph">
      <style:paragraph-properties fo:margin-bottom="0in" style:line-height-at-least="0.1979in" fo:background-color="#1F1F1F"/>
    </style:style>
    <style:style style:name="T176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177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178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179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P180" style:parent-style-name="Normal" style:family="paragraph">
      <style:text-properties style:font-name="Consolas" style:font-name-asian="Times New Roman" fo:font-size="10.5pt" style:font-size-asian="10.5pt" style:font-size-complex="10.5pt" style:language-asian="es" style:country-asian="ES"/>
    </style:style>
    <style:style style:name="P181" style:parent-style-name="Normal" style:family="paragraph">
      <style:text-properties style:font-name="Consolas" style:font-name-asian="Times New Roman" fo:font-size="10.5pt" style:font-size-asian="10.5pt" style:font-size-complex="10.5pt" style:language-asian="es" style:country-asian="ES"/>
    </style:style>
    <style:style style:name="P182" style:parent-style-name="Normal" style:family="paragraph">
      <style:text-properties style:font-name="Consolas" style:font-name-asian="Times New Roman" fo:font-size="10.5pt" style:font-size-asian="10.5pt" style:font-size-complex="10.5pt" style:language-asian="es" style:country-asian="ES"/>
    </style:style>
    <style:style style:name="P183" style:parent-style-name="Normal" style:family="paragraph">
      <style:text-properties style:font-name="Consolas" style:font-name-asian="Times New Roman" fo:font-size="10.5pt" style:font-size-asian="10.5pt" style:font-size-complex="10.5pt" style:language-asian="es" style:country-asian="ES"/>
    </style:style>
    <style:style style:name="P184" style:parent-style-name="Normal" style:family="paragraph">
      <style:text-properties style:font-name="Consolas" style:font-name-asian="Times New Roman" fo:font-size="10.5pt" style:font-size-asian="10.5pt" style:font-size-complex="10.5pt" style:language-asian="es" style:country-asian="ES"/>
    </style:style>
    <style:style style:name="P185" style:parent-style-name="Normal" style:family="paragraph">
      <style:text-properties style:font-name="Consolas" style:font-name-asian="Times New Roman" fo:font-size="10.5pt" style:font-size-asian="10.5pt" style:font-size-complex="10.5pt" style:language-asian="es" style:country-asian="ES"/>
    </style:style>
    <style:style style:name="T186" style:parent-style-name="Fuentedepárrafopredeter." style:family="text">
      <style:text-properties style:language-asian="es" style:country-asian="ES"/>
    </style:style>
    <style:style style:name="T187" style:parent-style-name="Fuentedepárrafopredeter." style:family="text">
      <style:text-properties style:language-asian="es" style:country-asian="ES"/>
    </style:style>
    <style:style style:name="P188" style:parent-style-name="Normal" style:family="paragraph">
      <style:text-properties style:font-name="Consolas" style:font-name-asian="Times New Roman" fo:font-size="10.5pt" style:font-size-asian="10.5pt" style:font-size-complex="10.5pt" style:language-asian="es" style:country-asian="ES"/>
    </style:style>
    <style:style style:name="P189" style:parent-style-name="Normal" style:family="paragraph">
      <style:paragraph-properties fo:margin-bottom="0in" style:line-height-at-least="0.1979in" fo:background-color="#1F1F1F"/>
    </style:style>
    <style:style style:name="T190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191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192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193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194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195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196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197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198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199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200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P201" style:parent-style-name="Normal" style:family="paragraph">
      <style:paragraph-properties fo:margin-left="0.4916in" fo:text-indent="0.4916in">
        <style:tab-stops/>
      </style:paragraph-properties>
    </style:style>
    <style:style style:name="P202" style:parent-style-name="Normal" style:family="paragraph">
      <style:paragraph-properties fo:margin-left="0.4916in" fo:text-indent="0.4916in">
        <style:tab-stops/>
      </style:paragraph-properties>
    </style:style>
    <style:style style:name="P203" style:parent-style-name="Normal" style:family="paragraph">
      <style:paragraph-properties fo:margin-left="0.4916in" fo:text-indent="0.4916in">
        <style:tab-stops/>
      </style:paragraph-properties>
    </style:style>
    <style:style style:name="P204" style:parent-style-name="Normal" style:family="paragraph">
      <style:text-properties style:font-name="Berlin Sans FB Demi" fo:font-size="16pt" style:font-size-asian="16pt"/>
    </style:style>
    <style:style style:name="P205" style:parent-style-name="Normal" style:family="paragraph">
      <style:paragraph-properties fo:margin-bottom="0in" style:line-height-at-least="0.1979in" fo:background-color="#1F1F1F"/>
    </style:style>
    <style:style style:name="T206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207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208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209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210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211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212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P213" style:parent-style-name="Norma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4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215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216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217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218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219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220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221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222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223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224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P225" style:parent-style-name="Norma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6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227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228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229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230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231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232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233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234" style:parent-style-name="Fuentedepárrafopredeter." style:family="text">
      <style:text-properties style:font-name="Consolas" style:font-name-asian="Times New Roman" fo:color="#CCCCCC" fo:font-size="10.5pt" style:font-size-asian="10.5pt" style:font-size-complex="10.5pt" style:language-asian="es" style:country-asian="ES"/>
    </style:style>
    <style:style style:name="T235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236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Apuntes Bootstrap</text:p>
      <text:p text:style-name="Normal">CDN para incorporar a &lt;head&gt; para trabajar los CSS JS de bootstrap</text:p>
      <text:p text:style-name="P2"><text:span text:style-name="T3"> <text:s/></text:span><text:span text:style-name="T4">&lt;</text:span><text:span text:style-name="T5">link</text:span><text:span text:style-name="T6"><text:s/></text:span><text:span text:style-name="T7">href</text:span><text:span text:style-name="T8">=</text:span><text:span text:style-name="T9">"https://cdn.jsdelivr.net/npm/bootstrap@5.3.3/dist/css/bootstrap.min.css"</text:span><text:span text:style-name="T10"><text:s/></text:span><text:span text:style-name="T11">rel</text:span><text:span text:style-name="T12">=</text:span><text:span text:style-name="T13">"stylesheet"</text:span><text:span text:style-name="T14"><text:s/></text:span><text:span text:style-name="T15">integrity</text:span><text:span text:style-name="T16">=</text:span><text:span text:style-name="T17">"sha384-QWTKZyjpPEjISv5WaRU9OFeRpok6YctnYmDr5pNlyT2bRjXh0JMhjY6hW+ALEwIH"</text:span><text:span text:style-name="T18"><text:s/></text:span><text:span text:style-name="T19">crossorigin</text:span><text:span text:style-name="T20">=</text:span><text:span text:style-name="T21">"anonymous"</text:span><text:span text:style-name="T22">&gt;</text:span></text:p>
      <text:p text:style-name="P23"><text:span text:style-name="T24"> <text:s/></text:span><text:span text:style-name="T25">&lt;</text:span><text:span text:style-name="T26">script</text:span><text:span text:style-name="T27"><text:s/></text:span><text:span text:style-name="T28">src</text:span><text:span text:style-name="T29">=</text:span><text:span text:style-name="T30">"https://cdn.jsdelivr.net/npm/bootstrap@5.3.3/dist/js/bootstrap.bundle.min.js"</text:span><text:span text:style-name="T31"><text:s/></text:span><text:span text:style-name="T32">integrity</text:span><text:span text:style-name="T33">=</text:span><text:span text:style-name="T34">"sha384-YvpcrYf0tY3lHB60NNkmXc5</text:span><text:span text:style-name="T35">s9fDVZLESaAA55NDzOxhy9GkcIdslK1eN7N6jIeHz"</text:span><text:span text:style-name="T36"><text:s/></text:span><text:span text:style-name="T37">crossorigin</text:span><text:span text:style-name="T38">=</text:span><text:span text:style-name="T39">"anonymous"</text:span><text:span text:style-name="T40">&gt;&lt;/</text:span><text:span text:style-name="T41">script</text:span><text:span text:style-name="T42">&gt;</text:span></text:p>
      <text:p text:style-name="Normal"/>
      <text:p text:style-name="Normal">CDN para usar iconos:</text:p>
      <text:p text:style-name="P43"><text:span text:style-name="T44"> <text:s/></text:span><text:span text:style-name="T45">&lt;</text:span><text:span text:style-name="T46">link</text:span><text:span text:style-name="T47"><text:s/></text:span><text:span text:style-name="T48">rel</text:span><text:span text:style-name="T49">=</text:span><text:span text:style-name="T50">"stylesheet"</text:span><text:span text:style-name="T51"><text:s/></text:span><text:span text:style-name="T52">href</text:span><text:span text:style-name="T53">=</text:span><text:span text:style-name="T54">"https://cdn.jsdelivr.net/npm/bootstrap-icons@1.11.3/font/bootstrap-icons.min.css"</text:span><text:span text:style-name="T55">&gt;</text:span></text:p>
      <text:p text:style-name="P56"> <text:s/></text:p>
      <text:p text:style-name="Normal"/>
      <text:p text:style-name="Normal">contenedores</text:p>
      <text:p text:style-name="P57"><text:span text:style-name="T58">&lt;</text:span><text:span text:style-name="T59">div</text:span><text:span text:style-name="T60"><text:s/></text:span><text:span text:style-name="T61">class</text:span><text:span text:style-name="T62">=</text:span><text:span text:style-name="T63">"container"</text:span><text:span text:style-name="T64">&gt;</text:span></text:p>
      <text:p text:style-name="Normal">Mantiene los márgenes horizontales y se adapta al tamaño de la pantalla</text:p>
      <text:p text:style-name="P65"><text:span text:style-name="T66">&lt;</text:span><text:span text:style-name="T67">div</text:span><text:span text:style-name="T68"><text:s/></text:span><text:span text:style-name="T69">class</text:span><text:span text:style-name="T70">=</text:span><text:span text:style-name="T71">"container-fluid"</text:span><text:span text:style-name="T72">&gt;</text:span></text:p>
      <text:p text:style-name="Normal">Ocupa el 100% del ancho de la pantalla y se adapta al tamaño</text:p>
      <text:p text:style-name="Normal">Contenido Grid</text:p>
      <text:p text:style-name="P73"><text:span text:style-name="T74"> <text:s/></text:span><text:span text:style-name="T75">&lt;</text:span><text:span text:style-name="T76">div</text:span><text:span text:style-name="T77"><text:s/></text:span><text:span text:style-name="T78">class</text:span><text:span text:style-name="T79">=</text:span><text:span text:style-name="T80">"container text-center"</text:span><text:span text:style-name="T81">&gt;</text:span></text:p>
      <text:p text:style-name="P82"><text:span text:style-name="T83">   <text:s/></text:span><text:span text:style-name="T84">&lt;</text:span><text:span text:style-name="T85">div</text:span><text:span text:style-name="T86"><text:s/></text:span><text:span text:style-name="T87">class</text:span><text:span text:style-name="T88">=</text:span><text:span text:style-name="T89">"row"</text:span><text:span text:style-name="T90">&gt;</text:span></text:p>
      <text:p text:style-name="P91"><text:span text:style-name="T92">     <text:s/></text:span><text:span text:style-name="T93">&lt;</text:span><text:span text:style-name="T94">div</text:span><text:span text:style-name="T95"><text:s/></text:span><text:span text:style-name="T96">class</text:span><text:span text:style-name="T97">=</text:span><text:span text:style-name="T98">"col-sm-4 col-lg-6 columna"</text:span><text:span text:style-name="T99">&gt;</text:span><text:span text:style-name="T100">col-sm-4</text:span><text:span text:style-name="T101">&lt;/</text:span><text:span text:style-name="T102">div</text:span><text:span text:style-name="T103">&gt;</text:span></text:p>
      <text:p text:style-name="P104"><text:span text:style-name="T105">     <text:s/></text:span><text:span text:style-name="T106">&lt;</text:span><text:span text:style-name="T107">div</text:span><text:span text:style-name="T108"><text:s/></text:span><text:span text:style-name="T109">class</text:span><text:span text:style-name="T110">=</text:span><text:span text:style-name="T111">"col-sm-8 col-lg-6 columna"</text:span><text:span text:style-name="T112">&gt;</text:span><text:span text:style-name="T113">col-sm-8</text:span><text:span text:style-name="T114">&lt;/</text:span><text:span text:style-name="T115">div</text:span><text:span text:style-name="T116">&gt;</text:span></text:p>
      <text:p text:style-name="P117"><text:span text:style-name="T118">   <text:s/></text:span><text:span text:style-name="T119">&lt;/</text:span><text:span text:style-name="T120">div</text:span><text:span text:style-name="T121">&gt;</text:span></text:p>
      <text:p text:style-name="P122"><text:span text:style-name="T123">   <text:s/></text:span><text:span text:style-name="T124">&lt;</text:span><text:span text:style-name="T125">div</text:span><text:span text:style-name="T126"><text:s/></text:span><text:span text:style-name="T127">class</text:span><text:span text:style-name="T128">=</text:span><text:span text:style-name="T129">"row"</text:span><text:span text:style-name="T130">&gt;</text:span></text:p>
      <text:p text:style-name="P131"><text:span text:style-name="T132">     <text:s/></text:span><text:span text:style-name="T133">&lt;</text:span><text:span text:style-name="T134">div</text:span><text:span text:style-name="T135"><text:s/></text:span><text:span text:style-name="T136">class</text:span><text:span text:style-name="T137">=</text:span><text:span text:style-name="T138">"col-2 columna"</text:span><text:span text:style-name="T139">&gt;</text:span><text:span text:style-name="T140">col1</text:span><text:span text:style-name="T141">&lt;/</text:span><text:span text:style-name="T142">div</text:span><text:span text:style-name="T143">&gt;</text:span></text:p>
      <text:p text:style-name="P144"><text:span text:style-name="T145">     <text:s/></text:span><text:span text:style-name="T146">&lt;</text:span><text:span text:style-name="T147">div</text:span><text:span text:style-name="T148"><text:s/></text:span><text:span text:style-name="T149">class</text:span><text:span text:style-name="T150">=</text:span><text:span text:style-name="T151">"col-2 columna"</text:span><text:span text:style-name="T152">&gt;</text:span><text:span text:style-name="T153">col2</text:span><text:span text:style-name="T154">&lt;/</text:span><text:span text:style-name="T155">div</text:span><text:span text:style-name="T156">&gt;</text:span></text:p>
      <text:p text:style-name="P157"><text:span text:style-name="T158">     <text:s/></text:span><text:span text:style-name="T159">&lt;</text:span><text:span text:style-name="T160">div</text:span><text:span text:style-name="T161"><text:s/></text:span><text:span text:style-name="T162">class</text:span><text:span text:style-name="T163">=</text:span><text:span text:style-name="T164">"col-8 columna"</text:span><text:span text:style-name="T165">&gt;</text:span><text:span text:style-name="T166">col3</text:span><text:span text:style-name="T167">&lt;/</text:span><text:span text:style-name="T168">div</text:span><text:span text:style-name="T169">&gt;</text:span></text:p>
      <text:p text:style-name="P170"><text:span text:style-name="T171">   <text:s/></text:span><text:span text:style-name="T172">&lt;/</text:span><text:span text:style-name="T173">div</text:span><text:span text:style-name="T174">&gt;</text:span></text:p>
      <text:p text:style-name="P175"><text:span text:style-name="T176"> <text:s/></text:span><text:span text:style-name="T177">&lt;/</text:span><text:span text:style-name="T178">div</text:span><text:span text:style-name="T179">&gt;</text:span></text:p>
      <text:p text:style-name="P180"/>
      <text:p text:style-name="P181"/>
      <text:p text:style-name="P182"/>
      <text:p text:style-name="P183"/>
      <text:p text:style-name="P184"/>
      <text:p text:style-name="P185"/>
      <text:p text:style-name="Normal"><text:span text:style-name="T186"><draw:frame draw:style-name="a0" draw:name="Imagen 2" text:anchor-type="as-char" svg:x="0in" svg:y="0in" svg:width="5.46714in" svg:height="1.27511in" style:rel-width="scale" style:rel-height="scale"><draw:image xlink:href="media/image1.png" xlink:type="simple" xlink:show="embed" xlink:actuate="onLoad"/><svg:title/><svg:desc/></draw:frame></text:span></text:p>
      <text:p text:style-name="Normal">La suma de los números que acompaña a las clases en cada fila tiene que sumar 12. Las iniciales que se ponen después de ‘col-‘ corresponden<text:s/>al tamaño de la pantalla según el dispositivo, si no se ponen estas iniciales<text:s/>tendrá el mismo tamaño en todos los dispositivos</text:p>
      <text:p text:style-name="Normal">col-sm-4 col-lg-6: si el tamaño de la pantalla es sm ocupara 4 espacios y es lg ocupara 6</text:p>
      <text:p text:style-name="Normal"><text:span text:style-name="T187"><draw:frame draw:style-name="a1" draw:name="Imagen 1" text:anchor-type="as-char" svg:x="0in" svg:y="0in" svg:width="5.90556in" svg:height="0.73056in" style:rel-width="scale" style:rel-height="scale"><draw:image xlink:href="media/image2.png" xlink:type="simple" xlink:show="embed" xlink:actuate="onLoad"/><svg:title/><svg:desc/></draw:frame></text:span></text:p>
      <text:p text:style-name="P188">Contenedor flexbox</text:p>
      <text:p text:style-name="P189"><text:span text:style-name="T190">&lt;</text:span><text:span text:style-name="T191">div</text:span><text:span text:style-name="T192"><text:s/></text:span><text:span text:style-name="T193">class</text:span><text:span text:style-name="T194">=</text:span><text:span text:style-name="T195">"d-flex"</text:span><text:span text:style-name="T196">&gt;</text:span><text:span text:style-name="T197">Mi contenedor</text:span><text:span text:style-name="T198">&lt;/</text:span><text:span text:style-name="T199">div</text:span><text:span text:style-name="T200">&gt;</text:span></text:p>
      <text:p text:style-name="Normal"/>
      <text:p text:style-name="Normal">.flex-row<text:tab/>.justify-content.start<text:tab/><text:tab/>.align-items-start<text:tab/>.flex-nowrap</text:p>
      <text:p text:style-name="Normal">.flex-column<text:tab/>.justify-content.end<text:tab/><text:tab/>.align-items –end<text:tab/>.flex-wrap</text:p>
      <text:p text:style-name="Normal"><text:tab/><text:tab/>.justify-content.center<text:tab/><text:tab/>.align-items –center<text:tab/>.flex-wrap-reverse</text:p>
      <text:p text:style-name="P201">.justify-content.between<text:tab/>.align-items -baseline<text:tab/></text:p>
      <text:p text:style-name="P202">.justify-content.around<text:tab/><text:tab/>.align-items –stretch<text:tab/></text:p>
      <text:p text:style-name="P203">.justify-content.evenly<text:tab/><text:tab/></text:p>
      <text:p text:style-name="Normal"/>
      <text:p text:style-name="P204">ESTILOS PREDEFINIDOS</text:p>
      <text:p text:style-name="P205"><text:span text:style-name="T206">&lt;</text:span><text:span text:style-name="T207">div</text:span><text:span text:style-name="T208"><text:s/></text:span><text:span text:style-name="T209">class</text:span><text:span text:style-name="T210">=</text:span><text:span text:style-name="T211">"container text-center"</text:span><text:span text:style-name="T212">&gt;</text:span></text:p>
      <text:p text:style-name="Normal">Centra el texto</text:p>
      <text:p text:style-name="P213"><text:span text:style-name="T214">&lt;</text:span><text:span text:style-name="T215">img</text:span><text:span text:style-name="T216"><text:s/></text:span><text:span text:style-name="T217">class</text:span><text:span text:style-name="T218">=</text:span><text:span text:style-name="T219">"rounded-circle"</text:span><text:span text:style-name="T220"><text:s/></text:span><text:span text:style-name="T221">src</text:span><text:span text:style-name="T222">=</text:span><text:span text:style-name="T223">"images/goku.jpg"</text:span><text:span text:style-name="T224">&gt;</text:span></text:p>
      <text:p text:style-name="Normal">Redondea la imager</text:p>
      <text:p text:style-name="P225"><text:span text:style-name="T226">&lt;</text:span><text:span text:style-name="T227">img</text:span><text:span text:style-name="T228"><text:s/></text:span><text:span text:style-name="T229">class</text:span><text:span text:style-name="T230">=</text:span><text:span text:style-name="T231">"img-fluid"</text:span><text:span text:style-name="T232"><text:s/></text:span><text:span text:style-name="T233">src</text:span><text:span text:style-name="T234">=</text:span><text:span text:style-name="T235">"images/goku.jpg"</text:span><text:span text:style-name="T236">&gt;</text:span></text:p>
      <text:p text:style-name="Normal">La imagen se adapta al ancho de la pantalla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Berlin Sans FB Demi" svg:font-family="Berlin Sans FB Demi" style:font-family-generic="swiss" style:font-pitch="variable" svg:panose-1="2 14 8 2 2 5 2 2 3 6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fonso Santos</meta:initial-creator>
    <dc:creator>Alfonso Santos</dc:creator>
    <meta:creation-date>2024-11-01T19:09:00Z</meta:creation-date>
    <dc:date>2024-11-08T21:06:00Z</dc:date>
    <meta:template xlink:href="Normal" xlink:type="simple"/>
    <meta:editing-cycles>7</meta:editing-cycles>
    <meta:editing-duration>PT14700S</meta:editing-duration>
    <meta:document-statistic meta:page-count="1" meta:paragraph-count="4" meta:word-count="340" meta:character-count="2209" meta:row-count="15" meta:non-whitespace-character-count="1873"/>
  </office:meta>
</office:document-meta>
</file>