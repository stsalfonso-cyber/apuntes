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oper Black" svg:font-family="Cooper Black" style:font-family-generic="roman" style:font-pitch="variable" svg:panose-1="2 8 9 4 4 3 11 2 4 4"/>
    <style:font-face style:name="Lucida Console" svg:font-family="Lucida Console" style:font-family-generic="modern" style:font-pitch="fixed" svg:panose-1="2 11 6 9 4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oper Black"/>
    </style:style>
    <style:style style:name="T2" style:parent-style-name="Fuentedepárrafopredeter." style:family="text">
      <style:text-properties style:font-name="Lucida Console" fo:font-size="18pt" style:font-size-asian="18pt" style:font-size-complex="18pt" fo:background-color="#FFFF00"/>
    </style:style>
    <style:style style:name="T3" style:parent-style-name="Fuentedepárrafopredeter." style:family="text">
      <style:text-properties fo:background-color="#FFFF00"/>
    </style:style>
    <style:style style:name="T4" style:parent-style-name="Fuentedepárrafopredeter." style:family="text">
      <style:text-properties fo:color="#5B9BD5"/>
    </style:style>
    <style:style style:name="T5" style:parent-style-name="Fuentedepárrafopredeter." style:family="text">
      <style:text-properties fo:color="#ED7D31"/>
    </style:style>
    <style:style style:name="T6" style:parent-style-name="Fuentedepárrafopredeter." style:family="text">
      <style:text-properties fo:color="#5B9BD5"/>
    </style:style>
    <style:style style:name="T7" style:parent-style-name="Fuentedepárrafopredeter." style:family="text">
      <style:text-properties fo:color="#5B9BD5"/>
    </style:style>
    <style:style style:name="T8" style:parent-style-name="Fuentedepárrafopredeter." style:family="text">
      <style:text-properties fo:color="#5B9BD5"/>
    </style:style>
    <style:style style:name="T9" style:parent-style-name="Fuentedepárrafopredeter." style:family="text">
      <style:text-properties fo:color="#ED7D31"/>
    </style:style>
    <style:style style:name="T10" style:parent-style-name="Fuentedepárrafopredeter." style:family="text">
      <style:text-properties fo:color="#5B9BD5"/>
    </style:style>
    <style:style style:name="T11" style:parent-style-name="Fuentedepárrafopredeter." style:family="text">
      <style:text-properties fo:color="#ED7D31"/>
    </style:style>
    <style:style style:name="T12" style:parent-style-name="Fuentedepárrafopredeter." style:family="text">
      <style:text-properties fo:color="#5B9BD5"/>
    </style:style>
    <style:style style:name="T13" style:parent-style-name="Fuentedepárrafopredeter." style:family="text">
      <style:text-properties fo:color="#5B9BD5"/>
    </style:style>
    <style:style style:name="T14" style:parent-style-name="Fuentedepárrafopredeter." style:family="text">
      <style:text-properties fo:color="#5B9BD5"/>
    </style:style>
    <style:style style:name="T15" style:parent-style-name="Fuentedepárrafopredeter." style:family="text">
      <style:text-properties fo:color="#ED7D31"/>
    </style:style>
    <style:style style:name="T16" style:parent-style-name="Fuentedepárrafopredeter." style:family="text">
      <style:text-properties fo:color="#5B9BD5"/>
    </style:style>
    <style:style style:name="T17" style:parent-style-name="Fuentedepárrafopredeter." style:family="text">
      <style:text-properties fo:color="#ED7D31"/>
    </style:style>
    <style:style style:name="T18" style:parent-style-name="Fuentedepárrafopredeter." style:family="text">
      <style:text-properties fo:color="#ED7D31"/>
    </style:style>
    <style:style style:name="T19" style:parent-style-name="Fuentedepárrafopredeter." style:family="text">
      <style:text-properties fo:language="en" fo:country="GB"/>
    </style:style>
    <style:style style:name="T20" style:parent-style-name="Fuentedepárrafopredeter." style:family="text">
      <style:text-properties fo:color="#5B9BD5" fo:language="en" fo:country="GB"/>
    </style:style>
    <style:style style:name="T21" style:parent-style-name="Fuentedepárrafopredeter." style:family="text">
      <style:text-properties fo:language="en" fo:country="GB"/>
    </style:style>
    <style:style style:name="T22" style:parent-style-name="Fuentedepárrafopredeter." style:family="text">
      <style:text-properties fo:color="#5B9BD5" fo:language="en" fo:country="GB"/>
    </style:style>
    <style:style style:name="T23" style:parent-style-name="Fuentedepárrafopredeter." style:family="text">
      <style:text-properties fo:language="en" fo:country="GB"/>
    </style:style>
    <style:style style:name="T24" style:parent-style-name="Fuentedepárrafopredeter." style:family="text">
      <style:text-properties fo:color="#ED7D31" fo:language="en" fo:country="GB"/>
    </style:style>
    <style:style style:name="T25" style:parent-style-name="Fuentedepárrafopredeter." style:family="text">
      <style:text-properties fo:language="en" fo:country="GB"/>
    </style:style>
    <style:style style:name="T26" style:parent-style-name="Fuentedepárrafopredeter." style:family="text">
      <style:text-properties fo:color="#5B9BD5" fo:language="en" fo:country="GB"/>
    </style:style>
    <style:style style:name="T27" style:parent-style-name="Fuentedepárrafopredeter." style:family="text">
      <style:text-properties fo:language="en" fo:country="GB"/>
    </style:style>
    <style:style style:name="T28" style:parent-style-name="Fuentedepárrafopredeter." style:family="text">
      <style:text-properties fo:color="#ED7D31" fo:language="en" fo:country="GB"/>
    </style:style>
    <style:style style:name="T29" style:parent-style-name="Fuentedepárrafopredeter." style:family="text">
      <style:text-properties fo:language="en" fo:country="GB"/>
    </style:style>
    <style:style style:name="T30" style:parent-style-name="Fuentedepárrafopredeter." style:family="text">
      <style:text-properties fo:color="#5B9BD5"/>
    </style:style>
    <style:style style:name="T31" style:parent-style-name="Fuentedepárrafopredeter." style:family="text">
      <style:text-properties fo:color="#5B9BD5"/>
    </style:style>
    <style:style style:name="T32" style:parent-style-name="Fuentedepárrafopredeter." style:family="text">
      <style:text-properties fo:color="#ED7D31"/>
    </style:style>
    <style:style style:name="T33" style:parent-style-name="Fuentedepárrafopredeter." style:family="text">
      <style:text-properties fo:color="#5B9BD5"/>
    </style:style>
    <style:style style:name="T34" style:parent-style-name="Fuentedepárrafopredeter." style:family="text">
      <style:text-properties fo:color="#ED7D31"/>
    </style:style>
    <style:style style:name="T35" style:parent-style-name="Fuentedepárrafopredeter." style:family="text">
      <style:text-properties fo:color="#ED7D31"/>
    </style:style>
    <style:style style:name="T36" style:parent-style-name="Fuentedepárrafopredeter." style:family="text">
      <style:text-properties fo:color="#5B9BD5"/>
    </style:style>
    <style:style style:name="T37" style:parent-style-name="Fuentedepárrafopredeter." style:family="text">
      <style:text-properties fo:color="#5B9BD5"/>
    </style:style>
    <style:style style:name="T38" style:parent-style-name="Fuentedepárrafopredeter." style:family="text">
      <style:text-properties fo:color="#ED7D31"/>
    </style:style>
    <style:style style:name="T39" style:parent-style-name="Fuentedepárrafopredeter." style:family="text">
      <style:text-properties fo:color="#5B9BD5"/>
    </style:style>
    <style:style style:name="T40" style:parent-style-name="Fuentedepárrafopredeter." style:family="text">
      <style:text-properties fo:color="#ED7D31"/>
    </style:style>
    <style:style style:name="T41" style:parent-style-name="Fuentedepárrafopredeter." style:family="text">
      <style:text-properties fo:color="#ED7D31"/>
    </style:style>
    <style:style style:name="T42" style:parent-style-name="Fuentedepárrafopredeter." style:family="text">
      <style:text-properties fo:color="#5B9BD5"/>
    </style:style>
    <style:style style:name="T43" style:parent-style-name="Fuentedepárrafopredeter." style:family="text">
      <style:text-properties fo:color="#5B9BD5"/>
    </style:style>
    <style:style style:name="T44" style:parent-style-name="Fuentedepárrafopredeter." style:family="text">
      <style:text-properties fo:color="#ED7D31"/>
    </style:style>
    <style:style style:name="T45" style:parent-style-name="Fuentedepárrafopredeter." style:family="text">
      <style:text-properties fo:color="#5B9BD5"/>
    </style:style>
    <style:style style:name="T46" style:parent-style-name="Fuentedepárrafopredeter." style:family="text">
      <style:text-properties fo:color="#ED7D31"/>
    </style:style>
    <style:style style:name="T47" style:parent-style-name="Fuentedepárrafopredeter." style:family="text">
      <style:text-properties style:font-name="Lucida Console" fo:font-size="18pt" style:font-size-asian="18pt" style:font-size-complex="18pt" fo:background-color="#FFFF00"/>
    </style:style>
    <style:style style:name="T48" style:parent-style-name="Fuentedepárrafopredeter." style:family="text">
      <style:text-properties style:language-asian="es" style:country-asian="ES"/>
    </style:style>
    <style:style style:name="P49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puntes HTML</text:p>
      <text:p text:style-name="Normal"><text:span text:style-name="T2">HEAD</text:span></text:p>
      <text:p text:style-name="Normal">Titulo: &lt;title&gt;Primera pagina web&lt;/title&gt;</text:p>
      <text:p text:style-name="Normal">Etiquetas<text:s/><text:span text:style-name="T3">meta datos</text:span><text:s/>importantes</text:p>
      <text:p text:style-name="Normal">&lt;<text:span text:style-name="T4">meta charset</text:span>="<text:span text:style-name="T5">UTF-8</text:span>"&gt;<text:tab/>distribución de las teclas del teclado</text:p>
      <text:p text:style-name="Normal">&lt;<text:span text:style-name="T6">meta</text:span><text:s/><text:span text:style-name="T7">http</text:span>-<text:span text:style-name="T8">equiv</text:span>="<text:span text:style-name="T9">X-UA_Compatible</text:span>"<text:s/><text:span text:style-name="T10">content</text:span>="<text:span text:style-name="T11">IE=edge</text:span>"&gt;<text:tab/>navegadores<text:s/>compatibles</text:p>
      <text:p text:style-name="Normal">&lt;<text:span text:style-name="T12">meta</text:span><text:s/><text:span text:style-name="T13">http</text:span>-<text:span text:style-name="T14">equiv</text:span>=”<text:span text:style-name="T15">reflesh</text:span>”<text:s/><text:span text:style-name="T16">content</text:span>=”<text:span text:style-name="T17">5;<text:s/></text:span><text:a xlink:href="http://ww.instagram" office:target-frame-name="_top" xlink:show="replace"><text:span text:style-name="Hipervínculo">http://ww.instagram</text:span></text:a><text:span text:style-name="T18">...</text:span>”&gt; <text:s/>refresca y redirecciona</text:p>
      <text:p text:style-name="Normal"><text:span text:style-name="T19">&lt;</text:span><text:span text:style-name="T20">meta</text:span><text:span text:style-name="T21"><text:s/></text:span><text:span text:style-name="T22">name</text:span><text:span text:style-name="T23">="</text:span><text:span text:style-name="T24">viewport</text:span><text:span text:style-name="T25">"<text:s/></text:span><text:span text:style-name="T26">content</text:span><text:span text:style-name="T27">="</text:span><text:span text:style-name="T28">width=device-width, initial-scale=1.0</text:span><text:span text:style-name="T29">"&gt;</text:span></text:p>
      <text:p text:style-name="Normal">&lt;<text:span text:style-name="T30">meta</text:span><text:s/><text:span text:style-name="T31">name</text:span>=”<text:span text:style-name="T32">author</text:span>”<text:s/><text:span text:style-name="T33">contetn</text:span>=”<text:span text:style-name="T34">autor de la</text:span><text:s/><text:span text:style-name="T35">web</text:span>”&gt;<text:tab/>posicionamiento</text:p>
      <text:p text:style-name="Normal">&lt;<text:span text:style-name="T36">meta</text:span><text:s/><text:span text:style-name="T37">name</text:span>=”<text:span text:style-name="T38">description</text:span>”<text:s/><text:span text:style-name="T39">contetn</text:span>=”<text:span text:style-name="T40">descripción</text:span><text:s/><text:span text:style-name="T41">de la web</text:span>”&gt;<text:tab/>posicionamiento</text:p>
      <text:p text:style-name="Normal">&lt;<text:span text:style-name="T42">meta</text:span><text:s/><text:span text:style-name="T43">name</text:span>=”<text:span text:style-name="T44">keywords</text:span>”<text:s/><text:span text:style-name="T45">contetn</text:span>=”<text:span text:style-name="T46">camisas, moda, clásicas, básicos, casual</text:span>”&gt; posicionamiento</text:p>
      <text:p text:style-name="Normal"><text:span text:style-name="T47">BODY</text:span></text:p>
      <text:p text:style-name="Normal"><text:span text:style-name="T48"><draw:frame draw:style-name="a0" draw:name="Imagen 1" text:anchor-type="as-char" svg:x="0in" svg:y="0in" svg:width="2.40021in" svg:height="3.1086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><text:a xlink:href="https://youtu.be/bNV6iw13Rnk?t=6942" office:target-frame-name="_top" xlink:show="replace"><text:span text:style-name="Hipervínculo">https://youtu.be/bNV6iw13Rnk?t=6942</text:span></text:a></text:p>
      <text:p text:style-name="Normal"/>
      <text:p text:style-name="Normal"/>
      <text:p text:style-name="P49">Efecto<text:s/>CSS<text:s/>(scroll lento)</text:p>
      <text:p text:style-name="Normal">Para que toda tu página tenga ese comportamiento fluido al hacer clic en los links, solo necesitas añadir esta propiedad en tu archivo CSS principal (o en un bloque &amp;lt;style&gt;):</text:p>
      <text:p text:style-name="Normal">html {</text:p>
      <text:p text:style-name="Normal"><text:s text:c="2"/>scroll-behavior: smooth;</text:p>
      <text:soft-page-break/>
      <text:p text:style-name="Normal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oper Black" svg:font-family="Cooper Black" style:font-family-generic="roman" style:font-pitch="variable" svg:panose-1="2 8 9 4 4 3 11 2 4 4"/>
    <style:font-face style:name="Lucida Console" svg:font-family="Lucida Console" style:font-family-generic="modern" style:font-pitch="fixed" svg:panose-1="2 11 6 9 4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3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fonso Santos</meta:initial-creator>
    <dc:creator>Alfonso Santos</dc:creator>
    <meta:creation-date>2024-08-09T19:52:00Z</meta:creation-date>
    <dc:date>2026-05-18T15:47:00Z</dc:date>
    <meta:template xlink:href="Normal" xlink:type="simple"/>
    <meta:editing-cycles>7</meta:editing-cycles>
    <meta:editing-duration>PT32520S</meta:editing-duration>
    <meta:document-statistic meta:page-count="2" meta:paragraph-count="1" meta:word-count="153" meta:character-count="994" meta:row-count="7" meta:non-whitespace-character-count="842"/>
  </office:meta>
</office:document-meta>
</file>