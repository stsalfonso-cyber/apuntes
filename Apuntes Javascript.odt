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w Cen MT" svg:font-family="Tw Cen MT" style:font-family-generic="swiss" style:font-pitch="variable" svg:panose-1="2 11 6 2 2 1 4 2 6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Encabezado" style:master-page-name="MP0" style:family="paragraph">
      <style:paragraph-properties fo:break-before="page"/>
      <style:text-properties fo:font-weight="bold" style:font-weight-asian="bold" fo:text-shadow="0.0416in 0in 0.0555in #000000" fo:color="#000000" fo:font-size="20pt" style:font-size-asian="20pt" style:font-size-complex="20pt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paragraph-properties style:vertical-align="auto" fo:margin-bottom="0in" style:line-height-at-least="0.1979in" fo:background-color="#1F1F1F">
        <style:background-fill draw:fill="solid" draw:fill-color="#1F1F1F"/>
      </style:paragraph-properties>
    </style:style>
    <style:style style:name="T4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T5" style:parent-style-name="Fuentedepárrafopredeter." style:family="text">
      <style:text-properties style:font-name="Consolas" fo:color="#569CD6" fo:font-size="8pt" style:font-size-asian="8pt" style:font-size-complex="8pt" fo:language="en" fo:country="GB" style:language-asian="es" style:country-asian="ES"/>
    </style:style>
    <style:style style:name="T6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T7" style:parent-style-name="Fuentedepárrafopredeter." style:family="text">
      <style:text-properties style:font-name="Consolas" fo:color="#9CDCFE" fo:font-size="8pt" style:font-size-asian="8pt" style:font-size-complex="8pt" fo:language="en" fo:country="GB" style:language-asian="es" style:country-asian="ES"/>
    </style:style>
    <style:style style:name="T8" style:parent-style-name="Fuentedepárrafopredeter." style:family="text">
      <style:text-properties style:font-name="Consolas" fo:color="#D4D4D4" fo:font-size="8pt" style:font-size-asian="8pt" style:font-size-complex="8pt" fo:language="en" fo:country="GB" style:language-asian="es" style:country-asian="ES"/>
    </style:style>
    <style:style style:name="T9" style:parent-style-name="Fuentedepárrafopredeter." style:family="text">
      <style:text-properties style:font-name="Consolas" fo:color="#DCDCAA" fo:font-size="8pt" style:font-size-asian="8pt" style:font-size-complex="8pt" fo:language="en" fo:country="GB" style:language-asian="es" style:country-asian="ES"/>
    </style:style>
    <style:style style:name="T10" style:parent-style-name="Fuentedepárrafopredeter." style:family="text">
      <style:text-properties style:font-name="Consolas" fo:color="#D4D4D4" fo:font-size="8pt" style:font-size-asian="8pt" style:font-size-complex="8pt" fo:language="en" fo:country="GB" style:language-asian="es" style:country-asian="ES"/>
    </style:style>
    <style:style style:name="T11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T12" style:parent-style-name="Fuentedepárrafopredeter." style:family="text">
      <style:text-properties style:font-name="Consolas" fo:color="#569CD6" fo:font-size="8pt" style:font-size-asian="8pt" style:font-size-complex="8pt" fo:language="en" fo:country="GB" style:language-asian="es" style:country-asian="ES"/>
    </style:style>
    <style:style style:name="T13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paragraph-properties style:vertical-align="auto" fo:margin-bottom="0in" style:line-height-at-least="0.1979in" fo:background-color="#1F1F1F">
        <style:background-fill draw:fill="solid" draw:fill-color="#1F1F1F"/>
      </style:paragraph-properties>
    </style:style>
    <style:style style:name="T16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T17" style:parent-style-name="Fuentedepárrafopredeter." style:family="text">
      <style:text-properties style:font-name="Consolas" fo:color="#569CD6" fo:font-size="8pt" style:font-size-asian="8pt" style:font-size-complex="8pt" fo:language="en" fo:country="GB" style:language-asian="es" style:country-asian="ES"/>
    </style:style>
    <style:style style:name="T18" style:parent-style-name="Fuentedepárrafopredeter." style:family="text">
      <style:text-properties style:font-name="Consolas" fo:color="#D4D4D4" fo:font-size="8pt" style:font-size-asian="8pt" style:font-size-complex="8pt" fo:language="en" fo:country="GB" style:language-asian="es" style:country-asian="ES"/>
    </style:style>
    <style:style style:name="T19" style:parent-style-name="Fuentedepárrafopredeter." style:family="text">
      <style:text-properties style:font-name="Consolas" fo:color="#9CDCFE" fo:font-size="8pt" style:font-size-asian="8pt" style:font-size-complex="8pt" fo:language="en" fo:country="GB" style:language-asian="es" style:country-asian="ES"/>
    </style:style>
    <style:style style:name="T20" style:parent-style-name="Fuentedepárrafopredeter." style:family="text">
      <style:text-properties style:font-name="Consolas" fo:color="#D4D4D4" fo:font-size="8pt" style:font-size-asian="8pt" style:font-size-complex="8pt" fo:language="en" fo:country="GB" style:language-asian="es" style:country-asian="ES"/>
    </style:style>
    <style:style style:name="T21" style:parent-style-name="Fuentedepárrafopredeter." style:family="text">
      <style:text-properties style:font-name="Consolas" fo:color="#CE9178" fo:font-size="8pt" style:font-size-asian="8pt" style:font-size-complex="8pt" fo:language="en" fo:country="GB" style:language-asian="es" style:country-asian="ES"/>
    </style:style>
    <style:style style:name="T22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T23" style:parent-style-name="Fuentedepárrafopredeter." style:family="text">
      <style:text-properties style:font-name="Consolas" fo:color="#569CD6" fo:font-size="8pt" style:font-size-asian="8pt" style:font-size-complex="8pt" fo:language="en" fo:country="GB" style:language-asian="es" style:country-asian="ES"/>
    </style:style>
    <style:style style:name="T24" style:parent-style-name="Fuentedepárrafopredeter." style:family="text">
      <style:text-properties style:font-name="Consolas" fo:color="#808080" fo:font-size="8pt" style:font-size-asian="8pt" style:font-size-complex="8pt" fo:language="en" fo:country="GB" style:language-asian="es" style:country-asian="ES"/>
    </style:style>
    <style:style style:name="P25" style:parent-style-name="Normal" style:family="paragraph">
      <style:text-properties fo:language="en" fo:country="GB"/>
    </style:style>
    <style:style style:name="T26" style:parent-style-name="Fuentedepárrafopredeter." style:family="text">
      <style:text-properties fo:font-weight="bold" style:font-weight-asian="bold" fo:font-size="14pt" style:font-size-asian="14pt" fo:background-color="#FFFF00" style:text-underline-type="single" style:text-underline-style="solid" style:text-underline-width="auto" style:text-underline-mode="continuous"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text-shadow="0in 0.0277in 0.0416in #6E747A" fo:color="#5B9BD5"/>
    </style:style>
    <style:style style:name="P33" style:parent-style-name="Normal" style:family="paragraph">
      <style:text-properties fo:text-shadow="0in 0.0277in 0.0416in #6E747A" fo:color="#5B9BD5"/>
    </style:style>
    <style:style style:name="T34" style:parent-style-name="Fuentedepárrafopredeter." style:family="text">
      <style:text-properties fo:text-shadow="0in 0.0277in 0.0416in #6E747A" fo:color="#5B9BD5"/>
    </style:style>
    <style:style style:name="T35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fo:text-shadow="0in 0.0277in 0.0416in #6E747A" fo:color="#5B9BD5"/>
    </style:style>
    <style:style style:name="T38" style:parent-style-name="Fuentedepárrafopredeter." style:family="text">
      <style:text-properties fo:color="#ED7D31"/>
    </style:style>
    <style:style style:name="P39" style:parent-style-name="Normal" style:family="paragraph">
      <style:text-properties fo:font-weight="bold" style:font-weight-asian="bold"/>
    </style:style>
    <style:style style:name="T40" style:parent-style-name="Fuentedepárrafopredeter." style:family="text">
      <style:text-properties fo:font-weight="bold" style:font-weight-asian="bold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Normal" style:family="paragraph">
      <style:text-properties fo:language="en" fo:country="GB"/>
    </style:style>
    <style:style style:name="T4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P48" style:parent-style-name="Normal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style:font-name="Arial" style:font-name-complex="Arial" fo:language="en" fo:country="US"/>
    </style:style>
    <style:style style:name="T52" style:parent-style-name="Fuentedepárrafopredeter." style:family="text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style:font-name="Arial" style:font-name-complex="Arial"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style:font-name="Arial" style:font-name-complex="Arial"/>
    </style:style>
    <style:style style:name="T5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fo:language="en" fo:country="US"/>
    </style:style>
    <style:style style:name="T60" style:parent-style-name="Fuentedepárrafopredeter." style:family="text">
      <style:text-properties style:font-name="Arial" style:font-name-complex="Arial"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style:font-name="Arial" style:font-name-complex="Arial" fo:language="en" fo:country="US"/>
    </style:style>
    <style:style style:name="T66" style:parent-style-name="Fuentedepárrafopredeter." style:family="text">
      <style:text-properties fo:language="en" fo:country="US"/>
    </style:style>
    <style:style style:name="T67" style:parent-style-name="Fuentedepárrafopredeter." style:family="text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Fuentedepárrafopredeter." style:family="text">
      <style:text-properties style:font-name="Arial" style:font-name-complex="Arial"/>
    </style:style>
    <style:style style:name="T70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Arial" style:font-name-complex="Arial"/>
    </style:style>
    <style:style style:name="T72" style:parent-style-name="Fuentedepárrafopredeter." style:family="text">
      <style:text-properties style:font-name="Arial" style:font-name-complex="Arial"/>
    </style:style>
    <style:style style:name="T7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76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77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78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T79" style:parent-style-name="Fuentedepárrafopredeter." style:family="text">
      <style:text-properties fo:background-color="#FFFF00" style:text-underline-type="single" style:text-underline-style="solid" style:text-underline-width="auto" style:text-underline-mode="continuous" fo:language="en" fo:country="GB"/>
    </style:style>
    <style:style style:name="T80" style:parent-style-name="Fuentedepárrafopredeter." style:family="text">
      <style:text-properties fo:language="en" fo:country="GB"/>
    </style:style>
    <style:style style:name="P81" style:parent-style-name="Normal" style:family="paragraph">
      <style:paragraph-properties fo:margin-bottom="0.0555in" fo:line-height="100%"/>
      <style:text-properties fo:text-shadow="0in 0.0277in 0.0416in #6E747A" fo:color="#5B9BD5" fo:language="en" fo:country="GB"/>
    </style:style>
    <style:style style:name="P82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83" style:parent-style-name="Normal" style:family="paragraph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84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85" style:parent-style-name="Normal" style:family="paragraph">
      <style:paragraph-properties fo:margin-bottom="0.0555in" fo:line-height="100%"/>
      <style:text-properties fo:text-shadow="0in 0.0277in 0.0416in #6E747A" fo:color="#5B9BD5" fo:language="en" fo:country="GB"/>
    </style:style>
    <style:style style:name="P86" style:parent-style-name="Normal" style:family="paragraph">
      <style:paragraph-properties fo:margin-bottom="0.0555in" fo:line-height="100%"/>
      <style:text-properties fo:text-shadow="0in 0.0277in 0.0416in #6E747A" fo:color="#5B9BD5" fo:language="en" fo:country="GB"/>
    </style:style>
    <style:style style:name="P87" style:parent-style-name="Normal" style:family="paragraph">
      <style:paragraph-properties fo:margin-bottom="0.0555in" fo:line-height="100%"/>
    </style:style>
    <style:style style:name="T88" style:parent-style-name="Fuentedepárrafopredeter." style:family="text">
      <style:text-properties fo:text-shadow="0in 0.0277in 0.0416in #6E747A" fo:color="#5B9BD5" fo:language="en" fo:country="GB"/>
    </style:style>
    <style:style style:name="T89" style:parent-style-name="Fuentedepárrafopredeter." style:family="text">
      <style:text-properties fo:text-shadow="0in 0.0277in 0.0416in #6E747A" fo:color="#5B9BD5"/>
    </style:style>
    <style:style style:name="P9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9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92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fo:font-weight="bold" style:font-weight-asian="bold" fo:font-size="14pt" style:font-size-asian="14pt" style:font-size-complex="20pt" fo:background-color="#FFFF00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9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98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9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5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06" style:parent-style-name="Normal" style:family="paragraph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107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08" style:parent-style-name="Normal" style:family="paragraph">
      <style:paragraph-properties fo:margin-bottom="0.0555in" fo:line-height="100%"/>
    </style:style>
    <style:style style:name="T109" style:parent-style-name="Fuentedepárrafopredeter." style:family="text">
      <style:text-properties fo:text-shadow="0in 0.0277in 0.0416in #6E747A" fo:color="#5B9BD5" fo:language="en" fo:country="US"/>
    </style:style>
    <style:style style:name="T110" style:parent-style-name="Fuentedepárrafopredeter." style:family="text">
      <style:text-properties fo:text-shadow="0in 0.0277in 0.0416in #6E747A" fo:color="#5B9BD5"/>
    </style:style>
    <style:style style:name="P11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12" style:parent-style-name="Normal" style:family="paragraph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113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1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15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16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17" style:parent-style-name="Normal" style:family="paragraph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118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19" style:parent-style-name="Normal" style:family="paragraph">
      <style:paragraph-properties fo:margin-bottom="0.0555in" fo:line-height="100%"/>
    </style:style>
    <style:style style:name="T120" style:parent-style-name="Fuentedepárrafopredeter." style:family="text">
      <style:text-properties fo:text-shadow="0in 0.0277in 0.0416in #6E747A" fo:color="#5B9BD5" fo:language="en" fo:country="US"/>
    </style:style>
    <style:style style:name="T121" style:parent-style-name="Fuentedepárrafopredeter." style:family="text">
      <style:text-properties fo:text-shadow="0in 0.0277in 0.0416in #6E747A" fo:color="#5B9BD5"/>
    </style:style>
    <style:style style:name="P12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12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12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25" style:parent-style-name="Normal" style:family="paragraph">
      <style:paragraph-properties fo:margin-bottom="0.0555in" fo:line-height="100%"/>
    </style:style>
    <style:style style:name="T126" style:parent-style-name="Fuentedepárrafopredeter." style:family="text">
      <style:text-properties fo:text-shadow="0in 0.0277in 0.0416in #6E747A" fo:color="#5B9BD5"/>
    </style:style>
    <style:style style:name="T127" style:parent-style-name="Fuentedepárrafopredeter." style:family="text">
      <style:text-properties fo:text-shadow="0in 0.0277in 0.0416in #6E747A" fo:color="#5B9BD5"/>
    </style:style>
    <style:style style:name="P128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29" style:parent-style-name="Normal" style:family="paragraph">
      <style:paragraph-properties fo:margin-bottom="0.0555in" fo:line-height="100%"/>
    </style:style>
    <style:style style:name="T130" style:parent-style-name="Fuentedepárrafopredeter." style:family="text">
      <style:text-properties fo:text-shadow="0in 0.0277in 0.0416in #6E747A" fo:color="#5B9BD5"/>
    </style:style>
    <style:style style:name="T131" style:parent-style-name="Fuentedepárrafopredeter." style:family="text">
      <style:text-properties fo:text-shadow="0in 0.0277in 0.0416in #6E747A" fo:color="#5B9BD5"/>
    </style:style>
    <style:style style:name="P13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33" style:parent-style-name="Normal" style:family="paragraph">
      <style:paragraph-properties fo:margin-bottom="0.0555in" fo:line-height="100%"/>
    </style:style>
    <style:style style:name="T134" style:parent-style-name="Fuentedepárrafopredeter." style:family="text">
      <style:text-properties fo:text-shadow="0in 0.0277in 0.0416in #6E747A" fo:color="#5B9BD5"/>
    </style:style>
    <style:style style:name="T135" style:parent-style-name="Fuentedepárrafopredeter." style:family="text">
      <style:text-properties fo:text-shadow="0in 0.0277in 0.0416in #6E747A" fo:color="#5B9BD5"/>
    </style:style>
    <style:style style:name="P13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3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13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1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0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4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4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4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44" style:parent-style-name="Normal" style:family="paragraph">
      <style:paragraph-properties fo:margin-bottom="0.0555in" fo:line-height="100%"/>
    </style:style>
    <style:style style:name="T145" style:parent-style-name="Fuentedepárrafopredeter." style:family="text">
      <style:text-properties fo:text-shadow="0in 0.0277in 0.0416in #6E747A" fo:color="#5B9BD5"/>
    </style:style>
    <style:style style:name="T146" style:parent-style-name="Fuentedepárrafopredeter." style:family="text">
      <style:text-properties style:font-name-complex="Tw Cen MT" fo:text-shadow="0in 0.0277in 0.0416in #6E747A" fo:color="#5B9BD5"/>
    </style:style>
    <style:style style:name="T147" style:parent-style-name="Fuentedepárrafopredeter." style:family="text">
      <style:text-properties fo:text-shadow="0in 0.0277in 0.0416in #6E747A" fo:color="#5B9BD5" fo:language="en" fo:country="US"/>
    </style:style>
    <style:style style:name="P148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49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50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51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52" style:parent-style-name="Normal" style:family="paragraph">
      <style:paragraph-properties fo:margin-bottom="0.0555in" fo:line-height="100%"/>
    </style:style>
    <style:style style:name="T153" style:parent-style-name="Fuentedepárrafopredeter." style:family="text">
      <style:text-properties fo:text-shadow="0in 0.0277in 0.0416in #6E747A" fo:color="#5B9BD5" fo:language="en" fo:country="US"/>
    </style:style>
    <style:style style:name="T154" style:parent-style-name="Fuentedepárrafopredeter." style:family="text">
      <style:text-properties fo:text-shadow="0in 0.0277in 0.0416in #6E747A" fo:color="#5B9BD5"/>
    </style:style>
    <style:style style:name="P155" style:parent-style-name="Normal" style:family="paragraph">
      <style:paragraph-properties fo:margin-bottom="0.0555in" fo:line-height="100%"/>
    </style:style>
    <style:style style:name="T156" style:parent-style-name="Fuentedepárrafopredeter." style:family="text">
      <style:text-properties fo:text-shadow="0in 0.0277in 0.0416in #6E747A" fo:color="#5B9BD5"/>
    </style:style>
    <style:style style:name="T157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158" style:parent-style-name="Fuentedepárrafopredeter." style:family="text">
      <style:text-properties fo:text-shadow="0in 0.0277in 0.0416in #6E747A" fo:color="#5B9BD5"/>
    </style:style>
    <style:style style:name="P15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6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61" style:parent-style-name="Normal" style:family="paragraph">
      <style:paragraph-properties fo:margin-bottom="0.0555in" fo:line-height="100%"/>
    </style:style>
    <style:style style:name="T162" style:parent-style-name="Fuentedepárrafopredeter." style:family="text">
      <style:text-properties fo:text-shadow="0in 0.0277in 0.0416in #6E747A" fo:color="#5B9BD5"/>
    </style:style>
    <style:style style:name="T163" style:parent-style-name="Fuentedepárrafopredeter." style:family="text">
      <style:text-properties style:font-name-complex="Tw Cen MT" fo:text-shadow="0in 0.0277in 0.0416in #6E747A" fo:color="#5B9BD5"/>
    </style:style>
    <style:style style:name="T164" style:parent-style-name="Fuentedepárrafopredeter." style:family="text">
      <style:text-properties fo:text-shadow="0in 0.0277in 0.0416in #6E747A" fo:color="#5B9BD5"/>
    </style:style>
    <style:style style:name="P165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6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67" style:parent-style-name="Normal" style:family="paragraph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168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69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70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171" style:parent-style-name="Normal" style:family="paragraph">
      <style:paragraph-properties fo:margin-bottom="0.0555in" fo:line-height="100%"/>
    </style:style>
    <style:style style:name="T172" style:parent-style-name="Fuentedepárrafopredeter." style:family="text">
      <style:text-properties fo:text-shadow="0in 0.0277in 0.0416in #6E747A" fo:color="#5B9BD5" fo:language="en" fo:country="US"/>
    </style:style>
    <style:style style:name="T173" style:parent-style-name="Fuentedepárrafopredeter." style:family="text">
      <style:text-properties fo:text-shadow="0in 0.0277in 0.0416in #6E747A" fo:color="#5B9BD5"/>
    </style:style>
    <style:style style:name="P17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75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7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7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78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7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184" style:parent-style-name="Fuentedepárrafopredeter." style:family="text">
      <style:text-properties fo:font-weight="bold" style:font-weight-asian="bold" fo:font-size="14pt" style:font-size-asian="14pt" style:font-size-complex="20pt" fo:background-color="#FFFF00" style:text-underline-type="single" style:text-underline-style="solid" style:text-underline-width="auto" style:text-underline-mode="continuous"/>
    </style:style>
    <style:style style:name="T185" style:parent-style-name="Fuentedepárrafopredeter." style:family="text">
      <style:text-properties fo:background-color="#FFFF00"/>
    </style:style>
    <style:style style:name="P18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188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189" style:parent-style-name="Fuentedepárrafopredeter." style:family="text">
      <style:text-properties fo:text-shadow="0in 0.0277in 0.0416in #6E747A" fo:color="#5B9BD5"/>
    </style:style>
    <style:style style:name="P190" style:parent-style-name="Normal" style:family="paragraph">
      <style:paragraph-properties fo:margin-bottom="0.0555in" fo:line-height="100%"/>
    </style:style>
    <style:style style:name="T191" style:parent-style-name="Fuentedepárrafopredeter." style:family="text">
      <style:text-properties fo:text-shadow="0in 0.0277in 0.0416in #6E747A" fo:color="#5B9BD5"/>
    </style:style>
    <style:style style:name="T192" style:parent-style-name="Fuentedepárrafopredeter." style:family="text">
      <style:text-properties fo:text-shadow="0in 0.0277in 0.0416in #6E747A" fo:color="#5B9BD5"/>
    </style:style>
    <style:style style:name="P193" style:parent-style-name="Normal" style:family="paragraph">
      <style:paragraph-properties fo:margin-bottom="0.0555in" fo:line-height="100%"/>
    </style:style>
    <style:style style:name="T194" style:parent-style-name="Fuentedepárrafopredeter." style:family="text">
      <style:text-properties fo:text-shadow="0in 0.0277in 0.0416in #6E747A" fo:color="#5B9BD5"/>
    </style:style>
    <style:style style:name="T195" style:parent-style-name="Fuentedepárrafopredeter." style:family="text">
      <style:text-properties fo:text-shadow="0in 0.0277in 0.0416in #6E747A" fo:color="#5B9BD5"/>
    </style:style>
    <style:style style:name="P196" style:parent-style-name="Normal" style:family="paragraph">
      <style:paragraph-properties fo:margin-bottom="0.0555in" fo:line-height="100%"/>
    </style:style>
    <style:style style:name="T197" style:parent-style-name="Fuentedepárrafopredeter." style:family="text">
      <style:text-properties fo:text-shadow="0in 0.0277in 0.0416in #6E747A" fo:color="#5B9BD5"/>
    </style:style>
    <style:style style:name="T198" style:parent-style-name="Fuentedepárrafopredeter." style:family="text">
      <style:text-properties fo:text-shadow="0in 0.0277in 0.0416in #6E747A" fo:color="#5B9BD5"/>
    </style:style>
    <style:style style:name="T199" style:parent-style-name="Fuentedepárrafopredeter." style:family="text">
      <style:text-properties fo:text-shadow="0in 0.0277in 0.0416in #6E747A" fo:color="#5B9BD5"/>
    </style:style>
    <style:style style:name="T200" style:parent-style-name="Fuentedepárrafopredeter." style:family="text">
      <style:text-properties fo:text-shadow="0in 0.0277in 0.0416in #6E747A" fo:color="#5B9BD5"/>
    </style:style>
    <style:style style:name="P201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02" style:parent-style-name="Normal" style:family="paragraph">
      <style:paragraph-properties fo:margin-bottom="0.0555in" fo:line-height="100%"/>
    </style:style>
    <style:style style:name="P203" style:parent-style-name="Normal" style:family="paragraph">
      <style:paragraph-properties fo:margin-bottom="0.0555in" fo:line-height="100%"/>
    </style:style>
    <style:style style:name="P204" style:parent-style-name="Normal" style:family="paragraph">
      <style:paragraph-properties fo:margin-bottom="0.0555in" fo:line-height="100%"/>
    </style:style>
    <style:style style:name="T205" style:parent-style-name="Fuentedepárrafopredeter." style:family="text">
      <style:text-properties fo:text-shadow="0in 0.0277in 0.0416in #6E747A" fo:color="#5B9BD5" fo:language="en" fo:country="US"/>
    </style:style>
    <style:style style:name="T206" style:parent-style-name="Fuentedepárrafopredeter." style:family="text">
      <style:text-properties fo:text-shadow="0in 0.0277in 0.0416in #6E747A" fo:color="#5B9BD5" fo:background-color="#FFFF00" fo:language="en" fo:country="US"/>
    </style:style>
    <style:style style:name="T207" style:parent-style-name="Fuentedepárrafopredeter." style:family="text">
      <style:text-properties fo:text-shadow="0in 0.0277in 0.0416in #6E747A" fo:color="#5B9BD5" fo:language="en" fo:country="US"/>
    </style:style>
    <style:style style:name="T208" style:parent-style-name="Fuentedepárrafopredeter." style:family="text">
      <style:text-properties fo:text-shadow="0in 0.0277in 0.0416in #6E747A" fo:color="#5B9BD5" fo:background-color="#FFFF00" fo:language="en" fo:country="US"/>
    </style:style>
    <style:style style:name="T209" style:parent-style-name="Fuentedepárrafopredeter." style:family="text">
      <style:text-properties fo:text-shadow="0in 0.0277in 0.0416in #6E747A" fo:color="#5B9BD5" fo:language="en" fo:country="US"/>
    </style:style>
    <style:style style:name="P210" style:parent-style-name="Normal" style:family="paragraph">
      <style:paragraph-properties fo:margin-bottom="0.0555in" fo:line-height="100%"/>
    </style:style>
    <style:style style:name="T211" style:parent-style-name="Fuentedepárrafopredeter." style:family="text">
      <style:text-properties fo:text-shadow="0in 0.0277in 0.0416in #6E747A" fo:color="#5B9BD5" fo:language="en" fo:country="US"/>
    </style:style>
    <style:style style:name="T212" style:parent-style-name="Fuentedepárrafopredeter." style:family="text">
      <style:text-properties fo:text-shadow="0in 0.0277in 0.0416in #6E747A" fo:color="#5B9BD5"/>
    </style:style>
    <style:style style:name="P21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14" style:parent-style-name="Normal" style:family="paragraph">
      <style:paragraph-properties fo:margin-bottom="0.0555in" fo:line-height="100%"/>
    </style:style>
    <style:style style:name="T215" style:parent-style-name="Fuentedepárrafopredeter." style:family="text">
      <style:text-properties fo:text-shadow="0in 0.0277in 0.0416in #6E747A" fo:color="#5B9BD5"/>
    </style:style>
    <style:style style:name="P216" style:parent-style-name="Normal" style:family="paragraph">
      <style:paragraph-properties fo:margin-bottom="0.0555in" fo:line-height="100%"/>
    </style:style>
    <style:style style:name="P217" style:parent-style-name="Normal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T218" style:parent-style-name="Fuentedepárrafopredeter." style:family="text">
      <style:text-properties fo:font-weight="bold" style:font-weight-asian="bold"/>
    </style:style>
    <style:style style:name="P219" style:parent-style-name="Normal" style:family="paragraph">
      <style:paragraph-properties fo:margin-bottom="0.0555in" fo:line-height="100%"/>
      <style:text-properties fo:language="en" fo:country="US"/>
    </style:style>
    <style:style style:name="P220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21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2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T22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2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25" style:parent-style-name="Normal" style:family="paragraph">
      <style:paragraph-properties fo:margin-bottom="0.0555in" fo:line-height="100%"/>
    </style:style>
    <style:style style:name="T226" style:parent-style-name="Fuentedepárrafopredeter." style:family="text">
      <style:text-properties fo:text-shadow="0in 0.0277in 0.0416in #6E747A" fo:color="#5B9BD5"/>
    </style:style>
    <style:style style:name="P22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28" style:parent-style-name="Normal" style:family="paragraph">
      <style:paragraph-properties fo:margin-bottom="0.0833in" fo:line-height="100%"/>
    </style:style>
    <style:style style:name="P229" style:parent-style-name="Normal" style:family="paragraph">
      <style:paragraph-properties fo:margin-bottom="0.0833in" fo:line-height="100%"/>
    </style:style>
    <style:style style:name="P230" style:parent-style-name="Normal" style:family="paragraph">
      <style:paragraph-properties fo:margin-bottom="0.0833in" fo:line-height="100%"/>
    </style:style>
    <style:style style:name="P231" style:parent-style-name="Normal" style:family="paragraph">
      <style:paragraph-properties fo:margin-bottom="0.0833in" fo:line-height="100%"/>
    </style:style>
    <style:style style:name="P232" style:parent-style-name="Normal" style:family="paragraph">
      <style:paragraph-properties fo:margin-bottom="0.0833in" fo:line-height="100%" fo:margin-left="0.4916in" fo:text-indent="-0.4916in">
        <style:tab-stops/>
      </style:paragraph-properties>
    </style:style>
    <style:style style:name="T233" style:parent-style-name="Fuentedepárrafopredeter." style:family="text">
      <style:text-properties fo:text-shadow="0in 0.0277in 0.0416in #6E747A" fo:color="#5B9BD5"/>
    </style:style>
    <style:style style:name="P234" style:parent-style-name="Normal" style:family="paragraph">
      <style:paragraph-properties fo:margin-bottom="0.0833in" fo:line-height="100%"/>
    </style:style>
    <style:style style:name="T23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6" style:parent-style-name="Normal" style:family="paragraph">
      <style:paragraph-properties fo:margin-bottom="0.0833in" fo:line-height="100%" fo:margin-left="0.4916in" fo:text-indent="-0.4916in">
        <style:tab-stops/>
      </style:paragraph-properties>
    </style:style>
    <style:style style:name="T237" style:parent-style-name="Fuentedepárrafopredeter." style:family="text">
      <style:text-properties fo:text-shadow="0in 0.0277in 0.0416in #6E747A" fo:color="#5B9BD5"/>
    </style:style>
    <style:style style:name="P238" style:parent-style-name="Normal" style:family="paragraph">
      <style:paragraph-properties fo:margin-bottom="0.0833in" fo:line-height="100%" fo:margin-left="0.4916in" fo:text-indent="-0.4916in">
        <style:tab-stops/>
      </style:paragraph-properties>
    </style:style>
    <style:style style:name="T239" style:parent-style-name="Fuentedepárrafopredeter." style:family="text">
      <style:text-properties fo:text-shadow="0in 0.0277in 0.0416in #6E747A" fo:color="#5B9BD5"/>
    </style:style>
    <style:style style:name="P240" style:parent-style-name="Normal" style:family="paragraph">
      <style:paragraph-properties fo:margin-bottom="0.0833in" fo:line-height="100%"/>
    </style:style>
    <style:style style:name="T241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42" style:parent-style-name="Normal" style:family="paragraph">
      <style:paragraph-properties fo:margin-bottom="0.0833in" fo:line-height="100%"/>
    </style:style>
    <style:style style:name="T24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T245" style:parent-style-name="Fuentedepárrafopredeter." style:family="text">
      <style:text-properties fo:font-weight="bold" style:font-weight-asian="bold" style:font-weight-complex="bold"/>
    </style:style>
    <style:style style:name="P246" style:parent-style-name="Normal" style:family="paragraph">
      <style:paragraph-properties fo:margin-bottom="0.0833in" fo:line-height="100%"/>
    </style:style>
    <style:style style:name="T247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48" style:parent-style-name="Normal" style:family="paragraph">
      <style:paragraph-properties fo:margin-bottom="0.0833in" fo:line-height="100%"/>
    </style:style>
    <style:style style:name="P24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50" style:parent-style-name="Normal" style:family="paragraph">
      <style:paragraph-properties fo:margin-bottom="0.0555in" fo:line-height="100%"/>
    </style:style>
    <style:style style:name="P251" style:parent-style-name="Normal" style:family="paragraph">
      <style:paragraph-properties fo:margin-bottom="0.0555in" fo:line-height="100%"/>
    </style:style>
    <style:style style:name="P252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53" style:parent-style-name="Normal" style:family="paragraph">
      <style:paragraph-properties fo:margin-bottom="0.0555in" fo:line-height="100%"/>
    </style:style>
    <style:style style:name="P254" style:parent-style-name="Normal" style:family="paragraph">
      <style:paragraph-properties fo:margin-bottom="0.0555in" fo:line-height="100%"/>
    </style:style>
    <style:style style:name="P255" style:parent-style-name="Normal" style:family="paragraph">
      <style:paragraph-properties fo:margin-bottom="0.0555in" fo:line-height="100%"/>
    </style:style>
    <style:style style:name="T256" style:parent-style-name="Fuentedepárrafopredeter." style:family="text">
      <style:text-properties fo:text-shadow="0in 0.0277in 0.0416in #6E747A" fo:color="#5B9BD5"/>
    </style:style>
    <style:style style:name="T257" style:parent-style-name="Fuentedepárrafopredeter." style:family="text">
      <style:text-properties fo:text-shadow="0in 0.0277in 0.0416in #6E747A" fo:color="#5B9BD5"/>
    </style:style>
    <style:style style:name="P258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5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60" style:parent-style-name="Normal" style:family="paragraph">
      <style:paragraph-properties fo:margin-bottom="0.0555in" fo:line-height="100%"/>
      <style:text-properties fo:font-weight="bold" style:font-weight-asian="bold" style:font-size-complex="20pt" fo:background-color="#FFFF00" style:text-underline-type="single" style:text-underline-style="solid" style:text-underline-width="auto" style:text-underline-mode="continuous"/>
    </style:style>
    <style:style style:name="P261" style:parent-style-name="Normal" style:family="paragraph">
      <style:paragraph-properties fo:margin-bottom="0.0555in" fo:line-height="100%"/>
    </style:style>
    <style:style style:name="T262" style:parent-style-name="Fuentedepárrafopredeter." style:family="text">
      <style:text-properties fo:font-weight="bold" style:font-weight-asian="bold" style:font-weight-complex="bold"/>
    </style:style>
    <style:style style:name="P263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4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5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6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7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8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69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70" style:parent-style-name="Normal" style:family="paragraph">
      <style:paragraph-properties fo:margin-bottom="0.0833in" fo:line-height="100%"/>
    </style:style>
    <style:style style:name="T271" style:parent-style-name="Fuentedepárrafopredeter." style:family="text">
      <style:text-properties fo:font-weight="bold" style:font-weight-asian="bold" fo:font-size="14pt" style:font-size-asian="14pt" style:font-size-complex="20pt" fo:background-color="#FFFF00" style:text-underline-type="single" style:text-underline-style="solid" style:text-underline-width="auto" style:text-underline-mode="continuous" fo:language="en" fo:country="GB"/>
    </style:style>
    <style:style style:name="T272" style:parent-style-name="Fuentedepárrafopredeter." style:family="text">
      <style:text-properties fo:language="en" fo:country="GB"/>
    </style:style>
    <style:style style:name="P273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P274" style:parent-style-name="Normal" style:family="paragraph">
      <style:paragraph-properties fo:margin-bottom="0.0555in" fo:line-height="100%"/>
      <style:text-properties fo:text-shadow="0in 0.0277in 0.0416in #6E747A" fo:color="#5B9BD5" fo:language="en" fo:country="US"/>
    </style:style>
    <style:style style:name="T275" style:parent-style-name="Fuentedepárrafopredeter." style:family="text">
      <style:text-properties fo:text-shadow="0in 0.0277in 0.0416in #6E747A" fo:color="#5B9BD5"/>
    </style:style>
    <style:style style:name="T276" style:parent-style-name="Fuentedepárrafopredeter." style:family="text">
      <style:text-properties fo:text-shadow="0in 0.0277in 0.0416in #6E747A" fo:color="#5B9BD5"/>
    </style:style>
    <style:style style:name="P277" style:parent-style-name="Normal" style:family="paragraph">
      <style:paragraph-properties fo:margin-bottom="0.0833in" fo:line-height="100%"/>
    </style:style>
    <style:style style:name="T27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7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8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81" style:parent-style-name="Normal" style:family="paragraph">
      <style:paragraph-properties fo:margin-bottom="0.0833in" fo:line-height="100%"/>
    </style:style>
    <style:style style:name="T282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8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84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85" style:parent-style-name="Normal" style:family="paragraph">
      <style:paragraph-properties fo:margin-bottom="0.0555in" fo:line-height="100%"/>
    </style:style>
    <style:style style:name="T286" style:parent-style-name="Fuentedepárrafopredeter." style:family="text">
      <style:text-properties fo:text-shadow="0in 0.0277in 0.0416in #6E747A" fo:color="#5B9BD5"/>
    </style:style>
    <style:style style:name="P287" style:parent-style-name="Normal" style:family="paragraph">
      <style:paragraph-properties fo:margin-bottom="0.0833in" fo:line-height="100%"/>
    </style:style>
    <style:style style:name="T28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89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90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91" style:parent-style-name="Normal" style:family="paragraph">
      <style:paragraph-properties fo:margin-bottom="0.0555in" fo:line-height="100%"/>
    </style:style>
    <style:style style:name="T292" style:parent-style-name="Fuentedepárrafopredeter." style:family="text">
      <style:text-properties fo:text-shadow="0in 0.0277in 0.0416in #6E747A" fo:color="#5B9BD5"/>
    </style:style>
    <style:style style:name="P293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94" style:parent-style-name="Normal" style:family="paragraph">
      <style:paragraph-properties fo:margin-bottom="0.0833in" fo:line-height="100%"/>
    </style:style>
    <style:style style:name="T295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296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97" style:parent-style-name="Normal" style:family="paragraph">
      <style:paragraph-properties fo:margin-bottom="0.0555in" fo:line-height="100%"/>
      <style:text-properties fo:text-shadow="0in 0.0277in 0.0416in #6E747A" fo:color="#5B9BD5"/>
    </style:style>
    <style:style style:name="P298" style:parent-style-name="Normal" style:family="paragraph">
      <style:paragraph-properties fo:margin-bottom="0.0555in" fo:line-height="100%"/>
    </style:style>
    <style:style style:name="T299" style:parent-style-name="Fuentedepárrafopredeter." style:family="text">
      <style:text-properties fo:text-shadow="0in 0.0277in 0.0416in #6E747A" fo:color="#5B9BD5"/>
    </style:style>
    <style:style style:name="P300" style:parent-style-name="Normal" style:family="paragraph">
      <style:paragraph-properties fo:margin-bottom="0.0555in" fo:line-height="100%"/>
    </style:style>
    <style:style style:name="T301" style:parent-style-name="Fuentedepárrafopredeter." style:family="text">
      <style:text-properties fo:text-shadow="0in 0.0277in 0.0416in #6E747A" fo:color="#5B9BD5"/>
    </style:style>
    <style:style style:name="P302" style:parent-style-name="Normal" style:family="paragraph">
      <style:paragraph-properties fo:margin-bottom="0.0833in" fo:line-height="100%"/>
    </style:style>
    <style:style style:name="T30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304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305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06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07" style:parent-style-name="Normal" style:family="paragraph">
      <style:paragraph-properties fo:margin-bottom="0.0833in" fo:line-height="100%"/>
    </style:style>
    <style:style style:name="T308" style:parent-style-name="Fuentedepárrafopredeter." style:family="text">
      <style:text-properties fo:text-shadow="0in 0.0277in 0.0416in #6E747A" fo:color="#5B9BD5"/>
    </style:style>
    <style:style style:name="P309" style:parent-style-name="Normal" style:family="paragraph">
      <style:paragraph-properties fo:margin-bottom="0.0833in" fo:line-height="100%"/>
    </style:style>
    <style:style style:name="T310" style:parent-style-name="Fuentedepárrafopredeter." style:family="text">
      <style:text-properties fo:language="en" fo:country="GB"/>
    </style:style>
    <style:style style:name="T311" style:parent-style-name="Fuentedepárrafopredeter." style:family="text">
      <style:text-properties fo:background-color="#FFFF00" style:text-underline-type="single" style:text-underline-style="solid" style:text-underline-width="auto" style:text-underline-mode="continuous" fo:language="en" fo:country="GB"/>
    </style:style>
    <style:style style:name="T312" style:parent-style-name="Fuentedepárrafopredeter." style:family="text">
      <style:text-properties fo:language="en" fo:country="GB"/>
    </style:style>
    <style:style style:name="P313" style:parent-style-name="Normal" style:family="paragraph">
      <style:paragraph-properties fo:margin-bottom="0.0833in" fo:line-height="100%"/>
      <style:text-properties fo:text-shadow="0in 0.0277in 0.0416in #6E747A" fo:color="#5B9BD5" fo:language="en" fo:country="GB"/>
    </style:style>
    <style:style style:name="P314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15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16" style:parent-style-name="Normal" style:family="paragraph">
      <style:paragraph-properties fo:margin-bottom="0.0833in" fo:line-height="100%"/>
    </style:style>
    <style:style style:name="T317" style:parent-style-name="Fuentedepárrafopredeter." style:family="text">
      <style:text-properties fo:text-shadow="0in 0.0277in 0.0416in #6E747A" fo:color="#5B9BD5"/>
    </style:style>
    <style:style style:name="T31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319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20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21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22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23" style:parent-style-name="Normal" style:family="paragraph">
      <style:paragraph-properties fo:margin-bottom="0.0833in" fo:line-height="100%"/>
    </style:style>
    <style:style style:name="T324" style:parent-style-name="Fuentedepárrafopredeter." style:family="text">
      <style:text-properties fo:text-shadow="0in 0.0277in 0.0416in #6E747A" fo:color="#5B9BD5"/>
    </style:style>
    <style:style style:name="P325" style:parent-style-name="Normal" style:family="paragraph">
      <style:paragraph-properties fo:margin-bottom="0.0833in" fo:line-height="100%"/>
      <style:text-properties fo:background-color="#FFFF00" style:text-underline-type="single" style:text-underline-style="solid" style:text-underline-width="auto" style:text-underline-mode="continuous"/>
    </style:style>
    <style:style style:name="P326" style:parent-style-name="Normal" style:family="paragraph">
      <style:paragraph-properties fo:margin-bottom="0.0833in" fo:line-height="100%"/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327" style:parent-style-name="Normal" style:family="paragraph">
      <style:paragraph-properties fo:margin-bottom="0.0833in" fo:line-height="100%"/>
    </style:style>
    <style:style style:name="T328" style:parent-style-name="Fuentedepárrafopredeter." style:family="text">
      <style:text-properties fo:text-shadow="0in 0.0277in 0.0416in #6E747A" fo:color="#5B9BD5" fo:language="en" fo:country="US"/>
    </style:style>
    <style:style style:name="T329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30" style:parent-style-name="Fuentedepárrafopredeter." style:family="text">
      <style:text-properties fo:text-shadow="0in 0.0277in 0.0416in #6E747A" fo:color="#5B9BD5" fo:language="en" fo:country="US"/>
    </style:style>
    <style:style style:name="T331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32" style:parent-style-name="Fuentedepárrafopredeter." style:family="text">
      <style:text-properties fo:text-shadow="0in 0.0277in 0.0416in #6E747A" fo:color="#5B9BD5" fo:language="en" fo:country="US"/>
    </style:style>
    <style:style style:name="T333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34" style:parent-style-name="Fuentedepárrafopredeter." style:family="text">
      <style:text-properties fo:text-shadow="0in 0.0277in 0.0416in #6E747A" fo:color="#5B9BD5" fo:language="en" fo:country="US"/>
    </style:style>
    <style:style style:name="P335" style:parent-style-name="Normal" style:family="paragraph">
      <style:paragraph-properties fo:margin-bottom="0.0833in" fo:line-height="100%"/>
    </style:style>
    <style:style style:name="T336" style:parent-style-name="Fuentedepárrafopredeter." style:family="text">
      <style:text-properties fo:text-shadow="0in 0.0277in 0.0416in #6E747A" fo:color="#5B9BD5"/>
    </style:style>
    <style:style style:name="T337" style:parent-style-name="Fuentedepárrafopredeter." style:family="text">
      <style:text-properties fo:text-shadow="0in 0.0277in 0.0416in #6E747A" fo:color="#5B9BD5"/>
    </style:style>
    <style:style style:name="P338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39" style:parent-style-name="Normal" style:family="paragraph">
      <style:paragraph-properties fo:margin-bottom="0.0833in" fo:line-height="100%"/>
    </style:style>
    <style:style style:name="T340" style:parent-style-name="Fuentedepárrafopredeter." style:family="text">
      <style:text-properties fo:text-shadow="0in 0.0277in 0.0416in #6E747A" fo:color="#5B9BD5"/>
    </style:style>
    <style:style style:name="P341" style:parent-style-name="Normal" style:family="paragraph">
      <style:paragraph-properties fo:margin-bottom="0.0833in" fo:line-height="100%"/>
    </style:style>
    <style:style style:name="T342" style:parent-style-name="Fuentedepárrafopredeter." style:family="text">
      <style:text-properties fo:text-shadow="0in 0.0277in 0.0416in #6E747A" fo:color="#5B9BD5"/>
    </style:style>
    <style:style style:name="P34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44" style:parent-style-name="Normal" style:family="paragraph">
      <style:paragraph-properties fo:margin-bottom="0.0833in" fo:line-height="100%"/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P345" style:parent-style-name="Normal" style:family="paragraph">
      <style:paragraph-properties fo:margin-bottom="0.0833in" fo:line-height="100%"/>
    </style:style>
    <style:style style:name="T346" style:parent-style-name="Fuentedepárrafopredeter." style:family="text">
      <style:text-properties fo:text-shadow="0in 0.0277in 0.0416in #6E747A" fo:color="#5B9BD5" fo:language="en" fo:country="US"/>
    </style:style>
    <style:style style:name="T347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48" style:parent-style-name="Fuentedepárrafopredeter." style:family="text">
      <style:text-properties fo:text-shadow="0in 0.0277in 0.0416in #6E747A" fo:color="#5B9BD5" fo:language="en" fo:country="US"/>
    </style:style>
    <style:style style:name="T349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50" style:parent-style-name="Fuentedepárrafopredeter." style:family="text">
      <style:text-properties fo:text-shadow="0in 0.0277in 0.0416in #6E747A" fo:color="#5B9BD5" fo:language="en" fo:country="US"/>
    </style:style>
    <style:style style:name="T351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52" style:parent-style-name="Fuentedepárrafopredeter." style:family="text">
      <style:text-properties fo:text-shadow="0in 0.0277in 0.0416in #6E747A" fo:color="#5B9BD5" fo:language="en" fo:country="US"/>
    </style:style>
    <style:style style:name="P35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54" style:parent-style-name="Normal" style:family="paragraph">
      <style:paragraph-properties fo:margin-bottom="0.0833in" fo:line-height="100%"/>
    </style:style>
    <style:style style:name="T355" style:parent-style-name="Fuentedepárrafopredeter." style:family="text">
      <style:text-properties fo:text-shadow="0in 0.0277in 0.0416in #6E747A" fo:color="#5B9BD5" fo:language="en" fo:country="US"/>
    </style:style>
    <style:style style:name="T356" style:parent-style-name="Fuentedepárrafopredeter." style:family="text">
      <style:text-properties fo:text-shadow="0in 0.0277in 0.0416in #6E747A" fo:color="#5B9BD5"/>
    </style:style>
    <style:style style:name="P357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58" style:parent-style-name="Normal" style:family="paragraph">
      <style:paragraph-properties fo:margin-bottom="0.0833in" fo:line-height="100%"/>
    </style:style>
    <style:style style:name="T359" style:parent-style-name="Fuentedepárrafopredeter." style:family="text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T360" style:parent-style-name="Fuentedepárrafopredeter." style:family="text">
      <style:text-properties fo:language="en" fo:country="US"/>
    </style:style>
    <style:style style:name="P361" style:parent-style-name="Normal" style:family="paragraph">
      <style:paragraph-properties fo:margin-bottom="0.0833in" fo:line-height="100%"/>
    </style:style>
    <style:style style:name="T362" style:parent-style-name="Fuentedepárrafopredeter." style:family="text">
      <style:text-properties fo:text-shadow="0in 0.0277in 0.0416in #6E747A" fo:color="#5B9BD5" fo:language="en" fo:country="US"/>
    </style:style>
    <style:style style:name="T363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64" style:parent-style-name="Fuentedepárrafopredeter." style:family="text">
      <style:text-properties fo:text-shadow="0in 0.0277in 0.0416in #6E747A" fo:color="#5B9BD5" fo:language="en" fo:country="US"/>
    </style:style>
    <style:style style:name="T365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66" style:parent-style-name="Fuentedepárrafopredeter." style:family="text">
      <style:text-properties fo:text-shadow="0in 0.0277in 0.0416in #6E747A" fo:color="#5B9BD5" fo:language="en" fo:country="US"/>
    </style:style>
    <style:style style:name="T367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68" style:parent-style-name="Fuentedepárrafopredeter." style:family="text">
      <style:text-properties fo:text-shadow="0in 0.0277in 0.0416in #6E747A" fo:color="#5B9BD5" fo:language="en" fo:country="US"/>
    </style:style>
    <style:style style:name="P369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70" style:parent-style-name="Normal" style:family="paragraph">
      <style:paragraph-properties fo:margin-bottom="0.0833in" fo:line-height="100%"/>
    </style:style>
    <style:style style:name="T371" style:parent-style-name="Fuentedepárrafopredeter." style:family="text">
      <style:text-properties fo:text-shadow="0in 0.0277in 0.0416in #6E747A" fo:color="#5B9BD5" fo:language="en" fo:country="US"/>
    </style:style>
    <style:style style:name="T372" style:parent-style-name="Fuentedepárrafopredeter." style:family="text">
      <style:text-properties fo:text-shadow="0in 0.0277in 0.0416in #6E747A" fo:color="#5B9BD5"/>
    </style:style>
    <style:style style:name="P373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74" style:parent-style-name="Normal" style:family="paragraph">
      <style:paragraph-properties fo:margin-bottom="0.0833in" fo:line-height="100%"/>
    </style:style>
    <style:style style:name="T375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376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377" style:parent-style-name="Fuentedepárrafopredeter." style:family="text">
      <style:text-properties fo:text-shadow="0in 0.0277in 0.0416in #6E747A" fo:color="#5B9BD5"/>
    </style:style>
    <style:style style:name="P378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79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80" style:parent-style-name="Normal" style:family="paragraph">
      <style:paragraph-properties fo:margin-bottom="0.0833in" fo:line-height="100%"/>
    </style:style>
    <style:style style:name="T381" style:parent-style-name="Fuentedepárrafopredeter." style:family="text">
      <style:text-properties fo:text-shadow="0in 0.0277in 0.0416in #6E747A" fo:color="#5B9BD5" fo:language="en" fo:country="US"/>
    </style:style>
    <style:style style:name="T382" style:parent-style-name="Fuentedepárrafopredeter." style:family="text">
      <style:text-properties fo:text-shadow="0in 0.0277in 0.0416in #6E747A" fo:color="#5B9BD5"/>
    </style:style>
    <style:style style:name="P383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84" style:parent-style-name="Normal" style:family="paragraph">
      <style:paragraph-properties fo:margin-bottom="0.0833in" fo:line-height="100%"/>
      <style:text-properties fo:background-color="#FFFF00" style:text-underline-type="single" style:text-underline-style="solid" style:text-underline-width="auto" style:text-underline-mode="continuous"/>
    </style:style>
    <style:style style:name="P385" style:parent-style-name="Normal" style:family="paragraph">
      <style:paragraph-properties fo:margin-bottom="0.0833in" fo:line-height="100%"/>
    </style:style>
    <style:style style:name="T386" style:parent-style-name="Fuentedepárrafopredeter." style:family="text">
      <style:text-properties fo:text-shadow="0in 0.0277in 0.0416in #6E747A" fo:color="#5B9BD5" fo:language="en" fo:country="US"/>
    </style:style>
    <style:style style:name="T387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88" style:parent-style-name="Fuentedepárrafopredeter." style:family="text">
      <style:text-properties fo:text-shadow="0in 0.0277in 0.0416in #6E747A" fo:color="#5B9BD5" fo:language="en" fo:country="US"/>
    </style:style>
    <style:style style:name="T389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90" style:parent-style-name="Fuentedepárrafopredeter." style:family="text">
      <style:text-properties fo:text-shadow="0in 0.0277in 0.0416in #6E747A" fo:color="#5B9BD5" fo:language="en" fo:country="US"/>
    </style:style>
    <style:style style:name="T391" style:parent-style-name="Fuentedepárrafopredeter." style:family="text">
      <style:text-properties style:font-name="Segoe UI Symbol" style:font-name-complex="Segoe UI Symbol" fo:text-shadow="0in 0.0277in 0.0416in #6E747A" fo:color="#5B9BD5"/>
    </style:style>
    <style:style style:name="T392" style:parent-style-name="Fuentedepárrafopredeter." style:family="text">
      <style:text-properties fo:text-shadow="0in 0.0277in 0.0416in #6E747A" fo:color="#5B9BD5" fo:language="en" fo:country="US"/>
    </style:style>
    <style:style style:name="P39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394" style:parent-style-name="Normal" style:family="paragraph">
      <style:paragraph-properties fo:margin-bottom="0.0833in" fo:line-height="100%"/>
    </style:style>
    <style:style style:name="T395" style:parent-style-name="Fuentedepárrafopredeter." style:family="text">
      <style:text-properties fo:text-shadow="0in 0.0277in 0.0416in #6E747A" fo:color="#5B9BD5" fo:language="en" fo:country="US"/>
    </style:style>
    <style:style style:name="T396" style:parent-style-name="Fuentedepárrafopredeter." style:family="text">
      <style:text-properties fo:text-shadow="0in 0.0277in 0.0416in #6E747A" fo:color="#5B9BD5"/>
    </style:style>
    <style:style style:name="P397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98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399" style:parent-style-name="Normal" style:family="paragraph">
      <style:paragraph-properties fo:margin-bottom="0.0833in" fo:line-height="100%"/>
    </style:style>
    <style:style style:name="T400" style:parent-style-name="Fuentedepárrafopredeter." style:family="text">
      <style:text-properties fo:text-shadow="0in 0.0277in 0.0416in #6E747A" fo:color="#5B9BD5"/>
    </style:style>
    <style:style style:name="P401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T402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3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4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5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6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7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09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P410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11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12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1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14" style:parent-style-name="Normal" style:family="paragraph">
      <style:paragraph-properties fo:margin-bottom="0.0833in" fo:line-height="100%"/>
    </style:style>
    <style:style style:name="T415" style:parent-style-name="Fuentedepárrafopredeter." style:family="text">
      <style:text-properties fo:text-shadow="0in 0.0277in 0.0416in #6E747A" fo:color="#5B9BD5" fo:language="en" fo:country="US"/>
    </style:style>
    <style:style style:name="T416" style:parent-style-name="Fuentedepárrafopredeter." style:family="text">
      <style:text-properties fo:text-shadow="0in 0.0277in 0.0416in #6E747A" fo:language="en" fo:country="US"/>
    </style:style>
    <style:style style:name="T417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18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19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420" style:parent-style-name="Fuentedepárrafopredeter." style:family="text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T421" style:parent-style-name="Fuentedepárrafopredeter." style:family="text">
      <style:text-properties fo:language="en" fo:country="US"/>
    </style:style>
    <style:style style:name="P422" style:parent-style-name="Normal" style:family="paragraph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P423" style:parent-style-name="Normal" style:family="paragraph">
      <style:text-properties fo:text-shadow="0in 0.0277in 0.0416in #6E747A" fo:color="#5B9BD5" fo:language="en" fo:country="US"/>
    </style:style>
    <style:style style:name="T424" style:parent-style-name="Fuentedepárrafopredeter." style:family="text">
      <style:text-properties fo:text-shadow="0in 0.0277in 0.0416in #6E747A" fo:color="#5B9BD5" fo:language="en" fo:country="US"/>
    </style:style>
    <style:style style:name="T425" style:parent-style-name="Fuentedepárrafopredeter." style:family="text">
      <style:text-properties fo:language="en" fo:country="US"/>
    </style:style>
    <style:style style:name="T426" style:parent-style-name="Fuentedepárrafopredeter." style:family="text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P427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T428" style:parent-style-name="Fuentedepárrafopredeter." style:family="text">
      <style:text-properties fo:text-shadow="0in 0.0277in 0.0416in #6E747A" fo:color="#5B9BD5"/>
    </style:style>
    <style:style style:name="P429" style:parent-style-name="Normal" style:family="paragraph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P430" style:parent-style-name="Normal" style:family="paragraph">
      <style:paragraph-properties fo:margin-bottom="0.0833in" fo:line-height="100%"/>
      <style:text-properties fo:font-weight="bold" style:font-weight-asian="bold" fo:font-size="14pt" style:font-size-asian="14pt" style:font-size-complex="20pt" fo:background-color="#FFFF00" style:text-underline-type="single" style:text-underline-style="solid" style:text-underline-width="auto" style:text-underline-mode="continuous"/>
    </style:style>
    <style:style style:name="T431" style:parent-style-name="Fuentedepárrafopredeter." style:family="text">
      <style:text-properties fo:font-weight="bold" style:font-weight-asian="bold"/>
    </style:style>
    <style:style style:name="T432" style:parent-style-name="Fuentedepárrafopredeter." style:family="text">
      <style:text-properties fo:font-weight="bold" style:font-weight-asian="bold"/>
    </style:style>
    <style:style style:name="T433" style:parent-style-name="Fuentedepárrafopredeter." style:family="text">
      <style:text-properties fo:background-color="#FFFF00"/>
    </style:style>
    <style:style style:name="P434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435" style:parent-style-name="Normal" style:family="paragraph">
      <style:paragraph-properties fo:margin-bottom="0.0833in" fo:line-height="100%"/>
    </style:style>
    <style:style style:name="T436" style:parent-style-name="Fuentedepárrafopredeter." style:family="text">
      <style:text-properties fo:text-shadow="0in 0.0277in 0.0416in #6E747A" fo:color="#5B9BD5"/>
    </style:style>
    <style:style style:name="T437" style:parent-style-name="Fuentedepárrafopredeter." style:family="text">
      <style:text-properties fo:text-shadow="0in 0.0277in 0.0416in #6E747A" fo:color="#5B9BD5" fo:language="en" fo:country="US"/>
    </style:style>
    <style:style style:name="T438" style:parent-style-name="Fuentedepárrafopredeter." style:family="text">
      <style:text-properties fo:language="en" fo:country="US"/>
    </style:style>
    <style:style style:name="P439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0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1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2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4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45" style:parent-style-name="Normal" style:family="paragraph">
      <style:paragraph-properties fo:margin-bottom="0.0833in" fo:line-height="100%"/>
    </style:style>
    <style:style style:name="T446" style:parent-style-name="Fuentedepárrafopredeter." style:family="text">
      <style:text-properties fo:text-shadow="0in 0.0277in 0.0416in #6E747A" fo:color="#5B9BD5" fo:language="en" fo:country="US"/>
    </style:style>
    <style:style style:name="T447" style:parent-style-name="Fuentedepárrafopredeter." style:family="text">
      <style:text-properties fo:text-shadow="0in 0.0277in 0.0416in #6E747A" fo:color="#5B9BD5"/>
    </style:style>
    <style:style style:name="T448" style:parent-style-name="Fuentedepárrafopredeter." style:family="text">
      <style:text-properties fo:text-shadow="0in 0.0277in 0.0416in #6E747A" fo:color="#5B9BD5"/>
    </style:style>
    <style:style style:name="P449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450" style:parent-style-name="Normal" style:family="paragraph">
      <style:paragraph-properties fo:margin-bottom="0.0833in" fo:line-height="100%"/>
    </style:style>
    <style:style style:name="T451" style:parent-style-name="Fuentedepárrafopredeter." style:family="text">
      <style:text-properties fo:text-shadow="0in 0.0277in 0.0416in #6E747A" fo:color="#5B9BD5"/>
    </style:style>
    <style:style style:name="P452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453" style:parent-style-name="Normal" style:family="paragraph">
      <style:paragraph-properties fo:margin-bottom="0.0833in" fo:line-height="100%"/>
    </style:style>
    <style:style style:name="T454" style:parent-style-name="Fuentedepárrafopredeter." style:family="text">
      <style:text-properties fo:text-shadow="0in 0.0277in 0.0416in #6E747A" fo:color="#5B9BD5"/>
    </style:style>
    <style:style style:name="T455" style:parent-style-name="Fuentedepárrafopredeter." style:family="text">
      <style:text-properties fo:text-shadow="0in 0.0277in 0.0416in #6E747A" fo:color="#5B9BD5" fo:language="en" fo:country="US"/>
    </style:style>
    <style:style style:name="P456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T457" style:parent-style-name="Fuentedepárrafopredeter." style:family="text">
      <style:text-properties fo:background-color="#FFFF00" fo:language="en" fo:country="US"/>
    </style:style>
    <style:style style:name="T458" style:parent-style-name="Fuentedepárrafopredeter." style:family="text">
      <style:text-properties fo:language="en" fo:country="US"/>
    </style:style>
    <style:style style:name="P459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60" style:parent-style-name="Normal" style:family="paragraph">
      <style:paragraph-properties fo:margin-bottom="0.0833in" fo:line-height="100%"/>
    </style:style>
    <style:style style:name="T461" style:parent-style-name="Fuentedepárrafopredeter." style:family="text">
      <style:text-properties fo:text-shadow="0in 0.0277in 0.0416in #6E747A" fo:color="#5B9BD5"/>
    </style:style>
    <style:style style:name="P462" style:parent-style-name="Normal" style:family="paragraph">
      <style:paragraph-properties fo:margin-bottom="0.0833in" fo:line-height="100%"/>
    </style:style>
    <style:style style:name="P463" style:parent-style-name="Normal" style:family="paragraph">
      <style:paragraph-properties fo:margin-bottom="0.0833in" fo:line-height="100%"/>
    </style:style>
    <style:style style:name="T464" style:parent-style-name="Fuentedepárrafopredeter." style:family="text">
      <style:text-properties fo:text-shadow="0in 0.0277in 0.0416in #6E747A" fo:color="#5B9BD5"/>
    </style:style>
    <style:style style:name="T465" style:parent-style-name="Fuentedepárrafopredeter." style:family="text">
      <style:text-properties fo:text-shadow="0in 0.0277in 0.0416in #6E747A" fo:color="#5B9BD5"/>
    </style:style>
    <style:style style:name="T466" style:parent-style-name="Fuentedepárrafopredeter." style:family="text">
      <style:text-properties fo:text-shadow="0in 0.0277in 0.0416in #6E747A" fo:color="#5B9BD5"/>
    </style:style>
    <style:style style:name="T467" style:parent-style-name="Fuentedepárrafopredeter." style:family="text">
      <style:text-properties fo:text-shadow="0in 0.0277in 0.0416in #6E747A" fo:color="#5B9BD5"/>
    </style:style>
    <style:style style:name="T468" style:parent-style-name="Fuentedepárrafopredeter." style:family="text">
      <style:text-properties fo:text-shadow="0in 0.0277in 0.0416in #6E747A" fo:color="#5B9BD5"/>
    </style:style>
    <style:style style:name="T469" style:parent-style-name="Fuentedepárrafopredeter." style:family="text">
      <style:text-properties fo:text-shadow="0in 0.0277in 0.0416in #6E747A" fo:color="#5B9BD5"/>
    </style:style>
    <style:style style:name="T470" style:parent-style-name="Fuentedepárrafopredeter." style:family="text">
      <style:text-properties fo:text-shadow="0in 0.0277in 0.0416in #6E747A" fo:color="#5B9BD5"/>
    </style:style>
    <style:style style:name="T471" style:parent-style-name="Fuentedepárrafopredeter." style:family="text">
      <style:text-properties fo:background-color="#FFFF00"/>
    </style:style>
    <style:style style:name="P472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7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74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75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76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T477" style:parent-style-name="Fuentedepárrafopredeter." style:family="text">
      <style:text-properties fo:background-color="#FFFF00"/>
    </style:style>
    <style:style style:name="P478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479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480" style:parent-style-name="Normal" style:family="paragraph">
      <style:paragraph-properties fo:margin-bottom="0.0833in" fo:line-height="100%"/>
    </style:style>
    <style:style style:name="T481" style:parent-style-name="Fuentedepárrafopredeter." style:family="text">
      <style:text-properties fo:text-shadow="0in 0.0277in 0.0416in #6E747A" fo:color="#5B9BD5"/>
    </style:style>
    <style:style style:name="T482" style:parent-style-name="Fuentedepárrafopredeter." style:family="text">
      <style:text-properties fo:text-shadow="0in 0.0277in 0.0416in #6E747A" fo:color="#5B9BD5" fo:language="en" fo:country="US"/>
    </style:style>
    <style:style style:name="P483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84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85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86" style:parent-style-name="Normal" style:family="paragraph">
      <style:paragraph-properties fo:margin-bottom="0.0833in" fo:line-height="100%"/>
      <style:text-properties fo:text-shadow="0in 0.0277in 0.0416in #6E747A" fo:language="en" fo:country="US"/>
    </style:style>
    <style:style style:name="P487" style:parent-style-name="Normal" style:family="paragraph">
      <style:paragraph-properties fo:margin-bottom="0.0833in" fo:line-height="100%"/>
    </style:style>
    <style:style style:name="T488" style:parent-style-name="Fuentedepárrafopredeter." style:family="text">
      <style:text-properties fo:text-shadow="0in 0.0277in 0.0416in #6E747A" fo:color="#5B9BD5" fo:language="en" fo:country="US"/>
    </style:style>
    <style:style style:name="T489" style:parent-style-name="Fuentedepárrafopredeter." style:family="text">
      <style:text-properties fo:language="en" fo:country="US"/>
    </style:style>
    <style:style style:name="P490" style:parent-style-name="Normal" style:family="paragraph">
      <style:paragraph-properties fo:margin-bottom="0.0833in" fo:line-height="100%"/>
    </style:style>
    <style:style style:name="T491" style:parent-style-name="Fuentedepárrafopredeter." style:family="text">
      <style:text-properties fo:text-shadow="0in 0.0277in 0.0416in #6E747A" fo:color="#5B9BD5" fo:language="en" fo:country="US"/>
    </style:style>
    <style:style style:name="T492" style:parent-style-name="Fuentedepárrafopredeter." style:family="text">
      <style:text-properties fo:language="en" fo:country="US"/>
    </style:style>
    <style:style style:name="P493" style:parent-style-name="Normal" style:family="paragraph">
      <style:paragraph-properties fo:margin-bottom="0.0833in" fo:line-height="100%"/>
    </style:style>
    <style:style style:name="T494" style:parent-style-name="Fuentedepárrafopredeter." style:family="text">
      <style:text-properties fo:text-shadow="0in 0.0277in 0.0416in #6E747A" fo:color="#5B9BD5" fo:language="en" fo:country="US"/>
    </style:style>
    <style:style style:name="T495" style:parent-style-name="Fuentedepárrafopredeter." style:family="text">
      <style:text-properties fo:language="en" fo:country="US"/>
    </style:style>
    <style:style style:name="P496" style:parent-style-name="Normal" style:family="paragraph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P497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98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499" style:parent-style-name="Normal" style:family="paragraph">
      <style:paragraph-properties fo:margin-bottom="0.0833in" fo:line-height="100%"/>
    </style:style>
    <style:style style:name="T500" style:parent-style-name="Fuentedepárrafopredeter." style:family="text">
      <style:text-properties fo:text-shadow="0in 0.0277in 0.0416in #6E747A" fo:color="#5B9BD5" fo:language="en" fo:country="US"/>
    </style:style>
    <style:style style:name="T501" style:parent-style-name="Fuentedepárrafopredeter." style:family="text">
      <style:text-properties fo:text-shadow="0in 0.0277in 0.0416in #6E747A" fo:color="#5B9BD5"/>
    </style:style>
    <style:style style:name="P502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503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504" style:parent-style-name="Normal" style:family="paragraph">
      <style:paragraph-properties fo:margin-bottom="0.0833in" fo:line-height="100%"/>
    </style:style>
    <style:style style:name="P505" style:parent-style-name="Normal" style:family="paragraph">
      <style:paragraph-properties fo:margin-bottom="0.0833in" fo:line-height="100%"/>
    </style:style>
    <style:style style:name="T506" style:parent-style-name="Fuentedepárrafopredeter." style:family="text">
      <style:text-properties fo:text-shadow="0in 0.0277in 0.0416in #6E747A" fo:color="#5B9BD5"/>
    </style:style>
    <style:style style:name="T507" style:parent-style-name="Fuentedepárrafopredeter." style:family="text">
      <style:text-properties fo:text-shadow="0in 0.0277in 0.0416in #6E747A" fo:color="#5B9BD5"/>
    </style:style>
    <style:style style:name="T508" style:parent-style-name="Fuentedepárrafopredeter." style:family="text">
      <style:text-properties fo:text-shadow="0in 0.0277in 0.0416in #6E747A" fo:color="#5B9BD5"/>
    </style:style>
    <style:style style:name="T509" style:parent-style-name="Fuentedepárrafopredeter." style:family="text">
      <style:text-properties fo:text-shadow="0in 0.0277in 0.0416in #6E747A" fo:color="#5B9BD5"/>
    </style:style>
    <style:style style:name="P510" style:parent-style-name="Normal" style:family="paragraph">
      <style:text-properties fo:background-color="#FFFF00"/>
    </style:style>
    <style:style style:name="P511" style:parent-style-name="Normal" style:family="paragraph">
      <style:text-properties fo:language="en" fo:country="US"/>
    </style:style>
    <style:style style:name="P512" style:parent-style-name="Normal" style:family="paragraph">
      <style:text-properties fo:language="en" fo:country="US"/>
    </style:style>
    <style:style style:name="P513" style:parent-style-name="Normal" style:family="paragraph">
      <style:text-properties fo:background-color="#FFFF00"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516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517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518" style:parent-style-name="Normal" style:family="paragraph">
      <style:paragraph-properties fo:margin-bottom="0.0833in" fo:line-height="100%"/>
    </style:style>
    <style:style style:name="T519" style:parent-style-name="Fuentedepárrafopredeter." style:family="text">
      <style:text-properties fo:text-shadow="0in 0.0277in 0.0416in #6E747A" fo:color="#5B9BD5" fo:language="en" fo:country="US"/>
    </style:style>
    <style:style style:name="T520" style:parent-style-name="Fuentedepárrafopredeter." style:family="text">
      <style:text-properties fo:text-shadow="0in 0.0277in 0.0416in #6E747A" fo:color="#5B9BD5"/>
    </style:style>
    <style:style style:name="P521" style:parent-style-name="Normal" style:family="paragraph">
      <style:paragraph-properties fo:margin-bottom="0.0833in" fo:line-height="100%"/>
      <style:text-properties fo:text-shadow="0in 0.0277in 0.0416in #6E747A" fo:color="#5B9BD5"/>
    </style:style>
    <style:style style:name="P522" style:parent-style-name="Normal" style:family="paragraph">
      <style:paragraph-properties fo:margin-bottom="0.0833in" fo:line-height="100%"/>
    </style:style>
    <style:style style:name="T523" style:parent-style-name="Fuentedepárrafopredeter." style:family="text">
      <style:text-properties fo:text-shadow="0in 0.0277in 0.0416in #6E747A" fo:color="#5B9BD5"/>
    </style:style>
    <style:style style:name="T524" style:parent-style-name="Fuentedepárrafopredeter." style:family="text">
      <style:text-properties fo:text-shadow="0in 0.0277in 0.0416in #6E747A" fo:color="#5B9BD5" fo:language="en" fo:country="US"/>
    </style:style>
    <style:style style:name="P525" style:parent-style-name="Normal" style:family="paragraph">
      <style:paragraph-properties fo:margin-bottom="0.0833in" fo:line-height="100%"/>
      <style:text-properties fo:text-shadow="0in 0.0277in 0.0416in #6E747A" fo:color="#5B9BD5"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Web" style:family="paragraph">
      <style:paragraph-properties fo:margin-top="0in" fo:background-color="#FFFFFF">
        <style:background-fill draw:fill="solid" draw:fill-color="#FFFFFF"/>
      </style:paragraph-properties>
    </style:style>
    <style:style style:name="T530" style:parent-style-name="Fuentedepárrafopredeter." style:family="text">
      <style:text-properties style:font-name="Tw Cen MT" fo:font-size="11pt" style:font-size-asian="11pt" style:font-size-complex="11pt" style:language-asian="en" style:country-asian="US"/>
    </style:style>
    <style:style style:name="T531" style:parent-style-name="Fuentedepárrafopredeter." style:family="text">
      <style:text-properties style:font-name="Tw Cen MT" fo:font-weight="bold" style:font-weight-asian="bold" style:font-weight-complex="bold" fo:font-size="11pt" style:font-size-asian="11pt" style:font-size-complex="11pt" style:language-asian="en" style:country-asian="US"/>
    </style:style>
    <style:style style:name="T532" style:parent-style-name="Fuentedepárrafopredeter." style:family="text">
      <style:text-properties style:font-name="Tw Cen MT" fo:font-size="11pt" style:font-size-asian="11pt" style:font-size-complex="11pt" style:language-asian="en" style:country-asian="US"/>
    </style:style>
    <style:style style:name="P533" style:parent-style-name="NormalWeb" style:family="paragraph">
      <style:paragraph-properties fo:margin-top="0in" fo:background-color="#FFFFFF">
        <style:background-fill draw:fill="solid" draw:fill-color="#FFFFFF"/>
      </style:paragraph-properties>
    </style:style>
    <style:style style:name="T534" style:parent-style-name="Fuentedepárrafopredeter." style:family="text">
      <style:text-properties style:font-name="Tw Cen MT" fo:font-weight="bold" style:font-weight-asian="bold" style:font-weight-complex="bold" fo:font-size="11pt" style:font-size-asian="11pt" style:font-size-complex="11pt" style:language-asian="en" style:country-asian="US"/>
    </style:style>
    <style:style style:name="T535" style:parent-style-name="Fuentedepárrafopredeter." style:family="text">
      <style:text-properties style:font-name="Tw Cen MT" fo:font-size="11pt" style:font-size-asian="11pt" style:font-size-complex="11pt" style:language-asian="en" style:country-asian="US"/>
    </style:style>
    <style:style style:name="P536" style:parent-style-name="NormalWeb" style:family="paragraph">
      <style:paragraph-properties fo:margin-top="0in" fo:background-color="#FFFFFF">
        <style:background-fill draw:fill="solid" draw:fill-color="#FFFFFF"/>
      </style:paragraph-properties>
    </style:style>
    <style:style style:name="T537" style:parent-style-name="Fuentedepárrafopredeter." style:family="text">
      <style:text-properties style:font-name="Tw Cen MT" fo:font-weight="bold" style:font-weight-asian="bold" style:font-weight-complex="bold" fo:font-size="11pt" style:font-size-asian="11pt" style:font-size-complex="11pt" style:language-asian="en" style:country-asian="US"/>
    </style:style>
    <style:style style:name="T538" style:parent-style-name="Fuentedepárrafopredeter." style:family="text">
      <style:text-properties style:font-name="Tw Cen MT" fo:font-size="11pt" style:font-size-asian="11pt" style:font-size-complex="11pt" style:language-asian="en" style:country-asian="US"/>
    </style:style>
  </office:automatic-styles>
  <office:body>
    <office:text text:use-soft-page-breaks="true">
      <text:p text:style-name="P1">JAVASCRIPT</text:p>
      <text:p text:style-name="Normal"/>
      <text:p text:style-name="Normal">Donde se pone el código java script:</text:p>
      <text:p text:style-name="P2">directo</text:p>
      <text:p text:style-name="P3"><text:span text:style-name="T4">&lt;</text:span><text:span text:style-name="T5">script</text:span><text:span text:style-name="T6">&gt;</text:span><text:span text:style-name="T7">document</text:span><text:span text:style-name="T8">.</text:span><text:span text:style-name="T9">getElementById</text:span><text:span text:style-name="T10">...</text:span><text:span text:style-name="T11">&lt;/</text:span><text:span text:style-name="T12">script</text:span><text:span text:style-name="T13">&gt;</text:span></text:p>
      <text:p text:style-name="P14"/>
      <text:p text:style-name="Normal">Separado en otro archivo <text:s/>‘xxx . js’</text:p>
      <text:p text:style-name="P15"><text:span text:style-name="T16">&lt;</text:span><text:span text:style-name="T17">script</text:span><text:span text:style-name="T18"><text:s/></text:span><text:span text:style-name="T19">src</text:span><text:span text:style-name="T20">=</text:span><text:span text:style-name="T21">"script.js"</text:span><text:span text:style-name="T22">&gt;&lt;/</text:span><text:span text:style-name="T23">script</text:span><text:span text:style-name="T24">&gt;</text:span></text:p>
      <text:p text:style-name="P25"/>
      <text:p text:style-name="Normal"><text:span text:style-name="T26">Tipos de datos</text:span></text:p>
      <text:p text:style-name="P27">Number, String, Boolean, Null,<text:s/>Undefined, Symbol, bigint</text:p>
      <text:p text:style-name="Normal"><text:span text:style-name="T28">Números</text:span></text:p>
      <text:p text:style-name="Normal">+: suma <text:s text:c="2"/>-: resta <text:s text:c="2"/>*: multiplicación <text:s text:c="2"/>/: división <text:s text:c="2"/>%: módulo (resto de la división) <text:s text:c="2"/>**: exponente</text:p>
      <text:p text:style-name="Normal">La diferencia entre <text:span text:style-name="T29">null</text:span> y <text:span text:style-name="T30">undefined</text:span></text:p>
      <text:p text:style-name="Normal">Mientras que null es un valor que significa que algo no tiene<text:s/>valor, undefined significa que algo no ha sido definido</text:p>
      <text:p text:style-name="P31">Strings, cadenas de texto</text:p>
      <text:p text:style-name="P32">let nombre = “Pedro”</text:p>
      <text:p text:style-name="P33">let nombre = ‘Pedro’</text:p>
      <text:p text:style-name="Normal"><text:span text:style-name="T34">let nombre = `Pedro`<text:s/></text:span>Esta permite %{vble}</text:p>
      <text:p text:style-name="Normal"><text:span text:style-name="T35">Concatenación</text:span></text:p>
      <text:p text:style-name="Normal">Para unir dos cadenas de texto, podemos usar el operador +:</text:p>
      <text:p text:style-name="P36">TEMPLATE<text:s/>STRING</text:p>
      <text:p text:style-name="Normal"><text:span text:style-name="T37">‘el valor de la variable es: ${variable}’</text:span><text:s/>(<text:span text:style-name="T38">‘’son tildes)</text:span></text:p>
      <text:p text:style-name="P39">Añadir caracteres espaciales.</text:p>
      <text:p text:style-name="Normal">Con el carácter \ mas el símbolo</text:p>
      <text:p text:style-name="Normal">Ejemplo: <text:s/><text:span text:style-name="T40">“</text:span>Este símbolo \” es un carácter especial<text:span text:style-name="T41">”</text:span></text:p>
      <text:p text:style-name="Normal">El carácter \n es un saldo de línea</text:p>
      <text:p text:style-name="Normal">Funciones de textos</text:p>
      <text:p text:style-name="Normal">Cadena.length (devuelve el nº de letras)</text:p>
      <text:p text:style-name="Normal">“ingredientes”.slice(5,11) = “diente” (extrae)</text:p>
      <text:p text:style-name="Normal">“patrulla”.replace(‘ru’, ‘i’) = ‘patilla’ (remplaza)</text:p>
      <text:p text:style-name="Normal">“la_casa_del_árbol”.split(‘_’) =</text:p>
      <text:p text:style-name="Normal"><text:s/>[ 'la', 'casa', 'del', 'árbol' ] devuelve un array</text:p>
      <text:p text:style-name="P42">“separa”.split() = [‘s’, ’e’, ’p’, ’a’, ’r’, ’a’]</text:p>
      <text:p text:style-name="Normal"><text:span text:style-name="T43">Lógicos</text:span><text:s/>True y false</text:p>
      <text:p text:style-name="Normal">5 &gt; 3 // true<text:tab/><text:tab/>5 &lt; 3 // false<text:tab/></text:p>
      <text:p text:style-name="P44">5 &gt;= 3 // true<text:tab/><text:tab/>5 &gt;= 5 // true</text:p>
      <text:p text:style-name="P45">5 &lt;= 3 // false<text:tab/>5 &lt;= 5 // true<text:tab/><text:tab/></text:p>
      <text:p text:style-name="Normal"><text:span text:style-name="T46">5 === 5 // true</text:span><text:span text:style-name="T47"><text:tab/>5 !==<text:s/></text:span>5 // false</text:p>
      <text:p text:style-name="P48">Operadores lógicos en JavaScript</text:p>
      <text:p text:style-name="Normal">Operador lógico<text:s/><text:span text:style-name="T49">AND</text:span> &amp;&amp;</text:p>
      <text:p text:style-name="Normal"><text:span text:style-name="T50">true &amp;&amp; true //<text:s/></text:span><text:span text:style-name="T51">→</text:span><text:span text:style-name="T52"><text:s/>true</text:span><text:span text:style-name="T53"><text:tab/></text:span></text:p>
      <text:p text:style-name="Normal"><text:span text:style-name="T54">true &amp;&amp; false //<text:s/></text:span><text:span text:style-name="T55">→</text:span><text:span text:style-name="T56"><text:s/>false</text:span></text:p>
      <text:p text:style-name="Normal">false &amp;&amp; false //<text:s/><text:span text:style-name="T57">→</text:span><text:s/>false</text:p>
      <text:p text:style-name="Normal">Operador lógico<text:s/><text:span text:style-name="T58">OR</text:span> ||</text:p>
      <text:p text:style-name="Normal"><text:span text:style-name="T59">true || true //<text:s/></text:span><text:span text:style-name="T60">→</text:span><text:span text:style-name="T61"><text:s/>true</text:span><text:span text:style-name="T62"><text:tab/></text:span><text:span text:style-name="T63"><text:tab/></text:span></text:p>
      <text:p text:style-name="Normal"><text:span text:style-name="T64">true || false //<text:s/></text:span><text:span text:style-name="T65">→</text:span><text:span text:style-name="T66"><text:s/>true</text:span><text:span text:style-name="T67"><text:tab/></text:span><text:span text:style-name="T68"><text:tab/></text:span></text:p>
      <text:p text:style-name="Normal">false || false //<text:s/><text:span text:style-name="T69">→</text:span><text:s/>false</text:p>
      <text:p text:style-name="Normal">Operador lógico<text:s/><text:span text:style-name="T70">NOT</text:span> !</text:p>
      <text:p text:style-name="Normal">!true //<text:s/><text:span text:style-name="T71">→</text:span><text:s/>false<text:tab/>!false //<text:s/><text:span text:style-name="T72">→</text:span><text:s/>true</text:p>
      <text:p text:style-name="Normal"><text:span text:style-name="T73">Variables</text:span><text:span text:style-name="T74"><text:s/></text:span><text:s text:c="2"/>declaración:</text:p>
      <text:p text:style-name="P75">var numero = 1</text:p>
      <text:p text:style-name="P76">let numero = 1</text:p>
      <text:p text:style-name="P77">let camelCase = 1</text:p>
      <text:p text:style-name="P78">let snake_case = 1</text:p>
      <text:p text:style-name="Normal"><text:span text:style-name="T79">Constantes</text:span><text:span text:style-name="T80"> declaración:</text:span></text:p>
      <text:p text:style-name="P81">const PI = 3.1415</text:p>
      <text:soft-page-break/>
      <text:p text:style-name="P82">const SCREAMING_CASE = 1</text:p>
      <text:p text:style-name="P83">Scope</text:p>
      <text:p text:style-name="P84">const x = 2</text:p>
      <text:p text:style-name="P85">{</text:p>
      <text:p text:style-name="P86"><text:tab/>const x = 5</text:p>
      <text:p text:style-name="P87"><text:span text:style-name="T88"><text:tab/></text:span><text:span text:style-name="T89">console.log(x)</text:span></text:p>
      <text:p text:style-name="P90">}</text:p>
      <text:p text:style-name="P91">console.log(x)</text:p>
      <text:p text:style-name="Normal">Salida:</text:p>
      <text:p text:style-name="Normal">5</text:p>
      <text:p text:style-name="Normal">2</text:p>
      <text:p text:style-name="Normal"><text:span text:style-name="T92">Comentarios</text:span></text:p>
      <text:p text:style-name="Normal"> // Comentarios de una sola línea</text:p>
      <text:p text:style-name="Normal">/* <text:s text:c="3"/>Comentarios de<text:s/>varias líneas <text:s/>  */</text:p>
      <text:p text:style-name="P93">Métodos de console</text:p>
      <text:p text:style-name="Normal">console.log(), <text:s/>console.error(), <text:s/>console.warn(), <text:s/>console.info()</text:p>
      <text:p text:style-name="P94">Estructura de control</text:p>
      <text:p text:style-name="P95">Código Condicional con if</text:p>
      <text:p text:style-name="P96">if (edad &gt;= 18) {</text:p>
      <text:p text:style-name="P97"><text:s text:c="2"/>console.log('Eres mayor de edad')</text:p>
      <text:p text:style-name="P98">} const edad = 17</text:p>
      <text:p text:style-name="P99">if (edad &gt;= 18) {</text:p>
      <text:p text:style-name="P100"><text:s text:c="2"/>console.log('Eres mayor de edad')</text:p>
      <text:p text:style-name="P101">} else if (edad &gt;= 16) {</text:p>
      <text:p text:style-name="P102"><text:s text:c="2"/>console.log('Eres casi mayor de edad')</text:p>
      <text:p text:style-name="P103">} else {</text:p>
      <text:p text:style-name="P104"><text:s text:c="2"/>console.log('Eres menor de edad')</text:p>
      <text:p text:style-name="P105">}</text:p>
      <text:p text:style-name="Normal">Es importante que sepas que las llaves {} no siempre son obligatorios. Si el bloque de código sólo tiene una línea, puedes omitir las llaves:</text:p>
      <text:p text:style-name="P106">Bucles con while</text:p>
      <text:p text:style-name="P107">while (condición) {</text:p>
      <text:p text:style-name="P108"><text:span text:style-name="T109"><text:s text:c="2"/></text:span><text:span text:style-name="T110">// código a ejecutar mientras se cumpla la condición</text:span></text:p>
      <text:p text:style-name="P111">}</text:p>
      <text:p text:style-name="Normal"><text:s/>Cuando el intérprete de JavaScript encuentra la palabra break, sale del bucle y continúa ejecutando el código que haya<text:s/>después.</text:p>
      <text:p text:style-name="Normal">Cuando el intérprete de JavaScript encuentra la palabra continue, salta a la siguiente iteración del bucle.</text:p>
      <text:p text:style-name="P112">Bucles con do while</text:p>
      <text:p text:style-name="P113">let respuesta</text:p>
      <text:p text:style-name="P114">do {</text:p>
      <text:p text:style-name="P115"><text:s text:c="2"/>respuesta = confirm("¿Te gusta JavaScript?");</text:p>
      <text:p text:style-name="P116">} while (respuesta)</text:p>
      <text:p text:style-name="P117">Bucles con for</text:p>
      <text:p text:style-name="P118">for (let<text:s/>number = 1; number &lt;= 10; number++) {</text:p>
      <text:p text:style-name="P119"><text:span text:style-name="T120"><text:s text:c="2"/></text:span><text:span text:style-name="T121">console.log(number)</text:span></text:p>
      <text:p text:style-name="P122">}</text:p>
      <text:p text:style-name="Normal">Al igual que en while, for también tiene las palabras reservadas continue y break para controlar el flujo de ejecución del bucle.</text:p>
      <text:p text:style-name="Normal"><text:span text:style-name="T123">Switch</text:span></text:p>
      <text:p text:style-name="P124">switch (expresión) {</text:p>
      <text:p text:style-name="P125"><text:span text:style-name="T126"><text:s text:c="2"/>case valor1:</text:span><text:span text:style-name="T127"><text:tab/></text:span>// código a<text:s/>ejecutar si la expresión coincide con valor1</text:p>
      <text:p text:style-name="P128"><text:s text:c="4"/>break</text:p>
      <text:p text:style-name="P129"><text:span text:style-name="T130"><text:s text:c="2"/>case valor2:</text:span><text:span text:style-name="T131"><text:tab/></text:span>// código a ejecutar si la expresión coincide con valor2</text:p>
      <text:p text:style-name="P132"><text:s text:c="4"/>break</text:p>
      <text:p text:style-name="P133"><text:span text:style-name="T134"><text:s text:c="2"/>default:</text:span><text:span text:style-name="T135"><text:tab/></text:span>// código a ejecutar si la expresión no coincide con ningún valor</text:p>
      <text:p text:style-name="P136"><text:s text:c="4"/>break</text:p>
      <text:p text:style-name="P137">}</text:p>
      <text:p text:style-name="Normal"><text:span text:style-name="T138">Agrupacion case</text:span><text:span text:style-name="T139">,<text:s/></text:span>para<text:s/>ejecutar el mismo código agrupando condiciones<text:s/></text:p>
      <text:p text:style-name="P140">const dia = new Date().getDay()</text:p>
      <text:p text:style-name="P141">switch (dia) {</text:p>
      <text:p text:style-name="P142"><text:s text:c="2"/>case 0:</text:p>
      <text:p text:style-name="P143"><text:s text:c="2"/>case 6:</text:p>
      <text:p text:style-name="P144"><text:span text:style-name="T145"><text:s text:c="4"/>console.log("¡Hoy es fin de semana!<text:s/></text:span><text:span text:style-name="T146">🥳</text:span><text:span text:style-name="T147">")</text:span></text:p>
      <text:p text:style-name="P148"><text:s text:c="4"/>break</text:p>
      <text:soft-page-break/>
      <text:p text:style-name="P149"><text:s text:c="2"/>case 1:</text:p>
      <text:p text:style-name="P150"><text:s text:c="2"/>case 2:</text:p>
      <text:p text:style-name="P151"><text:s text:c="2"/>case 3:</text:p>
      <text:p text:style-name="P152"><text:span text:style-name="T153"><text:s text:c="2"/></text:span><text:span text:style-name="T154">case 4:</text:span></text:p>
      <text:p text:style-name="P155"><text:span text:style-name="T156"><text:s text:c="4"/>console.log("¡Nooo, a trabajar!<text:s/></text:span><text:span text:style-name="T157">😢</text:span><text:span text:style-name="T158">")</text:span></text:p>
      <text:p text:style-name="P159"><text:s text:c="4"/>break</text:p>
      <text:p text:style-name="P160"><text:s text:c="2"/>case 5:</text:p>
      <text:p text:style-name="P161"><text:span text:style-name="T162"><text:s text:c="4"/>console.log("¡Hoy es viernes!<text:s/></text:span><text:span text:style-name="T163">🤓</text:span><text:span text:style-name="T164">")</text:span></text:p>
      <text:p text:style-name="P165"><text:s text:c="4"/>break</text:p>
      <text:p text:style-name="P166">}</text:p>
      <text:p text:style-name="Normal">Es muy importante que no te olvides de poner el break al final de cada caso.</text:p>
      <text:p text:style-name="P167">El patrón switch(true)</text:p>
      <text:p text:style-name="P168">let edad = 25;</text:p>
      <text:p text:style-name="P169">switch(true) {</text:p>
      <text:p text:style-name="P170"><text:s text:c="2"/>case (edad &gt;= 18 &amp;&amp; edad &lt; 25):</text:p>
      <text:p text:style-name="P171"><text:span text:style-name="T172"><text:s text:c="4"/></text:span><text:span text:style-name="T173">console.log("Eres mayor de edad y eres joven");</text:span></text:p>
      <text:p text:style-name="P174"><text:s text:c="4"/>break;</text:p>
      <text:p text:style-name="P175"><text:s text:c="2"/>case (edad &gt;= 25 &amp;&amp; edad &lt; 40):</text:p>
      <text:p text:style-name="P176"><text:s text:c="4"/>console.log("Eres mayor de edad y estás en plena madurez");</text:p>
      <text:p text:style-name="P177"><text:s text:c="4"/>break;</text:p>
      <text:p text:style-name="P178"><text:s text:c="2"/>case (edad &gt;= 40):</text:p>
      <text:p text:style-name="P179"><text:s text:c="4"/>console.log("Eres mayor de edad y estás en la mejor<text:s/>edad");</text:p>
      <text:p text:style-name="P180"><text:s text:c="4"/>break;</text:p>
      <text:p text:style-name="P181"><text:s text:c="2"/>default:</text:p>
      <text:p text:style-name="P182"><text:s text:c="4"/>console.log("Eres menor de edad");</text:p>
      <text:p text:style-name="P183">}</text:p>
      <text:p text:style-name="Normal"><text:span text:style-name="T184">Funciones</text:span><text:span text:style-name="T185">,</text:span><text:s/>declarar:</text:p>
      <text:p text:style-name="P186">function saludar() {</text:p>
      <text:p text:style-name="P187"><text:s text:c="2"/>console.log('Hola Miguel')</text:p>
      <text:p text:style-name="P188">}</text:p>
      <text:p text:style-name="Normal">Llamar a la función: <text:s/><text:span text:style-name="T189">saludar()<text:s/></text:span>// -&gt; Hola Miguel</text:p>
      <text:p text:style-name="Normal">Enviar argumentos y devolver resultado</text:p>
      <text:p text:style-name="P190"><text:span text:style-name="T191">Let res =<text:s/></text:span><text:span text:style-name="T192">sumar(a, b) <text:s text:c="3"/></text:span>// <text:s/>a y b son argumentos</text:p>
      <text:p text:style-name="P193"><text:span text:style-name="T194">function sumar(a, b) {</text:span><text:span text:style-name="T195"><text:tab/></text:span>// <text:s/>a y b son parámetros</text:p>
      <text:p text:style-name="P196"><text:span text:style-name="T197"><text:s text:c="2"/></text:span><text:span text:style-name="T198">return a + b</text:span><text:span text:style-name="T199"><text:tab/></text:span><text:span text:style-name="T200"><text:tab/></text:span>// devuelve resultado</text:p>
      <text:p text:style-name="P201">}</text:p>
      <text:p text:style-name="P202">Dentro de la función a los argumentos enviados se les llama parámetros.</text:p>
      <text:p text:style-name="P203">Si no se pasa un valor para ese parámetro su valor es<text:s/>undefined pero también se puede especificar un valor por defecto:</text:p>
      <text:p text:style-name="P204"><text:span text:style-name="T205">const sum = function (a=</text:span><text:span text:style-name="T206">1</text:span><text:span text:style-name="T207">, b=</text:span><text:span text:style-name="T208">2</text:span><text:span text:style-name="T209">) {</text:span></text:p>
      <text:p text:style-name="P210"><text:span text:style-name="T211"><text:s text:c="2"/></text:span><text:span text:style-name="T212">return a + b</text:span></text:p>
      <text:p text:style-name="P213">}</text:p>
      <text:p text:style-name="P214"><text:span text:style-name="T215">valor = sum()</text:span><text:s text:c="2"/>// es igual a tres</text:p>
      <text:p text:style-name="P216"/>
      <text:p text:style-name="P217">Function Expression</text:p>
      <text:p text:style-name="Normal">No tienen nombre. También se le llama función<text:s/><text:span text:style-name="T218">anónima</text:span>, aunque en este caso está<text:s/>asignada a una variable y ese será su nombre, pero puede aparecer de otras formas<text:s/></text:p>
      <text:p text:style-name="P219">// esto es una function expression</text:p>
      <text:p text:style-name="P220">const sum = function (a, b) {</text:p>
      <text:p text:style-name="P221"><text:s text:c="2"/>return a + b</text:p>
      <text:p text:style-name="P222">}</text:p>
      <text:p text:style-name="Normal">A estas funciones no se aplica el hosting. No se puede llamar a esta función antes de la<text:s/>declaración</text:p>
      <text:p text:style-name="Normal"><text:span text:style-name="T223">Funciones flecha</text:span>, declaración:</text:p>
      <text:p text:style-name="P224">const miFuncionFlecha = (param1, param2) =&gt; {</text:p>
      <text:p text:style-name="P225"><text:span text:style-name="T226"><text:s text:c="2"/></text:span>// código a ejecutar</text:p>
      <text:p text:style-name="P227">}</text:p>
      <text:p text:style-name="P228">Es más corta y legible, código más fácil de entender</text:p>
      <text:p text:style-name="P229">Los paréntesis de los parámetros se pueden omitir si solo hay un parámetro o sí no hay<text:s/>paremetro se pone sólo los dos paréntesis</text:p>
      <text:p text:style-name="P230">El return se puede omitir y quedar implícito</text:p>
      <text:p text:style-name="P231">Las llaves se pueden omitir si solo hay una línea</text:p>
      <text:p text:style-name="P232">Ejem.<text:s/><text:span text:style-name="T233">const cubo = a =&gt; a**3;</text:span></text:p>
      <text:p text:style-name="P234">Si en parámetros ponemos un valor con el signo = se convertirá en su<text:s/><text:span text:style-name="T235">valor por defecto</text:span>. Es decir, si se llama a la función sin enviar ningún valor ese será su valor por defecto</text:p>
      <text:p text:style-name="P236">Ejem.<text:s/><text:span text:style-name="T237">const sumarTres (num = 0) =&gt; num + 3</text:span></text:p>
      <text:p text:style-name="P238"><text:span text:style-name="T239">console.log(sumarTres())</text:span><text:s text:c="3"/>// 3</text:p>
      <text:p text:style-name="P240"><text:span text:style-name="T241">Función IIFE</text:span>, es una función que se ejecuta justo después de ser definida, sólo se ejecutan una vez. En las IIFE las variables y funciones declaradas no interfie<text:soft-page-break/>res con el resto del programa, es decir se puede repetir el nombre. La sintaxis típica envuelve la función entre paréntesis</text:p>
      <text:p text:style-name="P242"><text:span text:style-name="T243">CALL BACK</text:span>. Una <text:span text:style-name="T244">función retrollamada</text:span>, también conocida como <text:span text:style-name="T245">callback</text:span>, es una función que se pasa como argumento a otra función y se ejecuta una vez que se completa una tarea determinada. Muy usado en operaciones asíncronas, como peticiones de APIs, temporisadores o lextura de archivos, y también en manejo de eventos</text:p>
      <text:p text:style-name="P246"><text:span text:style-name="T247">Recursividad</text:span></text:p>
      <text:p text:style-name="P248">Consiste en que una función se llame a sí misma.</text:p>
      <text:p text:style-name="P249">function cuentaAtras(numero) {</text:p>
      <text:p text:style-name="P250"><text:s text:c="2"/>// Condición base: Si el número que recibe es</text:p>
      <text:p text:style-name="P251"><text:s text:c="2"/>// menor de 0 entonces salimos de la función</text:p>
      <text:p text:style-name="P252"><text:s text:c="2"/>if (numero &lt; 0) { return }</text:p>
      <text:p text:style-name="P253"><text:s text:c="2"/>// Si el número era mayor o igual a 0, lo mostramos console.log(numero)</text:p>
      <text:p text:style-name="P254"><text:s text:c="2"/>// Y llamamos a la función con el número anterior</text:p>
      <text:p text:style-name="P255"><text:span text:style-name="T256"><text:s text:c="2"/></text:span><text:span text:style-name="T257">cuentaAtras(numero - 1)</text:span></text:p>
      <text:p text:style-name="P258">}</text:p>
      <text:p text:style-name="P259"/>
      <text:p text:style-name="P260">Funciones de orden superior (Higher.Order)</text:p>
      <text:p text:style-name="P261">es aquella que puede recibir una o más funciones como argumento, o bien devolver una<text:s/>función como resultado. Este tipo de funciones son fundamentales en la <text:span text:style-name="T262">programación funcional</text:span>, ya que permiten crear estructuras lógicas más flexibles, reutilizables y declarativas</text:p>
      <text:p text:style-name="P263">function greet(name) {<text:s/></text:p>
      <text:p text:style-name="P264"><text:s text:c="3"/>return function(message) {<text:s/></text:p>
      <text:p text:style-name="P265"><text:s text:c="6"/>console.log(`${message}, ${name}`);<text:s/></text:p>
      <text:p text:style-name="P266"><text:s text:c="3"/>};<text:s/></text:p>
      <text:p text:style-name="P267">}<text:s/></text:p>
      <text:p text:style-name="P268">const greetJohn = greet("John");</text:p>
      <text:p text:style-name="P269">greetJohn("Hello"); // Outputs: Hello, John</text:p>
      <text:p text:style-name="P270"><text:span text:style-name="T271">Arrays</text:span><text:span text:style-name="T272">:</text:span></text:p>
      <text:p text:style-name="P273">const numbers = [1, 2, 3, 4, 5]</text:p>
      <text:p text:style-name="P274">let names = ['Dani', 'Miguel', 'Maria']</text:p>
      <text:p text:style-name="Normal">Acceder a un elemento:<text:tab/><text:span text:style-name="T275">console.log(numbers[0]) // 1</text:span></text:p>
      <text:p text:style-name="Normal">Modificar:<text:s/><text:span text:style-name="T276">numbers[0] = 10</text:span></text:p>
      <text:p text:style-name="P277">Propiedad<text:s/><text:span text:style-name="T278">length</text:span><text:tab/>devuelve longitud</text:p>
      <text:p text:style-name="P279">const frutas = ["manzana", "pera", "plátano", "fresa"]</text:p>
      <text:p text:style-name="P280">console.log(frutas.length) <text:s/>// 4</text:p>
      <text:p text:style-name="P281">Método<text:s/><text:span text:style-name="T282">push()</text:span><text:tab/><text:tab/>añade un elemento al final y devuelve la longitud</text:p>
      <text:p text:style-name="P283">const<text:s/>frutas = ["plátano", "fresa"]</text:p>
      <text:p text:style-name="P284">frutas.push("naranja")</text:p>
      <text:p text:style-name="P285"><text:span text:style-name="T286">console.log(frutas)<text:s/></text:span>// ["plátano", "fresa", "naranja"]</text:p>
      <text:p text:style-name="P287">Método<text:s/><text:span text:style-name="T288">pop()</text:span><text:tab/><text:tab/>devuelve y elimina último elemento</text:p>
      <text:p text:style-name="P289">const frutas = ["plátano", "fresa", "naranja"]</text:p>
      <text:p text:style-name="P290">const ultimaFruta = frutas.pop()</text:p>
      <text:p text:style-name="P291"><text:span text:style-name="T292">console.log(frutas)<text:s/></text:span>// ["plátano", "fresa"]</text:p>
      <text:p text:style-name="P293">console.log(ultimaFruta) // "naranja</text:p>
      <text:p text:style-name="P294">Método<text:s/><text:span text:style-name="T295">shift()</text:span><text:tab/>elimina y devuelve el primer elemento de un array</text:p>
      <text:p text:style-name="P296">const frutas = ["plátano", "fresa", "naranja"]</text:p>
      <text:p text:style-name="P297">const primeraFruta = frutas.shift()</text:p>
      <text:p text:style-name="P298"><text:span text:style-name="T299">console.log(frutas)<text:s/></text:span>// ["fresa",<text:s/>"naranja"]</text:p>
      <text:p text:style-name="P300"><text:span text:style-name="T301">console.log(primeraFruta)<text:s/></text:span>// "plátano"</text:p>
      <text:p text:style-name="P302">Método<text:s/><text:span text:style-name="T303">unshift()</text:span><text:span text:style-name="T304"><text:tab/></text:span><text:s/><text:tab/>añade un elemento al principio de un array.</text:p>
      <text:p text:style-name="P305">const frutas = ["plátano", "fresa", "naranja"]</text:p>
      <text:p text:style-name="P306">frutas.unshift("manzana")</text:p>
      <text:p text:style-name="P307"><text:span text:style-name="T308">console.log(frutas)<text:s/></text:span>// ["manzana", "plátano", "fresa", "naranja"]</text:p>
      <text:p text:style-name="P309"><text:span text:style-name="T310">Método<text:s/></text:span><text:span text:style-name="T311">concat()</text:span><text:span text:style-name="T312"><text:tab/>concatena dos array</text:span></text:p>
      <text:p text:style-name="P313">const numbers = [1, 2, 3]</text:p>
      <text:p text:style-name="P314">const numbers2 = [4, 5]</text:p>
      <text:p text:style-name="P315">const allNumbers = numbers.concat(numbers2)</text:p>
      <text:p text:style-name="P316"><text:span text:style-name="T317">console.log(allNumbers)<text:s/></text:span>// [1, 2, 3, 4, 5]</text:p>
      <text:p text:style-name="Normal">Otra forma de concatenar: Operador:<text:s/><text:span text:style-name="T318">...</text:span></text:p>
      <text:p text:style-name="P319">const numbers = [1, 2, 3]</text:p>
      <text:p text:style-name="P320">const<text:s/>numbers2 = [4, 5]</text:p>
      <text:p text:style-name="P321">// <text:s text:c="19"/>1, 2, 3 <text:s text:c="7"/>4, 5 <text:s text:c="20"/></text:p>
      <text:p text:style-name="P322">const allNumbers = [...numbers, ...numbers2]</text:p>
      <text:p text:style-name="P323"><text:span text:style-name="T324">console.log(allNumbers)<text:s/></text:span>// [1, 2, 3, 4, 5]<text:s/></text:p>
      <text:p text:style-name="P325">Iteración de Arrays en JavaScript</text:p>
      <text:p text:style-name="P326">Bucle while</text:p>
      <text:p text:style-name="P327"><text:span text:style-name="T328">let frutas = ['</text:span><text:span text:style-name="T329">🍎</text:span><text:span text:style-name="T330">', '</text:span><text:span text:style-name="T331">🍌</text:span><text:span text:style-name="T332">', '</text:span><text:span text:style-name="T333">🍓</text:span><text:span text:style-name="T334">']</text:span></text:p>
      <text:p text:style-name="P335"><text:span text:style-name="T336">let i =</text:span><text:span text:style-name="T337"><text:s/>0<text:s/></text:span>// lo usaremos como índice</text:p>
      <text:soft-page-break/>
      <text:p text:style-name="P338">while (i &lt; frutas.length) {</text:p>
      <text:p text:style-name="P339"><text:span text:style-name="T340"><text:s text:c="2"/>console.log(frutas[i])<text:s/></text:span>// imprime el elemento en la posición i</text:p>
      <text:p text:style-name="P341"><text:span text:style-name="T342"><text:s text:c="2"/>i++<text:s/></text:span>// incrementamos el índice en 1 para la siguiente iteración</text:p>
      <text:p text:style-name="P343">}</text:p>
      <text:p text:style-name="P344">Bucle for</text:p>
      <text:p text:style-name="P345"><text:span text:style-name="T346">let frutas = ['</text:span><text:span text:style-name="T347">🍎</text:span><text:span text:style-name="T348">', '</text:span><text:span text:style-name="T349">🍌</text:span><text:span text:style-name="T350">', '</text:span><text:span text:style-name="T351">🍓</text:span><text:span text:style-name="T352">']</text:span></text:p>
      <text:p text:style-name="P353">for (let i = 0; i &lt;<text:s/>frutas.length; i++) {</text:p>
      <text:p text:style-name="P354"><text:span text:style-name="T355"><text:s text:c="2"/></text:span><text:span text:style-name="T356">console.log(frutas[i])<text:s/></text:span>// imprime el elemento en la posición i</text:p>
      <text:p text:style-name="P357">}</text:p>
      <text:p text:style-name="P358"><text:span text:style-name="T359">Bucle for...of<text:s/></text:span><text:span text:style-name="T360"><text:s text:c="4"/>para arrays</text:span></text:p>
      <text:p text:style-name="P361"><text:span text:style-name="T362">let frutas = ['</text:span><text:span text:style-name="T363">🍎</text:span><text:span text:style-name="T364">', '</text:span><text:span text:style-name="T365">🍌</text:span><text:span text:style-name="T366">', '</text:span><text:span text:style-name="T367">🍓</text:span><text:span text:style-name="T368">']</text:span></text:p>
      <text:p text:style-name="P369">for (let fruta of frutas) {</text:p>
      <text:p text:style-name="P370"><text:span text:style-name="T371"><text:s text:c="2"/></text:span><text:span text:style-name="T372">console.log(fruta)<text:s/></text:span>// imprime el elemento en la posición i</text:p>
      <text:p text:style-name="P373">}</text:p>
      <text:p text:style-name="P374"><text:span text:style-name="T375">bucle<text:s/></text:span><text:span text:style-name="T376">for…in</text:span><text:span text:style-name="T377"><text:s text:c="2"/></text:span>para objetos</text:p>
      <text:p text:style-name="P378">const alumno={nombre: ‘Alex’, edad: 25}</text:p>
      <text:p text:style-name="P379">for( const clave in alumno){</text:p>
      <text:p text:style-name="P380"><text:span text:style-name="T381"><text:s text:c="4"/></text:span><text:span text:style-name="T382">console.log(alumno[clave])</text:span></text:p>
      <text:p text:style-name="P383">}</text:p>
      <text:p text:style-name="P384">El método array.forEach()</text:p>
      <text:p text:style-name="Normal">Nos permite ejecutar una function para cada uno de los elementos del array. Esta función recibe como<text:s/>parámetros el elemento que se está iterando en ese momento, el índice del elemento y el propio array.</text:p>
      <text:p text:style-name="P385"><text:span text:style-name="T386">let frutas = ['</text:span><text:span text:style-name="T387">🍎</text:span><text:span text:style-name="T388">', '</text:span><text:span text:style-name="T389">🍌</text:span><text:span text:style-name="T390">', '</text:span><text:span text:style-name="T391">🍓</text:span><text:span text:style-name="T392">']</text:span></text:p>
      <text:p text:style-name="P393">frutas.forEach(function (fruta, index, originalArray) {</text:p>
      <text:p text:style-name="P394"><text:span text:style-name="T395"><text:s text:c="2"/></text:span><text:span text:style-name="T396">console.log(fruta)<text:s/></text:span>// imprime el elemento en la posición i</text:p>
      <text:p text:style-name="P397">})</text:p>
      <text:p text:style-name="Normal">Simplificado con arrow function</text:p>
      <text:p text:style-name="P398">frutas.forEach((fruta) =&gt; {</text:p>
      <text:p text:style-name="P399"><text:span text:style-name="T400"><text:s text:c="2"/>console.log(fruta)<text:s/></text:span>// imprime el elemento en la posición i</text:p>
      <text:p text:style-name="P401">})</text:p>
      <text:p text:style-name="Normal">Importante. array.forEach() no devuelve nada, por lo que no podemos asignar el resultado a una variable.</text:p>
      <text:p text:style-name="Normal">Búsqueda en Arrays con sus métodos</text:p>
      <text:p text:style-name="Normal"><text:span text:style-name="T402">.indexOf()</text:span><text:tab/>array.indexOf(“buscar elemento”) devuelve al posición</text:p>
      <text:p text:style-name="Normal"><text:span text:style-name="T403">.includes()</text:span><text:tab/>array.includes(“buscar elemento”) devuelve true o false</text:p>
      <text:p text:style-name="Normal"><text:span text:style-name="T404">.some()</text:span><text:span text:style-name="T405"><text:tab/></text:span>array.some(elem =&gt; elem ===”xxx”)<text:tab/>devuelve true si alguno lo cumple</text:p>
      <text:p text:style-name="Normal"><text:span text:style-name="T406">.every()</text:span><text:tab/>array.every(elem =&gt; elem ===”xxx”)<text:tab/>devuelve true si todos lo cumplen</text:p>
      <text:p text:style-name="Normal"><text:span text:style-name="T407">.find()</text:span><text:tab/>array.find(elem =&gt; elem ===”xxx”) <text:s/>devuelve el primer elem que lo cumpla</text:p>
      <text:p text:style-name="Normal"><text:span text:style-name="T408">.findIndex()</text:span><text:s/>array.findIndex(elem =&gt; elem===”xxx”) <text:s/>devuelve índice del elem que lo cumpla</text:p>
      <text:p text:style-name="Normal">Ordenar arrays con métodos</text:p>
      <text:p text:style-name="Normal"><text:span text:style-name="T409">.sort()</text:span><text:s/><text:tab/>Ordena el array como texto</text:p>
      <text:p text:style-name="P410">let numeros = [5, 10, 2, 25, 7]</text:p>
      <text:p text:style-name="P411">numeros.sort(function(a, b) {</text:p>
      <text:p text:style-name="P412"><text:s text:c="2"/>return b - a</text:p>
      <text:p text:style-name="P413">})</text:p>
      <text:p text:style-name="P414"><text:span text:style-name="T415">console.log(numeros)<text:s/></text:span><text:span text:style-name="T416">// [25, 10, 7, 5, 2]</text:span></text:p>
      <text:p text:style-name="Normal"><text:span text:style-name="T417">.toSorted()</text:span><text:tab/>no modifica el array original</text:p>
      <text:p text:style-name="Normal">Transformar arrays</text:p>
      <text:p text:style-name="Normal"><text:span text:style-name="T418">.filter()</text:span><text:tab/>array.filter(elem =&gt;<text:s/>elem===”xxx”) <text:s/>Crea un array con los elementos que lo cumplan</text:p>
      <text:p text:style-name="Normal"><text:span text:style-name="T419">.map()</text:span><text:tab/>array.map(number =&gt; number * 2) <text:s/>Crea un array de otro modificandolo</text:p>
      <text:p text:style-name="Normal"><text:span text:style-name="T420">.reduce()</text:span><text:span text:style-name="T421"><text:s text:c="2"/>array.reduce(accumulator, currentNumber) =&gt; {return accumulator + currentNumber}</text:span></text:p>
      <text:p text:style-name="P422">Estructura de datos SET</text:p>
      <text:p text:style-name="Normal"><text:s/>Su característica principal es que no se puede repetir ningún elemento</text:p>
      <text:p text:style-name="P423">let conjunto = new Set([1 ,8, 2, 7 ,8, 1, 2, 3])</text:p>
      <text:soft-page-break/>
      <text:p text:style-name="Normal"><text:span text:style-name="T424">console.log(conjunto)</text:span><text:span text:style-name="T425"><text:s text:c="7"/>1, 8, 2, 7, 3</text:span></text:p>
      <text:p text:style-name="Normal">conjunto.add(elemnt)<text:tab/><text:tab/>añade si no está</text:p>
      <text:p text:style-name="Normal">conjunto.delete(element)<text:tab/><text:tab/>elimina</text:p>
      <text:p text:style-name="Normal">conjunto.has(element)<text:tab/>si está el elemento devuelve true</text:p>
      <text:p text:style-name="Normal"><text:span text:style-name="T426">Matrices</text:span></text:p>
      <text:p text:style-name="P427">const matriz = [ <text:s/>[1, 2, 3], <text:s/>[4, 5, 6] <text:s/>]</text:p>
      <text:p text:style-name="Normal">Acceso:<text:s/><text:span text:style-name="T428">let numero = matriz[1][2]</text:span></text:p>
      <text:p text:style-name="P429">Estructura de datos Map</text:p>
      <text:p text:style-name="Normal">Clave, valor</text:p>
      <text:p text:style-name="P430">Objetos</text:p>
      <text:p text:style-name="Normal">Puede contener:<text:s/></text:p>
      <text:p text:style-name="Normal"><text:span text:style-name="T431">Propiedades</text:span>: datos de texto, numero, etc…,<text:s/>arrays y otros objetos</text:p>
      <text:p text:style-name="Normal"><text:span text:style-name="T432">Métodos</text:span>: funciones</text:p>
      <text:p text:style-name="Normal"><text:span text:style-name="T433">Declaración:</text:span></text:p>
      <text:p text:style-name="P434">const persona = {</text:p>
      <text:p text:style-name="P435"><text:span text:style-name="T436"><text:s text:c="2"/></text:span><text:span text:style-name="T437">name: 'Dani' <text:s text:c="2"/></text:span><text:span text:style-name="T438">// &lt;- variable</text:span></text:p>
      <text:p text:style-name="P439"><text:s text:c="2"/>age: 30,</text:p>
      <text:p text:style-name="P440"><text:s text:c="2"/>isWorking: true,</text:p>
      <text:p text:style-name="P441"><text:s text:c="2"/>family: ['Miguel', 'Maria'],</text:p>
      <text:p text:style-name="P442"><text:s text:c="2"/>address: {</text:p>
      <text:p text:style-name="P443"><text:s text:c="4"/>street: 'Calle de la piruleta',</text:p>
      <text:p text:style-name="P444"><text:s text:c="4"/>number: 13,</text:p>
      <text:p text:style-name="P445"><text:span text:style-name="T446"><text:s text:c="4"/></text:span><text:span text:style-name="T447">city:<text:s/></text:span><text:span text:style-name="T448">'Barcelona'</text:span></text:p>
      <text:p text:style-name="P449"><text:s text:c="2"/>},</text:p>
      <text:p text:style-name="P450"><text:span text:style-name="T451"><text:s text:c="2"/>walk: function () {<text:s/></text:span>// &lt;- método</text:p>
      <text:p text:style-name="P452"><text:s text:c="4"/>console.log('Estoy caminando')</text:p>
      <text:p text:style-name="P453"><text:span text:style-name="T454"><text:s text:c="2"/></text:span><text:span text:style-name="T455">}</text:span></text:p>
      <text:p text:style-name="P456">}</text:p>
      <text:p text:style-name="Normal"><text:span text:style-name="T457">Acceder:</text:span><text:span text:style-name="T458"><text:s/></text:span></text:p>
      <text:p text:style-name="P459">const persona = { name: 'Dani' }</text:p>
      <text:p text:style-name="P460"><text:span text:style-name="T461">console.log ( persona.name )<text:s/></text:span>// Dani</text:p>
      <text:p text:style-name="P462">o</text:p>
      <text:p text:style-name="P463"><text:span text:style-name="T464">console.log ( persona [ “ name “ ] )</text:span></text:p>
      <text:p text:style-name="Normal">* también se usa corchetes si se<text:s/>quiere acceder a la propiedad usando una variable o si el nombre de la propiedad tiene un espacio en blanco ‘ ‘.</text:p>
      <text:p text:style-name="Normal"><text:span text:style-name="T465">console.log(persona[property])</text:span><text:s/>// -&gt; property es una variable de texto<text:s/><text:span text:style-name="T466">let property = ‘name’</text:span></text:p>
      <text:p text:style-name="Normal"><text:span text:style-name="T467">console.log(persona['full name'])</text:span><text:s/>// -&gt; ‘full name’ es el nombre de la propiedad</text:p>
      <text:p text:style-name="Normal">Acceso a métodos:<text:span text:style-name="T468"><text:s/>persona.walk()<text:s/></text:span>// -&gt; Estoy caminando</text:p>
      <text:p text:style-name="Normal">Añadir o modificar:<text:s/><text:span text:style-name="T469">persona.age = 30</text:span><text:s/>-&gt; Si existe, modifica le valor, si no, lo crea</text:p>
      <text:p text:style-name="Normal">Eliminar propiedades:<text:s/><text:span text:style-name="T470">delete persona.age</text:span></text:p>
      <text:p text:style-name="Normal"><text:span text:style-name="T471">Atajos:</text:span></text:p>
      <text:p text:style-name="Normal">Para crearlos con variables que ya<text:s/>existen</text:p>
      <text:p text:style-name="P472">const name = 'Spidey'</text:p>
      <text:p text:style-name="P473">const universe = 42</text:p>
      <text:p text:style-name="P474">const powers = ['web', 'invisibility', 'spider-sense']</text:p>
      <text:p text:style-name="P475"/>
      <text:p text:style-name="P476">const spiderman = { name, universe, powers }</text:p>
      <text:p text:style-name="Normal"><text:span text:style-name="T477">Recuperar propiedades:</text:span></text:p>
      <text:p text:style-name="P478">const spiderman = {</text:p>
      <text:p text:style-name="P479"><text:s text:c="2"/>name: 'Spidey',</text:p>
      <text:p text:style-name="P480"><text:span text:style-name="T481"><text:s text:c="2"/></text:span><text:span text:style-name="T482">universe: 42,</text:span></text:p>
      <text:p text:style-name="P483"><text:s text:c="2"/>powers: ['web',<text:s/>'invisibility', 'spider-sense']</text:p>
      <text:p text:style-name="P484">}</text:p>
      <text:p text:style-name="P485">const { universe, name, powers } = spiderman<text:s/></text:p>
      <text:p text:style-name="P486">//Metodo destructuring</text:p>
      <text:p text:style-name="P487"><text:span text:style-name="T488">console.log(universe)<text:s/></text:span><text:span text:style-name="T489">// 42</text:span></text:p>
      <text:p text:style-name="P490"><text:span text:style-name="T491">console.log(name)<text:s/></text:span><text:span text:style-name="T492">// 'Spidey'</text:span></text:p>
      <text:p text:style-name="P493"><text:span text:style-name="T494">console.log(powers)<text:s/></text:span><text:span text:style-name="T495">// ['web', 'invisibility', 'spider-sense']</text:span></text:p>
      <text:p text:style-name="P496">Estructura de datos MAP</text:p>
      <text:soft-page-break/>
      <text:p text:style-name="Normal">Igual que los objetos sus datos son denominados clave-valor, pero su estructura es distinta</text:p>
      <text:p text:style-name="P497">Let mapa = new map([</text:p>
      <text:p text:style-name="P498"><text:s text:c="4"/>[clave1, valor],</text:p>
      <text:p text:style-name="P499"><text:span text:style-name="T500"><text:s text:c="4"/></text:span><text:span text:style-name="T501">[clave2, valor],</text:span></text:p>
      <text:p text:style-name="P502"><text:s text:c="4"/>[clave3], valor]</text:p>
      <text:p text:style-name="P503">])</text:p>
      <text:p text:style-name="P504">Propiedades y métodos.</text:p>
      <text:p text:style-name="P505"><text:span text:style-name="T506">mapa.set(clave,valor)<text:s/></text:span>añade este elem si no<text:s/>estaba</text:p>
      <text:p text:style-name="Normal"><text:span text:style-name="T507">mapa.delete(clave)</text:span><text:span text:style-name="T508"><text:tab/></text:span><text:tab/>elimina clave y valor</text:p>
      <text:p text:style-name="Normal"><text:span text:style-name="T509">mapa.has(clave)</text:span><text:s text:c="4"/>si está esa clave devuelve true</text:p>
      <text:p text:style-name="P510">Operador TypeOf</text:p>
      <text:p text:style-name="Normal">Se llama sobre una variable y devuelve el tipo</text:p>
      <text:p text:style-name="P511">typeof ‘texto’<text:tab/>devuelve string</text:p>
      <text:p text:style-name="P512">typeof 54<text:tab/>devuleve number</text:p>
      <text:p text:style-name="Normal">Los objetos, arrays, dates, SETs y MAPs devuelven objeto</text:p>
      <text:p text:style-name="P513">Operador InstanceOf</text:p>
      <text:p text:style-name="P514">let mapa = new Map( [ [1, 'uno'], [2, 'dos'] ] )<text:s/></text:p>
      <text:p text:style-name="Normal">mapa instanceof Map <text:s/>devuelve true</text:p>
      <text:p text:style-name="Normal">Interactuar con el DOM</text:p>
      <text:p text:style-name="Normal">innerHTML</text:p>
      <text:p text:style-name="Normal">añade código html en el código fuente</text:p>
      <text:p text:style-name="P515">&lt;body&gt;</text:p>
      <text:p text:style-name="P516"><text:s text:c="4"/>&lt;h3&gt;listado&lt;/h3&gt;</text:p>
      <text:p text:style-name="P517"><text:s text:c="4"/>&lt;div id =<text:s/>'contain'&gt;&lt;/div&gt;</text:p>
      <text:p text:style-name="P518"><text:span text:style-name="T519"><text:s text:c="2"/></text:span><text:span text:style-name="T520">&lt;script&gt;</text:span></text:p>
      <text:p text:style-name="P521"><text:s text:c="4"/>texto = '&lt;ul&gt;&lt;li&gt;Uno&lt;/li&gt;&lt;li&gt;Dos&lt;/li&gt;&lt;/ul&gt;'</text:p>
      <text:p text:style-name="P522"><text:span text:style-name="T523"><text:s text:c="4"/></text:span><text:span text:style-name="T524">document.getElementById('contain').innerHTML = texto;</text:span></text:p>
      <text:p text:style-name="P525"><text:s text:c="2"/>&lt;/script&gt;</text:p>
      <text:p text:style-name="P526"/>
      <text:p text:style-name="P527"/>
      <text:p text:style-name="P528">Hoisting</text:p>
      <text:p text:style-name="Normal">Proceso por el cual javacript hace un primer barrido al código y pone todas las<text:s/>declaraciones de variables y de funciones al principio del código por eso se puede llamar antes de declararla<text:s/></text:p>
      <text:p text:style-name="Normal">Scope</text:p>
      <text:p text:style-name="P529"><text:span text:style-name="T530">El </text:span><text:span text:style-name="T531">Scope</text:span><text:span text:style-name="T532"> se refiere al alcance de las variables dentro de una función. Hay dos tipos principales:</text:span></text:p>
      <text:p text:style-name="P533"><text:span text:style-name="T534">Alcance local:</text:span><text:span text:style-name="T535"> Variables definidas dentro de una función.</text:span></text:p>
      <text:p text:style-name="P536"><text:span text:style-name="T537">Alcance global:</text:span><text:span text:style-name="T538"> Variables definidas fuera de cualquier función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w Cen MT" svg:font-family="Tw Cen MT" style:font-family-generic="swiss" style:font-pitch="variable" svg:panose-1="2 11 6 2 2 1 4 2 6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>
        <style:background-fill draw:fill="solid"/>
      </style:paragraph-properties>
      <style:text-properties style:font-name="Tw Cen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2E74B5" fo:font-size="14pt" style:font-size-asian="14pt" style:font-size-complex="14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5B9BD5" fo:font-size="13pt" style:font-size-asian="13pt" style:font-size-complex="13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5B9BD5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fo:color="#1F4D78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1F4D78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fo:color="#5B9BD5" fo:font-size="10pt" style:font-size-asian="10pt" style:font-size-complex="10pt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w Cen MT" style:font-name-asian="Times New Roman" style:font-name-complex="Times New Roman" fo:font-weight="bold" style:font-weight-asian="bold" style:font-weight-complex="bold" fo:color="#2E74B5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Tw Cen MT" style:font-name-asian="Times New Roman" style:font-name-complex="Times New Roman" fo:font-weight="bold" style:font-weight-asian="bold" style:font-weight-complex="bold" fo:color="#5B9BD5"/>
    </style:style>
    <style:style style:name="pl-2" style:display-name="pl-2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ítulo2Car" style:display-name="Título 2 Car" style:family="text" style:parent-style-name="Fuentedepárrafopredeter.">
      <style:text-properties style:font-name="Tw Cen MT" style:font-name-asian="Times New Roman" style:font-name-complex="Times New Roman" fo:font-weight="bold" style:font-weight-asian="bold" style:font-weight-complex="bold" fo:color="#5B9BD5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s" style:country-asian="ES"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shj-syn-str" style:display-name="shj-syn-str" style:family="text" style:parent-style-name="Fuentedepárrafopredeter."/>
    <style:style style:name="shj-syn-oper" style:display-name="shj-syn-oper" style:family="text" style:parent-style-name="Fuentedepárrafopredeter."/>
    <style:style style:name="shj-syn-num" style:display-name="shj-syn-num" style:family="text" style:parent-style-name="Fuentedepárrafopredeter."/>
    <style:style style:name="shj-syn-cmnt" style:display-name="shj-syn-cmnt" style:family="text" style:parent-style-name="Fuentedepárrafopredeter."/>
    <style:style style:name="shj-syn-bool" style:display-name="shj-syn-bool" style:family="text" style:parent-style-name="Fuentedepárrafopredeter."/>
    <style:style style:name="shj-syn-kwd" style:display-name="shj-syn-kwd" style:family="text" style:parent-style-name="Fuentedepárrafopredeter."/>
    <style:style style:name="shj-syn-func" style:display-name="shj-syn-func" style:family="text" style:parent-style-name="Fuentedepárrafopredeter."/>
    <style:style style:name="shj-syn-class" style:display-name="shj-syn-class" style:family="text" style:parent-style-name="Fuentedepárrafopredeter."/>
    <style:style style:name="Título4Car" style:display-name="Título 4 Car" style:family="text" style:parent-style-name="Fuentedepárrafopredeter.">
      <style:text-properties style:font-name="Tw Cen MT" style:font-name-asian="Times New Roman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Título5Car" style:display-name="Título 5 Car" style:family="text" style:parent-style-name="Fuentedepárrafopredeter.">
      <style:text-properties style:font-name="Tw Cen MT" style:font-name-asian="Times New Roman" style:font-name-complex="Times New Roman" fo:color="#1F4D78"/>
    </style:style>
    <style:style style:name="Título6Car" style:display-name="Título 6 Car" style:family="text" style:parent-style-name="Fuentedepárrafopredeter.">
      <style:text-properties style:font-name="Tw Cen MT" style:font-name-asian="Times New Roman" style:font-name-complex="Times New Roman" fo:font-style="italic" style:font-style-asian="italic" style:font-style-complex="italic" fo:color="#1F4D78"/>
    </style:style>
    <style:style style:name="Título7Car" style:display-name="Título 7 Car" style:family="text" style:parent-style-name="Fuentedepárrafopredeter.">
      <style:text-properties style:font-name="Tw Cen MT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Tw Cen MT" style:font-name-asian="Times New Roman" style:font-name-complex="Times New Roman" fo:color="#5B9BD5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Tw Cen M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5B9BD5" fo:font-size="9pt" style:font-size-asian="9pt" style:font-size-complex="9pt" fo:hyphenate="tru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 fo:line-height="100%"/>
      <style:text-properties fo:color="#323E4F" fo:letter-spacing="0.0034in" fo:font-size="26pt" style:font-size-asian="26pt" style:font-size-complex="26pt" fo:hyphenate="true"/>
    </style:style>
    <style:style style:name="TítuloCar" style:display-name="Título Car" style:family="text" style:parent-style-name="Fuentedepárrafopredeter.">
      <style:text-properties style:font-name="Tw Cen MT" style:font-name-asian="Times New Roman" style:font-name-complex="Times New Roman" fo:color="#323E4F" fo:letter-spacing="0.0034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fo:font-style="italic" style:font-style-asian="italic" style:font-style-complex="italic" fo:color="#5B9BD5" fo:letter-spacing="0.0104in" fo:font-size="12pt" style:font-size-asian="12pt" style:font-size-complex="12pt" fo:hyphenate="true"/>
    </style:style>
    <style:style style:name="SubtítuloCar" style:display-name="Subtítulo Car" style:family="text" style:parent-style-name="Fuentedepárrafopredeter.">
      <style:text-properties style:font-name="Tw Cen M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5B9BD5"/>
    </style:style>
    <style:style style:name="Referenciasutil" style:display-name="Referencia sutil" style:family="text" style:parent-style-name="Fuentedepárrafopredeter.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 style:default-outline-level="1">
      <style:text-properties fo:hyphenate="tru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6895in" fo:margin-bottom="0.984in" fo:margin-right="0.5895in" style:num-format="1" style:writing-mode="lr-tb">
        <style:columns fo:column-count="2" fo:column-gap="0.5in">
          <style:column-sep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08-05T19:10:00Z</meta:creation-date>
    <dc:date>2026-06-06T12:59:00Z</dc:date>
    <meta:template xlink:href="Normal" xlink:type="simple"/>
    <meta:editing-cycles>36</meta:editing-cycles>
    <meta:editing-duration>PT1039860S</meta:editing-duration>
    <meta:document-statistic meta:page-count="8" meta:paragraph-count="454" meta:word-count="2336" meta:character-count="14103" meta:row-count="581" meta:non-whitespace-character-count="12221"/>
  </office:meta>
</office:document-meta>
</file>