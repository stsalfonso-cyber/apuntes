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2pt" style:font-size-asian="22pt"/>
    </style:style>
    <style:style style:name="P2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color="#5B9BD5"/>
    </style:style>
    <style:style style:name="T4" style:parent-style-name="Fuentedepárrafopredeter." style:family="text">
      <style:text-properties fo:font-weight="bold" style:font-weight-asian="bold" fo:color="#ED7D31"/>
    </style:style>
    <style:style style:name="T5" style:parent-style-name="Fuentedepárrafopredeter." style:family="text">
      <style:text-properties fo:font-weight="bold" style:font-weight-asian="bold" fo:color="#70AD47"/>
    </style:style>
    <style:style style:name="T6" style:parent-style-name="Fuentedepárrafopredeter." style:family="text">
      <style:text-properties fo:font-weight="bold" style:font-weight-asian="bold" fo:color="#5B9BD5"/>
    </style:style>
    <style:style style:name="T7" style:parent-style-name="Fuentedepárrafopredeter." style:family="text">
      <style:text-properties fo:font-weight="bold" style:font-weight-asian="bold" fo:color="#ED7D31"/>
    </style:style>
    <style:style style:name="T8" style:parent-style-name="Fuentedepárrafopredeter." style:family="text">
      <style:text-properties fo:font-weight="bold" style:font-weight-asian="bold" fo:color="#70AD47"/>
    </style:style>
    <style:style style:name="T9" style:parent-style-name="Fuentedepárrafopredeter." style:family="text">
      <style:text-properties fo:font-weight="bold" style:font-weight-asian="bold" fo:color="#ED7D31"/>
    </style:style>
    <style:style style:name="P10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 style:language-asian="es" style:country-asian="ES"/>
    </style:style>
    <style:style style:name="T27" style:parent-style-name="Fuentedepárrafopredeter." style:family="text">
      <style:text-properties style:language-asian="es" style:country-asian="ES"/>
    </style:style>
    <style:style style:name="P28" style:parent-style-name="Normal" style:family="paragraph">
      <style:text-properties style:language-asian="es" style:country-asian="ES"/>
    </style:style>
    <style:style style:name="P29" style:parent-style-name="Normal" style:family="paragraph">
      <style:text-properties style:language-asian="es" style:country-asian="ES"/>
    </style:style>
    <style:style style:name="P30" style:parent-style-name="Normal" style:family="paragraph">
      <style:text-properties style:language-asian="es" style:country-asian="ES"/>
    </style:style>
    <style:style style:name="P31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-complex="Calibri"/>
    </style:style>
    <style:style style:name="P35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Wingdings" style:font-name-asian="Wingdings" style:font-name-complex="Wingdings"/>
    </style:style>
    <style:style style:name="T40" style:parent-style-name="Fuentedepárrafopredeter." style:family="text">
      <style:text-properties fo:color="#00B050"/>
    </style:style>
    <style:style style:name="T41" style:parent-style-name="Fuentedepárrafopredeter." style:family="text">
      <style:text-properties fo:color="#00B050"/>
    </style:style>
    <style:style style:name="P42" style:parent-style-name="Normal" style:family="paragraph">
      <style:text-properties fo:font-weight="bold" style:font-weight-asian="bold" fo:color="#44546A"/>
    </style:style>
    <style:style style:name="P43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fo:font-weight="bold" style:font-weight-asian="bold" fo:color="#44546A"/>
    </style:style>
    <style:style style:name="T45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language-asian="es" style:country-asian="ES"/>
    </style:style>
    <style:style style:name="T48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Bell MT" fo:text-shadow="0.0291in 0.0291in 0.0555in #000000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language-asian="es" style:country-asian="ES"/>
    </style:style>
    <style:style style:name="P51" style:parent-style-name="Normal" style:family="paragraph">
      <style:text-properties fo:font-weight="bold" style:font-weight-asian="bold"/>
    </style:style>
    <style:style style:name="T52" style:parent-style-name="Fuentedepárrafopredeter." style:family="text">
      <style:text-properties style:font-name="Wingdings" style:font-name-asian="Wingdings" style:font-name-complex="Wingdings"/>
    </style:style>
    <style:style style:name="P53" style:parent-style-name="Normal" style:family="paragraph">
      <style:text-properties fo:font-weight="bold" style:font-weight-asian="bold"/>
    </style:style>
    <style:style style:name="T54" style:parent-style-name="Fuentedepárrafopredeter." style:family="text">
      <style:text-properties style:language-asian="es" style:country-asian="ES"/>
    </style:style>
    <style:style style:name="P55" style:parent-style-name="Normal" style:family="paragraph">
      <style:text-properties fo:font-weight="bold" style:font-weight-asian="bold"/>
    </style:style>
    <style:style style:name="T56" style:parent-style-name="Fuentedepárrafopredeter." style:family="text">
      <style:text-properties style:language-asian="es" style:country-asian="ES"/>
    </style:style>
    <style:style style:name="P57" style:parent-style-name="Normal" style:family="paragraph">
      <style:text-properties fo:font-weight="bold" style:font-weight-asian="bold"/>
    </style:style>
    <style:style style:name="P58" style:parent-style-name="Normal" style:family="paragraph">
      <style:text-properties fo:font-weight="bold" style:font-weight-asian="bold"/>
    </style:style>
    <style:style style:name="P59" style:parent-style-name="Normal" style:family="paragraph">
      <style:text-properties fo:font-weight="bold" style:font-weight-asian="bold"/>
    </style:style>
    <style:style style:name="T60" style:parent-style-name="Fuentedepárrafopredeter." style:family="text">
      <style:text-properties style:language-asian="es" style:country-asian="ES"/>
    </style:style>
    <style:style style:name="T61" style:parent-style-name="Fuentedepárrafopredeter." style:family="text">
      <style:text-properties style:language-asian="es" style:country-asian="ES"/>
    </style:style>
    <style:style style:name="T62" style:parent-style-name="Fuentedepárrafopredeter." style:family="text">
      <style:text-properties fo:font-weight="bold" style:font-weight-asian="bold"/>
    </style:style>
    <style:style style:name="T63" style:parent-style-name="Fuentedepárrafopredeter." style:family="text">
      <style:text-properties style:language-asian="es" style:country-asian="ES"/>
    </style:style>
    <style:style style:name="T64" style:parent-style-name="Fuentedepárrafopredeter." style:family="text">
      <style:text-properties style:language-asian="es" style:country-asian="ES"/>
    </style:style>
    <style:style style:name="T65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puntes CSS</text:p>
      <text:p text:style-name="P2">Sintaxis<text:s/></text:p>
      <text:p text:style-name="Normal"><text:span text:style-name="T3">Selector,<text:s/></text:span><text:span text:style-name="T4">Propiedades,<text:s/></text:span><text:span text:style-name="T5">Valores</text:span></text:p>
      <text:p text:style-name="Normal"><text:span text:style-name="T6">p, b, h1</text:span>: {<text:tab/></text:p>
      <text:p text:style-name="Normal"><text:tab/><text:span text:style-name="T7">background-color:<text:s/></text:span><text:span text:style-name="T8">red</text:span><text:span text:style-name="T9">;</text:span></text:p>
      <text:p text:style-name="Normal">}</text:p>
      <text:p text:style-name="Normal"/>
      <text:p text:style-name="P10">Colores:</text:p>
      <text:p text:style-name="Normal">background-color: (color de fondo)</text:p>
      <text:p text:style-name="Normal">color: (color del texto)</text:p>
      <text:p text:style-name="Normal">border-color: (color<text:s/>del borde)</text:p>
      <text:p text:style-name="Normal">Opacidad</text:p>
      <text:p text:style-name="Normal">Opacity: 0.5;</text:p>
      <text:p text:style-name="Normal"/>
      <text:p text:style-name="Normal"/>
      <text:p text:style-name="P11">Atributos</text:p>
      <text:p text:style-name="Normal">id<text:tab/>para cambar un elemento en concreto</text:p>
      <text:p text:style-name="Normal">class<text:s/><text:tab/>para cambiar un grupo de elementos</text:p>
      <text:p text:style-name="Normal"/>
      <text:p text:style-name="P12">Pseudo-clases</text:p>
      <text:p text:style-name="Normal">p:hover al pasar el raton</text:p>
      <text:p text:style-name="Normal">a:active al hacer click</text:p>
      <text:p text:style-name="Normal">div:not(.estaNo) selecciona los div que no sean la clase estaNo</text:p>
      <text:p text:style-name="Normal"/>
      <text:p text:style-name="P13">Cajas:</text:p>
      <text:p text:style-name="Normal"><text:span text:style-name="T14"><draw:frame draw:style-name="a0" draw:name="Imagen 1" text:anchor-type="as-char" svg:x="0in" svg:y="0in" svg:width="2.48355in" svg:height="1.80849in" style:rel-width="scale" style:rel-height="scale"><draw:image xlink:href="media/image1.png" xlink:type="simple" xlink:show="embed" xlink:actuate="onLoad"/><svg:title/><svg:desc/></draw:frame></text:span></text:p>
      <text:p text:style-name="Normal">El tamaño de las cajas se cambia con width y heigth, con border se cambia los bordes y con margin y padding los márgenes</text:p>
      <text:p text:style-name="Normal">Las cajas pueden estar block, que ocupa toda la línea hasta el final de la pantalla, el siguiente elemento se posicionará debajo, o inline, solo ocupa lo que ocupe<text:s/>su contenido, el siguiente elemento se posicionará a su derecha o si llega al final de pantalla, debajo. Con este valor no se podrá cambiar el tamaño al elemento.</text:p>
      <text:p text:style-name="Normal">Las etiquetas &lt;div&gt; y &lt;span&gt; se usan para agrupar otras etiquetas</text:p>
      <text:p text:style-name="Normal">&lt;div&gt; está en Block por defecto y &lt;span&gt; está en in-line</text:p>
      <text:p text:style-name="Normal">Para cambiar una etiqueta de inline a block y viceversa se usa la propiedad display, que también puede contener el valor none, el cuál elimina el elemento de la pantalla. La propiedad<text:s/>visivility: hidden también la oculta, pero mantiene la posición.</text:p>
      <text:p text:style-name="Normal">Inline-block</text:p>
      <text:p text:style-name="Normal">Este valor se comporta igual que un elemento inline pero se puede cambiar el tamaño</text:p>
      <text:p text:style-name="Normal"><text:span text:style-name="T15">Posicionamiento</text:span></text:p>
      <text:p text:style-name="Normal">Position: …</text:p>
      <text:p text:style-name="Normal"><text:span text:style-name="T16">static</text:span>: por defecto, comportamiento inline o block</text:p>
      <text:p text:style-name="Normal"><text:span text:style-name="T17">relative</text:span>: Se<text:s/>crea un punto relativo para que los elementos hijos lo tomen como referencia en su posicionamiento</text:p>
      <text:p text:style-name="Normal"><text:span text:style-name="T18">absolute</text:span>:. Cuando tiene este valor se puede determinar sus coordenadas en el DOCUMENTO con la propiedad top, botton, left y right. Pero si algún elemento padre tiene propiedad relative será con respecto a esa</text:p>
      <text:p text:style-name="Normal"><text:span text:style-name="T19">fixed</text:span><text:tab/>se mantiene la posición en la pantalla, el scroll no lo mueve. La posición siempre es la relativa al documento</text:p>
      <text:p text:style-name="Normal"><text:span text:style-name="T20">sticky</text:span><text:s text:c="3"/>igual que fixed pero la posición es relativa al padre que tenga relative, y si<text:s/>no tiene, al documento</text:p>
      <text:p text:style-name="Normal"/>
      <text:p text:style-name="P21">Centrar elementos:</text:p>
      <text:p text:style-name="Normal">Para elementos inline el elemento padre tiene que tener text-align: center</text:p>
      <text:p text:style-name="Normal">Para elementos block tiene que tener margin: auto</text:p>
      <text:p text:style-name="Normal"/>
      <text:p text:style-name="Normal"><text:span text:style-name="T22">Anchura máxima</text:span>: width: 100%;</text:p>
      <text:p text:style-name="Normal"><text:span text:style-name="T23">Altura máxima</text:span>: min-height : 100vh;</text:p>
      <text:p text:style-name="Normal"/>
      <text:p text:style-name="Normal"><text:span text:style-name="T24">Float</text:span></text:p>
      <text:p text:style-name="Normal">Esta propiedad<text:s/>lo que hace es dar permiso al resto de elemento de ocupar el espacio que les sobra</text:p>
      <text:p text:style-name="P25">Centrar el contenido</text:p>
      <text:p text:style-name="Normal"><text:span text:style-name="T26"><draw:frame draw:z-index="251658240" draw:style-name="a1" draw:name="Imagen 11" text:anchor-type="paragraph" svg:x="0.93542in" svg:y="0.01181in" svg:width="1.25764in" svg:height="1.28333in" style:rel-width="scale" style:rel-height="scale"><draw:image xlink:href="media/image2.png" xlink:type="simple" xlink:show="embed" xlink:actuate="onLoad"/><svg:title/><svg:desc/></draw:frame></text:span>Inset: 0;<text:span text:style-name="T27"><text:s/></text:span></text:p>
      <text:p text:style-name="P28"/>
      <text:p text:style-name="P29"/>
      <text:p text:style-name="P30"/>
      <text:p text:style-name="P31">Z index</text:p>
      <text:p text:style-name="Normal">Posiciona los elementos delante o detrás de los demás</text:p>
      <text:p text:style-name="Normal"><text:span text:style-name="T32">Overflow</text:span><text:s text:c="3"/>(desbordamiento)</text:p>
      <text:p text:style-name="Normal">Hidden. Se oculta cuando se sale del container</text:p>
      <text:p text:style-name="Normal">Scroll. Se oculta pero se puede mover con la barra verticas</text:p>
      <text:p text:style-name="Normal">Auto, determina si tiene que poner o no las barras</text:p>
      <text:p text:style-name="P33">Selectores combinados</text:p>
      <text:p text:style-name="Normal">div p este selector solo sirve para las etiquetas p descendiente del div</text:p>
      <text:p text:style-name="Normal">div&gt;p, este selector se refiere sólo a las etiquetas p que sean hijos del div</text:p>
      <text:p text:style-name="Normal">div+p se refiere al primer hermano adyacente</text:p>
      <text:p text:style-name="Normal">div<text:span text:style-name="T34">~</text:span>p se refiere a todos los hermanos adyacentes</text:p>
      <text:p text:style-name="P35">Pseudo clases</text:p>
      <text:p text:style-name="Normal">:hover, :visited, :link, :active</text:p>
      <text:p text:style-name="Normal">Combinación pseudo clase y selector;</text:p>
      <text:p text:style-name="Normal">div: hover p {display: block} <text:s/>al pasar el raton por encima del div aparece p</text:p>
      <text:p text:style-name="Normal">pseudo Elementos</text:p>
      <text:p text:style-name="Normal">p::first-line{} primera línea del párrafo</text:p>
      <text:p text:style-name="Normal">p::first-letter{} primera letra</text:p>
      <text:p text:style-name="Normal">h1::before{content: url(icono.png);}</text:p>
      <text:p text:style-name="Normal">inserta la imagen antes del título h1</text:p>
      <text:p text:style-name="P36">Selector de atributo</text:p>
      <text:p text:style-name="Normal">a[target=”_blank”]{…} selecciona las<text:s/>etiquetas de enlaces con el valor _blank en el atributo target<text:s/><text:span text:style-name="T37">en línea</text:span></text:p>
      <text:p text:style-name="P38">Animaciones</text:p>
      <text:p text:style-name="Normal">Reglas<text:s/><text:span text:style-name="T39"></text:span>@</text:p>
      <text:p text:style-name="Normal">@keyframes<text:s/><text:span text:style-name="T40">imagen</text:span>{</text:p>
      <text:p text:style-name="Normal"><text:s text:c="4"/>from{</text:p>
      <text:p text:style-name="Normal"><text:s text:c="8"/>opacity: 1;</text:p>
      <text:p text:style-name="Normal"><text:s text:c="4"/>}</text:p>
      <text:p text:style-name="Normal"><text:s text:c="4"/>to{</text:p>
      <text:p text:style-name="Normal"><text:s text:c="8"/>opacity: 0.5;</text:p>
      <text:p text:style-name="Normal"><text:s text:c="4"/>}</text:p>
      <text:p text:style-name="Normal">{</text:p>
      <text:p text:style-name="Normal">img: hover{</text:p>
      <text:p text:style-name="Normal"><text:s text:c="4"/>animation-name:<text:s/><text:span text:style-name="T41">imagen</text:span>;</text:p>
      <text:p text:style-name="Normal"><text:s text:c="4"/>animation-duration: 2s;</text:p>
      <text:p text:style-name="Normal">}</text:p>
      <text:p text:style-name="P42">Shorthand:</text:p>
      <text:p text:style-name="Normal">animation imagen 2s in-out 0.3s infinite alternate;</text:p>
      <text:p text:style-name="P43">Transiciones</text:p>
      <text:p text:style-name="Normal">img:hover{</text:p>
      <text:p text:style-name="Normal"><text:s text:c="3"/>opacity: 0.5;</text:p>
      <text:p text:style-name="Normal"><text:s text:c="3"/>transition-property: opacity;</text:p>
      <text:p text:style-name="Normal"><text:s text:c="3"/>transition-duration: 2s;</text:p>
      <text:p text:style-name="Normal"><text:s text:c="3"/>transition-timing-functioin: ease-in-out;</text:p>
      <text:p text:style-name="Normal"><text:s text:c="3"/>transition-delay: 0.3s;</text:p>
      <text:p text:style-name="Normal">}</text:p>
      <text:p text:style-name="Normal"><text:span text:style-name="T44">Shorthand</text:span></text:p>
      <text:p text:style-name="Normal">transition: opacity 2s easy-in-out 0.3s;</text:p>
      <text:p text:style-name="Normal">varias transiciones:</text:p>
      <text:p text:style-name="Normal">transition: opacity 2s easy 0.3s, transition width 5s linear;</text:p>
      <text:p text:style-name="Normal"><text:span text:style-name="T45">MediaQueries</text:span><text:s/>(responsive)</text:p>
      <text:p text:style-name="Normal">@media (min-width:600px){…</text:p>
      <text:p text:style-name="Normal">}</text:p>
      <text:p text:style-name="P46">Flexbox</text:p>
      <text:p text:style-name="Normal">Unidimensional</text:p>
      <text:p text:style-name="Normal">flex-container{</text:p>
      <text:p text:style-name="Normal"><text:s text:c="4"/>display: flex;</text:p>
      <text:p text:style-name="Normal"><text:s text:c="4"/>flex-direction:<text:s/>row;</text:p>
      <text:p text:style-name="Normal"><text:s text:c="4"/>flex-wrap: wrap;<text:s/></text:p>
      <text:p text:style-name="Normal"><text:s text:c="4"/>justify-content: center;</text:p>
      <text:p text:style-name="Normal"><text:s text:c="4"/>align-items: center;</text:p>
      <text:p text:style-name="Normal">}</text:p>
      <text:p text:style-name="Normal"><text:span text:style-name="T47"><draw:frame draw:style-name="a2" draw:name="Imagen 3" text:anchor-type="as-char" svg:x="0in" svg:y="0in" svg:width="2.70278in" svg:height="1.26042in" style:rel-width="scale" style:rel-height="scale"><draw:image xlink:href="media/image3.png" xlink:type="simple" xlink:show="embed" xlink:actuate="onLoad"/><svg:title/><svg:desc/></draw:frame></text:span></text:p>
      <text:p text:style-name="Normal">flex-wrap: wrap; (si no cabe lo lleva a la siguiente<text:s/>línea)</text:p>
      <text:p text:style-name="Normal">flex-wrap: nowrap; (si no cabe reduce el tamaño)</text:p>
      <text:p text:style-name="Normal">flex: auto; (va en el elemento y ajusta el tamaño al contenedor<text:s/>y al contenido)</text:p>
      <text:p text:style-name="Normal">flex: 1 (el elemento ocupa una parte proporcional al nº de elementos)</text:p>
      <text:p text:style-name="Normal">flex: 2 (el elemento ocupa dos partes proporcionales del contenedor)</text:p>
      <text:p text:style-name="Normal"><text:span text:style-name="T48"><draw:frame draw:style-name="a3" draw:name="Imagen 12" text:anchor-type="as-char" svg:x="0in" svg:y="0in" svg:width="3.05093in" svg:height="0.81604in" style:rel-width="scale" style:rel-height="scale"><draw:image xlink:href="media/image4.png" xlink:type="simple" xlink:show="embed" xlink:actuate="onLoad"/><svg:title/><svg:desc/></draw:frame></text:span></text:p>
      <text:p text:style-name="Normal">justify-content: <text:s text:c="2"/>alinea en el eje principal</text:p>
      <text:p text:style-name="Normal">align-items:<text:s/><text:tab/>alinea en el eje cruzado</text:p>
      <text:p text:style-name="Normal">align-content: <text:s text:c="3"/>alinea en el eje del elemen</text:p>
      <text:p text:style-name="Normal"><text:span text:style-name="T49">Grid</text:span></text:p>
      <text:p text:style-name="Normal">Bidimensional<text:s/></text:p>
      <text:p text:style-name="Normal">flex-container{</text:p>
      <text:p text:style-name="Normal"><text:s text:c="4"/>display: grid;</text:p>
      <text:p text:style-name="Normal"><text:s text:c="4"/>grid-template-colums: 100px 50px auto;</text:p>
      <text:p text:style-name="Normal"><text:s text:c="4"/>grid-template-row: 75px 20px 50px;</text:p>
      <text:p text:style-name="Normal">}</text:p>
      <text:p text:style-name="Normal"><text:span text:style-name="T50"><draw:frame draw:style-name="a4" draw:name="Imagen 6" text:anchor-type="as-char" svg:x="0in" svg:y="0in" svg:width="2.70278in" svg:height="0.49375in" style:rel-width="scale" style:rel-height="scale"><draw:image xlink:href="media/image5.png" xlink:type="simple" xlink:show="embed" xlink:actuate="onLoad"/><svg:title/><svg:desc/></draw:frame></text:span></text:p>
      <text:p text:style-name="P51">separación entre caja (GAP)</text:p>
      <text:p text:style-name="Normal">column-gap: 16px</text:p>
      <text:p text:style-name="Normal">row-gap: 16px</text:p>
      <text:p text:style-name="Normal">o también<text:span text:style-name="T52"></text:span><text:s/>gap: 32px 16px</text:p>
      <text:p text:style-name="P53">Fracciones (1fr)</text:p>
      <text:p text:style-name="Normal">grid-template-columns: <text:s text:c="2"/>1fr 2fr 1fr</text:p>
      <text:p text:style-name="Normal"><text:span text:style-name="T54"><draw:frame draw:style-name="a5" draw:name="Imagen 5" text:anchor-type="as-char" svg:x="0in" svg:y="0in" svg:width="2.70278in" svg:height="0.525in" style:rel-width="scale" style:rel-height="scale"><draw:image xlink:href="media/image6.png" xlink:type="simple" xlink:show="embed" xlink:actuate="onLoad"/><svg:title/><svg:desc/></draw:frame></text:span></text:p>
      <text:p text:style-name="P55">Repetir</text:p>
      <text:p text:style-name="Normal">grid-template-columns: auto repeat(2, 20%);</text:p>
      <text:p text:style-name="Normal"><text:span text:style-name="T56"><draw:frame draw:style-name="a6" draw:name="Imagen 4" text:anchor-type="as-char" svg:x="0in" svg:y="0in" svg:width="2.70278in" svg:height="0.5375in" style:rel-width="scale" style:rel-height="scale"><draw:image xlink:href="media/image7.png" xlink:type="simple" xlink:show="embed" xlink:actuate="onLoad"/><svg:title/><svg:desc/></draw:frame></text:span></text:p>
      <text:p text:style-name="P57">Mínimo y máximo (minmax)</text:p>
      <text:p text:style-name="Normal">grid-template-columns: minmax(300px, 1fr) 1fr 1fr</text:p>
      <text:p text:style-name="P58">mínimo de<text:s/>ancho de columna autoajuste</text:p>
      <text:p text:style-name="Normal">grid-template-columns: repeat(</text:p>
      <text:p text:style-name="Normal"><text:s text:c="4"/>auto-fill, <text:s/>(calcula autom. nº d columnas)</text:p>
      <text:p text:style-name="Normal"><text:s text:c="4"/>minmax(200px, 1fr)</text:p>
      <text:p text:style-name="Normal"><text:s text:c="2"/>);</text:p>
      <text:p text:style-name="Normal">Se puede usar auto-fill o autofit, la segunda ocupará todo el espacio cuando haya pocos elementos y no completen la pantalla</text:p>
      <text:p text:style-name="P59">Combinar elementos</text:p>
      <text:p text:style-name="Normal">.container div:first-child{</text:p>
      <text:p text:style-name="Normal"><text:s text:c="2"/>grid-column-start: 1;</text:p>
      <text:p text:style-name="Normal"><text:s text:c="2"/>grid-column-end: 3;</text:p>
      <text:p text:style-name="Normal">}</text:p>
      <text:p text:style-name="Normal"><text:span text:style-name="T60"><draw:frame draw:style-name="a7" draw:name="Imagen 6" text:anchor-type="as-char" svg:x="0in" svg:y="0in" svg:width="2.70278in" svg:height="0.86875in" style:rel-width="scale" style:rel-height="scale"><draw:image xlink:href="media/image8.png" xlink:type="simple" xlink:show="embed" xlink:actuate="onLoad"/><svg:title/><svg:desc/></draw:frame></text:span></text:p>
      <text:p text:style-name="Normal">.container div:first-child{</text:p>
      <text:p text:style-name="Normal"><text:s text:c="2"/>grid-row-start: span 2;</text:p>
      <text:p text:style-name="Normal"><text:s text:c="2"/>grid-column-start: span 2;</text:p>
      <text:p text:style-name="Normal">}</text:p>
      <text:p text:style-name="Normal">O también:</text:p>
      <text:p text:style-name="Normal">.container div:first-child{</text:p>
      <text:p text:style-name="Normal"><text:s text:c="2"/>grid-row: 1 / 3;</text:p>
      <text:p text:style-name="Normal"><text:s text:c="2"/>grid-column: 1 / 3;</text:p>
      <text:p text:style-name="Normal">}</text:p>
      <text:p text:style-name="Normal"><text:span text:style-name="T61"><draw:frame draw:style-name="a8" draw:name="Imagen 7" text:anchor-type="as-char" svg:x="0in" svg:y="0in" svg:width="2.70278in" svg:height="0.88542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><text:span text:style-name="T62">Responsive</text:span>:</text:p>
      <text:p text:style-name="Normal"><text:s text:c="2"/>.container{</text:p>
      <text:p text:style-name="Normal"><text:s text:c="4"/>grid-template-columns: minmax(200px, 1fr) 1fr 1fr;</text:p>
      <text:p text:style-name="Normal"><text:s text:c="2"/>}@media(width &lt; 700px){</text:p>
      <text:p text:style-name="Normal"><text:s text:c="2"/>.container{</text:p>
      <text:p text:style-name="Normal"><text:s text:c="4"/>grid-template-columns: 1fr 1fr;</text:p>
      <text:p text:style-name="Normal"><text:s text:c="2"/>}</text:p>
      <text:p text:style-name="Normal">}</text:p>
      <text:p text:style-name="Normal"><text:span text:style-name="T63"><draw:frame draw:style-name="a9" draw:name="Imagen 8" text:anchor-type="as-char" svg:x="0in" svg:y="0in" svg:width="2.70278in" svg:height="0.49236in" style:rel-width="scale" style:rel-height="scale"><draw:image xlink:href="media/image10.png" xlink:type="simple" xlink:show="embed" xlink:actuate="onLoad"/><svg:title/><svg:desc/></draw:frame></text:span></text:p>
      <text:p text:style-name="Normal">Layout<text:s/></text:p>
      <text:p text:style-name="Normal"><text:span text:style-name="T64"><draw:frame draw:style-name="a10" draw:name="Imagen 10" text:anchor-type="as-char" svg:x="0in" svg:y="0in" svg:width="2.70278in" svg:height="5.16667in" style:rel-width="scale" style:rel-height="scale"><draw:image xlink:href="media/image11.png" xlink:type="simple" xlink:show="embed" xlink:actuate="onLoad"/><svg:title/><svg:desc/></draw:frame></text:span></text:p>
      <text:p text:style-name="Normal">Otra forma más sencilla (las zonas):</text:p>
      <text:p text:style-name="Normal"><text:span text:style-name="T65"><draw:frame draw:style-name="a11" draw:name="Imagen 11" text:anchor-type="as-char" svg:x="0in" svg:y="0in" svg:width="2.925in" svg:height="4.05834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columns fo:column-count="2" fo:column-gap="0.5in">
          <style:column-sep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08-19T12:09:00Z</meta:creation-date>
    <dc:date>2024-08-28T17:50:00Z</dc:date>
    <meta:template xlink:href="Normal" xlink:type="simple"/>
    <meta:editing-cycles>19</meta:editing-cycles>
    <meta:editing-duration>PT63180S</meta:editing-duration>
    <meta:document-statistic meta:page-count="1" meta:paragraph-count="11" meta:word-count="881" meta:character-count="5717" meta:row-count="40" meta:non-whitespace-character-count="4847"/>
  </office:meta>
</office:document-meta>
</file>