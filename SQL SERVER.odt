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3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P4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P5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P6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P7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P8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T9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10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11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12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13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14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15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16" style:parent-style-name="Fuentedepárrafopredeter." style:family="text">
      <style:text-properties style:font-name="Consolas" style:font-name-complex="Consolas" fo:color="#FF00FF" fo:font-size="9.5pt" style:font-size-asian="9.5pt" style:font-size-complex="9.5pt"/>
    </style:style>
    <style:style style:name="T17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18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19" style:parent-style-name="Fuentedepárrafopredeter." style:family="text">
      <style:text-properties style:font-name="Consolas" style:font-name-complex="Consolas" fo:color="#FF0000" fo:font-size="9.5pt" style:font-size-asian="9.5pt" style:font-size-complex="9.5pt"/>
    </style:style>
    <style:style style:name="T20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21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22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23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24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25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26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27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28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29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30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31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32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33" style:parent-style-name="Normal" style:family="paragraph">
      <style:paragraph-properties style:text-autospace="none" fo:margin-bottom="0in" fo:line-height="100%"/>
    </style:style>
    <style:style style:name="T34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35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36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37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38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39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40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41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42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43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44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45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46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47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48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49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50" style:parent-style-name="Fuentedepárrafopredeter." style:family="text">
      <style:text-properties style:font-name="Consolas" style:font-name-complex="Consolas" fo:color="#FF0000" fo:font-size="9.5pt" style:font-size-asian="9.5pt" style:font-size-complex="9.5pt"/>
    </style:style>
    <style:style style:name="T51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52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53" style:parent-style-name="Fuentedepárrafopredeter." style:family="text">
      <style:text-properties style:font-name="Consolas" style:font-name-complex="Consolas" fo:color="#FF0000" fo:font-size="9.5pt" style:font-size-asian="9.5pt" style:font-size-complex="9.5pt"/>
    </style:style>
    <style:style style:name="T54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55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56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57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58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59" style:parent-style-name="Normal" style:family="paragraph">
      <style:paragraph-properties style:text-autospace="none" fo:margin-bottom="0in" fo:line-height="100%"/>
    </style:style>
    <style:style style:name="T60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61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62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63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64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65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66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67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68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69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70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71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72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73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74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75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76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77" style:parent-style-name="Fuentedepárrafopredeter." style:family="text">
      <style:text-properties style:font-name="Consolas" style:font-name-complex="Consolas" fo:color="#FF0000" fo:font-size="9.5pt" style:font-size-asian="9.5pt" style:font-size-complex="9.5pt"/>
    </style:style>
    <style:style style:name="T78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79" style:parent-style-name="Fuentedepárrafopredeter." style:family="text">
      <style:text-properties style:font-name="Consolas" style:font-name-complex="Consolas" fo:color="#FF0000" fo:font-size="9.5pt" style:font-size-asian="9.5pt" style:font-size-complex="9.5pt"/>
    </style:style>
    <style:style style:name="T80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81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82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83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84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85" style:parent-style-name="Normal" style:family="paragraph">
      <style:paragraph-properties style:text-autospace="none" fo:margin-bottom="0in" fo:line-height="100%"/>
    </style:style>
    <style:style style:name="T86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87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88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89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90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91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92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93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94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95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96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97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98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99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100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101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102" style:parent-style-name="Fuentedepárrafopredeter." style:family="text">
      <style:text-properties style:font-name="Consolas" style:font-name-complex="Consolas" fo:color="#FF0000" fo:font-size="9.5pt" style:font-size-asian="9.5pt" style:font-size-complex="9.5pt"/>
    </style:style>
    <style:style style:name="T103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104" style:parent-style-name="Fuentedepárrafopredeter." style:family="text">
      <style:text-properties style:font-name="Consolas" style:font-name-complex="Consolas" fo:color="#FF0000" fo:font-size="9.5pt" style:font-size-asian="9.5pt" style:font-size-complex="9.5pt"/>
    </style:style>
    <style:style style:name="T105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106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107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108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109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11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11" style:parent-style-name="Normal" style:family="paragraph">
      <style:paragraph-properties style:text-autospace="none" fo:margin-bottom="0in" fo:line-height="100%"/>
    </style:style>
    <style:style style:name="T112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113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114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115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116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117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118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119" style:parent-style-name="Fuentedepárrafopredeter." style:family="text">
      <style:text-properties style:font-name="Consolas" style:font-name-complex="Consolas" fo:color="#FF0000" fo:font-size="9.5pt" style:font-size-asian="9.5pt" style:font-size-complex="9.5pt"/>
    </style:style>
    <style:style style:name="T120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12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T122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123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P124" style:parent-style-name="Normal" style:family="paragraph">
      <style:paragraph-properties style:text-autospace="none" fo:margin-bottom="0in" fo:line-height="100%"/>
    </style:style>
    <style:style style:name="T125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126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127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128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129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130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131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132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133" style:parent-style-name="Fuentedepárrafopredeter." style:family="text">
      <style:text-properties style:font-name="Consolas" style:font-name-complex="Consolas" fo:color="#FF00FF" fo:font-size="9.5pt" style:font-size-asian="9.5pt" style:font-size-complex="9.5pt"/>
    </style:style>
    <style:style style:name="T134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135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136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137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138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139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140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141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142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143" style:parent-style-name="Normal" style:family="paragraph">
      <style:paragraph-properties style:text-autospace="none" fo:margin-bottom="0in" fo:line-height="100%"/>
      <style:text-properties style:font-name="Consolas" style:font-name-complex="Consolas" fo:color="#808080" fo:font-size="9.5pt" style:font-size-asian="9.5pt" style:font-size-complex="9.5pt"/>
    </style:style>
    <style:style style:name="P144" style:parent-style-name="Normal" style:family="paragraph">
      <style:paragraph-properties style:text-autospace="none" fo:margin-bottom="0in" fo:line-height="100%"/>
    </style:style>
    <style:style style:name="T145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146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147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148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149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150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151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152" style:parent-style-name="Normal" style:family="paragraph">
      <style:paragraph-properties style:text-autospace="none" fo:margin-bottom="0in" fo:line-height="100%"/>
      <style:text-properties style:font-name="Consolas" style:font-name-complex="Consolas" fo:color="#808080" fo:font-size="9.5pt" style:font-size-asian="9.5pt" style:font-size-complex="9.5pt"/>
    </style:style>
    <style:style style:name="P153" style:parent-style-name="Normal" style:family="paragraph">
      <style:paragraph-properties style:text-autospace="none" fo:margin-bottom="0in" fo:line-height="100%"/>
    </style:style>
    <style:style style:name="T154" style:parent-style-name="Fuentedepárrafopredeter." style:family="text">
      <style:text-properties style:font-name="Consolas" style:font-name-complex="Consolas" fo:color="#FF00FF" fo:font-size="9.5pt" style:font-size-asian="9.5pt" style:font-size-complex="9.5pt"/>
    </style:style>
    <style:style style:name="T155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156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157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158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159" style:parent-style-name="Fuentedepárrafopredeter." style:family="text">
      <style:text-properties style:font-name="Consolas" style:font-name-complex="Consolas" fo:color="#FF0000" fo:font-size="9.5pt" style:font-size-asian="9.5pt" style:font-size-complex="9.5pt"/>
    </style:style>
    <style:style style:name="T160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161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162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163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164" style:parent-style-name="Fuentedepárrafopredeter." style:family="text">
      <style:text-properties style:font-name="Consolas" style:font-name-complex="Consolas" fo:color="#FF0000" fo:font-size="9.5pt" style:font-size-asian="9.5pt" style:font-size-complex="9.5pt"/>
    </style:style>
    <style:style style:name="T165" style:parent-style-name="Fuentedepárrafopredeter." style:family="text">
      <style:text-properties style:font-name="Consolas" style:font-name-complex="Consolas" fo:font-size="9.5pt" style:font-size-asian="9.5pt" style:font-size-complex="9.5pt"/>
    </style:style>
    <style:style style:name="P16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T167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168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169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170" style:parent-style-name="Fuentedepárrafopredeter." style:family="text">
      <style:text-properties style:font-name="Consolas" style:font-name-complex="Consolas" fo:color="#FF0000" fo:font-size="9.5pt" style:font-size-asian="9.5pt" style:font-size-complex="9.5pt"/>
    </style:style>
    <style:style style:name="T171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172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173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174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175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176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177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178" style:parent-style-name="Fuentedepárrafopredeter." style:family="text">
      <style:text-properties style:font-name="Consolas" style:font-name-complex="Consolas" fo:color="#FF00FF" fo:font-size="9.5pt" style:font-size-asian="9.5pt" style:font-size-complex="9.5pt"/>
    </style:style>
    <style:style style:name="T179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180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181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182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183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184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185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186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187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188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189" style:parent-style-name="Fuentedepárrafopredeter." style:family="text">
      <style:text-properties style:font-name="Consolas" style:font-name-complex="Consolas" fo:color="#FF0000" fo:font-size="9.5pt" style:font-size-asian="9.5pt" style:font-size-complex="9.5pt"/>
    </style:style>
    <style:style style:name="T190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191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192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193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194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195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196" style:parent-style-name="Fuentedepárrafopredeter." style:family="text">
      <style:text-properties style:font-name="Consolas" style:font-name-complex="Consolas" fo:color="#FF0000" fo:font-size="9.5pt" style:font-size-asian="9.5pt" style:font-size-complex="9.5pt"/>
    </style:style>
    <style:style style:name="T197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198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199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200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201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202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203" style:parent-style-name="Fuentedepárrafopredeter." style:family="text">
      <style:text-properties style:font-name="Consolas" style:font-name-complex="Consolas" fo:color="#FF00FF" fo:font-size="9.5pt" style:font-size-asian="9.5pt" style:font-size-complex="9.5pt"/>
    </style:style>
    <style:style style:name="T204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205" style:parent-style-name="Fuentedepárrafopredeter." style:family="text">
      <style:text-properties style:font-name="Consolas" style:font-name-complex="Consolas" fo:color="#FF0000" fo:font-size="9.5pt" style:font-size-asian="9.5pt" style:font-size-complex="9.5pt"/>
    </style:style>
    <style:style style:name="T206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207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208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209" style:parent-style-name="Fuentedepárrafopredeter." style:family="text">
      <style:text-properties style:font-name="Consolas" style:font-name-complex="Consolas" fo:color="#FF00FF" fo:font-size="9.5pt" style:font-size-asian="9.5pt" style:font-size-complex="9.5pt"/>
    </style:style>
    <style:style style:name="T210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211" style:parent-style-name="Fuentedepárrafopredeter." style:family="text">
      <style:text-properties style:font-name="Consolas" style:font-name-complex="Consolas" fo:color="#FF0000" fo:font-size="9.5pt" style:font-size-asian="9.5pt" style:font-size-complex="9.5pt"/>
    </style:style>
    <style:style style:name="T212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213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214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215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216" style:parent-style-name="Fuentedepárrafopredeter." style:family="text">
      <style:text-properties style:font-name="Consolas" style:font-name-complex="Consolas" fo:color="#FF00FF" fo:font-size="9.5pt" style:font-size-asian="9.5pt" style:font-size-complex="9.5pt"/>
    </style:style>
    <style:style style:name="T217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218" style:parent-style-name="Fuentedepárrafopredeter." style:family="text">
      <style:text-properties style:font-name="Consolas" style:font-name-complex="Consolas" fo:color="#FF0000" fo:font-size="9.5pt" style:font-size-asian="9.5pt" style:font-size-complex="9.5pt"/>
    </style:style>
    <style:style style:name="T219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220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221" style:parent-style-name="Fuentedepárrafopredeter." style:family="text">
      <style:text-properties style:font-name="Consolas" style:font-name-complex="Consolas" fo:color="#FF0000" fo:font-size="9.5pt" style:font-size-asian="9.5pt" style:font-size-complex="9.5pt"/>
    </style:style>
    <style:style style:name="T222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223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224" style:parent-style-name="Fuentedepárrafopredeter." style:family="text">
      <style:text-properties style:font-name="Consolas" style:font-name-complex="Consolas" fo:color="#FF0000" fo:font-size="9.5pt" style:font-size-asian="9.5pt" style:font-size-complex="9.5pt"/>
    </style:style>
    <style:style style:name="T225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226" style:parent-style-name="Hipervínculo" style:family="text">
      <style:text-properties style:font-name="Consolas" style:font-name-complex="Consolas" fo:font-size="9.5pt" style:font-size-asian="9.5pt" style:font-size-complex="9.5pt"/>
    </style:style>
    <style:style style:name="T227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228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229" style:parent-style-name="Fuentedepárrafopredeter." style:family="text">
      <style:text-properties style:font-name="Consolas" style:font-name-complex="Consolas" fo:color="#FF00FF" fo:font-size="9.5pt" style:font-size-asian="9.5pt" style:font-size-complex="9.5pt"/>
    </style:style>
    <style:style style:name="T230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231" style:parent-style-name="Fuentedepárrafopredeter." style:family="text">
      <style:text-properties style:font-name="Consolas" style:font-name-complex="Consolas" fo:color="#FF0000" fo:font-size="9.5pt" style:font-size-asian="9.5pt" style:font-size-complex="9.5pt"/>
    </style:style>
    <style:style style:name="T232" style:parent-style-name="Fuentedepárrafopredeter." style:family="text">
      <style:text-properties style:font-name="Consolas" style:font-name-complex="Consolas" fo:color="#FF0000" fo:font-size="9.5pt" style:font-size-asian="9.5pt" style:font-size-complex="9.5pt"/>
    </style:style>
    <style:style style:name="T233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234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235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236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237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238" style:parent-style-name="Fuentedepárrafopredeter." style:family="text">
      <style:text-properties style:font-name="Consolas" style:font-name-complex="Consolas" fo:color="#FF0000" fo:font-size="9.5pt" style:font-size-asian="9.5pt" style:font-size-complex="9.5pt"/>
    </style:style>
    <style:style style:name="T239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240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241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242" style:parent-style-name="Fuentedepárrafopredeter." style:family="text">
      <style:text-properties style:font-name="Consolas" style:font-name-complex="Consolas" fo:color="#FF00FF" fo:font-size="9.5pt" style:font-size-asian="9.5pt" style:font-size-complex="9.5pt"/>
    </style:style>
    <style:style style:name="T243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244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245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246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247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248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249" style:parent-style-name="Fuentedepárrafopredeter." style:family="text">
      <style:text-properties style:font-name="Consolas" style:font-name-complex="Consolas" fo:color="#FF0000" fo:font-size="9.5pt" style:font-size-asian="9.5pt" style:font-size-complex="9.5pt"/>
    </style:style>
    <style:style style:name="T250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251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252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253" style:parent-style-name="Fuentedepárrafopredeter." style:family="text">
      <style:text-properties style:font-name="Consolas" style:font-name-complex="Consolas" fo:color="#FF00FF" fo:font-size="9.5pt" style:font-size-asian="9.5pt" style:font-size-complex="9.5pt"/>
    </style:style>
    <style:style style:name="T254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255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256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257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258" style:parent-style-name="Normal" style:family="paragraph">
      <style:paragraph-properties style:text-autospace="none" fo:margin-bottom="0in" fo:line-height="100%"/>
    </style:style>
    <style:style style:name="T259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260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261" style:parent-style-name="Fuentedepárrafopredeter." style:family="text">
      <style:text-properties style:font-name="Consolas" style:font-name-complex="Consolas" fo:color="#FF00FF" fo:font-size="9.5pt" style:font-size-asian="9.5pt" style:font-size-complex="9.5pt"/>
    </style:style>
    <style:style style:name="T262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263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264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265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26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T267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268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269" style:parent-style-name="Fuentedepárrafopredeter." style:family="text">
      <style:text-properties style:font-name="Consolas" style:font-name-complex="Consolas" fo:color="#FF00FF" fo:font-size="9.5pt" style:font-size-asian="9.5pt" style:font-size-complex="9.5pt"/>
    </style:style>
    <style:style style:name="T270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271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272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273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274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275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276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277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278" style:parent-style-name="Fuentedepárrafopredeter." style:family="text">
      <style:text-properties style:font-name="Consolas" style:font-name-complex="Consolas" fo:color="#FF00FF" fo:font-size="9.5pt" style:font-size-asian="9.5pt" style:font-size-complex="9.5pt"/>
    </style:style>
    <style:style style:name="T279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280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281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282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283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284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28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86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287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288" style:parent-style-name="Fuentedepárrafopredeter." style:family="text">
      <style:text-properties style:font-name="Consolas" style:font-name-complex="Consolas" fo:color="#FF00FF" fo:font-size="9.5pt" style:font-size-asian="9.5pt" style:font-size-complex="9.5pt"/>
    </style:style>
    <style:style style:name="T289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29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91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292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293" style:parent-style-name="Fuentedepárrafopredeter." style:family="text">
      <style:text-properties style:font-name="Consolas" style:font-name-complex="Consolas" fo:color="#FF00FF" fo:font-size="9.5pt" style:font-size-asian="9.5pt" style:font-size-complex="9.5pt"/>
    </style:style>
    <style:style style:name="T294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295" style:parent-style-name="Fuentedepárrafopredeter." style:family="text">
      <style:text-properties style:font-name="Consolas" style:font-name-complex="Consolas" fo:color="#FF00FF" fo:font-size="9.5pt" style:font-size-asian="9.5pt" style:font-size-complex="9.5pt"/>
    </style:style>
    <style:style style:name="T296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297" style:parent-style-name="Fuentedepárrafopredeter." style:family="text">
      <style:text-properties style:font-name="Consolas" style:font-name-complex="Consolas" fo:color="#FF00FF" fo:font-size="9.5pt" style:font-size-asian="9.5pt" style:font-size-complex="9.5pt"/>
    </style:style>
    <style:style style:name="T298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299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300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30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02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303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304" style:parent-style-name="Fuentedepárrafopredeter." style:family="text">
      <style:text-properties style:font-name="Consolas" style:font-name-complex="Consolas" fo:color="#FF00FF" fo:font-size="9.5pt" style:font-size-asian="9.5pt" style:font-size-complex="9.5pt"/>
    </style:style>
    <style:style style:name="T305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306" style:parent-style-name="Fuentedepárrafopredeter." style:family="text">
      <style:text-properties style:font-name="Consolas" style:font-name-complex="Consolas" fo:color="#FF00FF" fo:font-size="9.5pt" style:font-size-asian="9.5pt" style:font-size-complex="9.5pt"/>
    </style:style>
    <style:style style:name="T307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308" style:parent-style-name="Fuentedepárrafopredeter." style:family="text">
      <style:text-properties style:font-name="Consolas" style:font-name-complex="Consolas" fo:color="#FF00FF" fo:font-size="9.5pt" style:font-size-asian="9.5pt" style:font-size-complex="9.5pt"/>
    </style:style>
    <style:style style:name="T309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310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311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31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13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314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315" style:parent-style-name="Fuentedepárrafopredeter." style:family="text">
      <style:text-properties style:font-name="Consolas" style:font-name-complex="Consolas" fo:color="#FF00FF" fo:font-size="9.5pt" style:font-size-asian="9.5pt" style:font-size-complex="9.5pt"/>
    </style:style>
    <style:style style:name="T316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317" style:parent-style-name="Fuentedepárrafopredeter." style:family="text">
      <style:text-properties style:font-name="Consolas" style:font-name-complex="Consolas" fo:color="#FF00FF" fo:font-size="9.5pt" style:font-size-asian="9.5pt" style:font-size-complex="9.5pt"/>
    </style:style>
    <style:style style:name="T318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319" style:parent-style-name="Fuentedepárrafopredeter." style:family="text">
      <style:text-properties style:font-name="Consolas" style:font-name-complex="Consolas" fo:color="#FF00FF" fo:font-size="9.5pt" style:font-size-asian="9.5pt" style:font-size-complex="9.5pt"/>
    </style:style>
    <style:style style:name="T320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321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322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323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32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25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326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327" style:parent-style-name="Fuentedepárrafopredeter." style:family="text">
      <style:text-properties style:font-name="Consolas" style:font-name-complex="Consolas" fo:color="#FF00FF" fo:font-size="9.5pt" style:font-size-asian="9.5pt" style:font-size-complex="9.5pt"/>
    </style:style>
    <style:style style:name="T328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329" style:parent-style-name="Fuentedepárrafopredeter." style:family="text">
      <style:text-properties style:font-name="Consolas" style:font-name-complex="Consolas" fo:color="#FF00FF" fo:font-size="9.5pt" style:font-size-asian="9.5pt" style:font-size-complex="9.5pt"/>
    </style:style>
    <style:style style:name="T330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331" style:parent-style-name="Fuentedepárrafopredeter." style:family="text">
      <style:text-properties style:font-name="Consolas" style:font-name-complex="Consolas" fo:color="#FF00FF" fo:font-size="9.5pt" style:font-size-asian="9.5pt" style:font-size-complex="9.5pt"/>
    </style:style>
    <style:style style:name="T332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333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334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33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36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337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338" style:parent-style-name="Fuentedepárrafopredeter." style:family="text">
      <style:text-properties style:font-name="Consolas" style:font-name-complex="Consolas" fo:color="#FF00FF" fo:font-size="9.5pt" style:font-size-asian="9.5pt" style:font-size-complex="9.5pt"/>
    </style:style>
    <style:style style:name="T339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340" style:parent-style-name="Fuentedepárrafopredeter." style:family="text">
      <style:text-properties style:font-name="Consolas" style:font-name-complex="Consolas" fo:color="#FF00FF" fo:font-size="9.5pt" style:font-size-asian="9.5pt" style:font-size-complex="9.5pt"/>
    </style:style>
    <style:style style:name="T341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342" style:parent-style-name="Fuentedepárrafopredeter." style:family="text">
      <style:text-properties style:font-name="Consolas" style:font-name-complex="Consolas" fo:color="#FF00FF" fo:font-size="9.5pt" style:font-size-asian="9.5pt" style:font-size-complex="9.5pt"/>
    </style:style>
    <style:style style:name="T343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344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345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34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47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348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349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350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351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352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353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354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35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56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357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358" style:parent-style-name="Fuentedepárrafopredeter." style:family="text">
      <style:text-properties style:font-name="Consolas" style:font-name-complex="Consolas" fo:color="#FF00FF" fo:font-size="9.5pt" style:font-size-asian="9.5pt" style:font-size-complex="9.5pt"/>
    </style:style>
    <style:style style:name="T359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360" style:parent-style-name="Fuentedepárrafopredeter." style:family="text">
      <style:text-properties style:font-name="Consolas" style:font-name-complex="Consolas" fo:color="#FF00FF" fo:font-size="9.5pt" style:font-size-asian="9.5pt" style:font-size-complex="9.5pt"/>
    </style:style>
    <style:style style:name="T361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362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363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364" style:parent-style-name="Fuentedepárrafopredeter." style:family="text">
      <style:text-properties style:font-name="Consolas" style:font-name-complex="Consolas" fo:color="#FF0000" fo:font-size="9.5pt" style:font-size-asian="9.5pt" style:font-size-complex="9.5pt"/>
    </style:style>
    <style:style style:name="T365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366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367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36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69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370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371" style:parent-style-name="Fuentedepárrafopredeter." style:family="text">
      <style:text-properties style:font-name="Consolas" style:font-name-complex="Consolas" fo:color="#FF00FF" fo:font-size="9.5pt" style:font-size-asian="9.5pt" style:font-size-complex="9.5pt"/>
    </style:style>
    <style:style style:name="T372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373" style:parent-style-name="Fuentedepárrafopredeter." style:family="text">
      <style:text-properties style:font-name="Consolas" style:font-name-complex="Consolas" fo:color="#FF00FF" fo:font-size="9.5pt" style:font-size-asian="9.5pt" style:font-size-complex="9.5pt"/>
    </style:style>
    <style:style style:name="T374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375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376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37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78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379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380" style:parent-style-name="Fuentedepárrafopredeter." style:family="text">
      <style:text-properties style:font-name="Consolas" style:font-name-complex="Consolas" fo:color="#FF00FF" fo:font-size="9.5pt" style:font-size-asian="9.5pt" style:font-size-complex="9.5pt"/>
    </style:style>
    <style:style style:name="T381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382" style:parent-style-name="Fuentedepárrafopredeter." style:family="text">
      <style:text-properties style:font-name="Consolas" style:font-name-complex="Consolas" fo:color="#FF00FF" fo:font-size="9.5pt" style:font-size-asian="9.5pt" style:font-size-complex="9.5pt"/>
    </style:style>
    <style:style style:name="T383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384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385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386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387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388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389" style:parent-style-name="Fuentedepárrafopredeter." style:family="text">
      <style:text-properties style:font-name="Consolas" style:font-name-complex="Consolas" fo:color="#FF00FF" fo:font-size="9.5pt" style:font-size-asian="9.5pt" style:font-size-complex="9.5pt"/>
    </style:style>
    <style:style style:name="T390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391" style:parent-style-name="Fuentedepárrafopredeter." style:family="text">
      <style:text-properties style:font-name="Consolas" style:font-name-complex="Consolas" fo:color="#FF00FF" fo:font-size="9.5pt" style:font-size-asian="9.5pt" style:font-size-complex="9.5pt"/>
    </style:style>
    <style:style style:name="T392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393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394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395" style:parent-style-name="Normal" style:family="paragraph">
      <style:paragraph-properties style:text-autospace="none" fo:margin-bottom="0in" fo:line-height="100%"/>
    </style:style>
    <style:style style:name="T396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397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398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399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400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401" style:parent-style-name="Normal" style:family="paragraph">
      <style:paragraph-properties style:text-autospace="none" fo:margin-bottom="0in" fo:line-height="100%"/>
    </style:style>
    <style:style style:name="T402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403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404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405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406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407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P408" style:parent-style-name="Normal" style:family="paragraph">
      <style:paragraph-properties style:text-autospace="none" fo:margin-bottom="0in" fo:line-height="100%"/>
    </style:style>
    <style:style style:name="T409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410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411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412" style:parent-style-name="Fuentedepárrafopredeter." style:family="text">
      <style:text-properties style:font-name="Consolas" style:font-name-complex="Consolas" fo:color="#FF0000" fo:font-size="9.5pt" style:font-size-asian="9.5pt" style:font-size-complex="9.5pt"/>
    </style:style>
    <style:style style:name="T413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414" style:parent-style-name="Fuentedepárrafopredeter." style:family="text">
      <style:text-properties style:font-name="Consolas" style:font-name-complex="Consolas" fo:color="#FF0000" fo:font-size="9.5pt" style:font-size-asian="9.5pt" style:font-size-complex="9.5pt"/>
    </style:style>
    <style:style style:name="T415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416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417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418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419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420" style:parent-style-name="Fuentedepárrafopredeter." style:family="text">
      <style:text-properties style:font-name="Consolas" style:font-name-complex="Consolas" fo:color="#FF0000" fo:font-size="9.5pt" style:font-size-asian="9.5pt" style:font-size-complex="9.5pt"/>
    </style:style>
    <style:style style:name="T421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42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23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424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425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426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427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428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42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30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431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432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433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434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435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43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37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438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439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440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441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44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43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444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445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446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447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44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49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450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P45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52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453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454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455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456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457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458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459" style:parent-style-name="Normal" style:family="paragraph">
      <style:text-properties style:font-name="Consolas" style:font-name-complex="Consolas" fo:color="#808080" fo:font-size="9.5pt" style:font-size-asian="9.5pt" style:font-size-complex="9.5pt"/>
    </style:style>
    <style:style style:name="P46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61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462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463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464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465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466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46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68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469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470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471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472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47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74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475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476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477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478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47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80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481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482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483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484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48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86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487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P48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89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490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491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492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493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494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495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496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49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98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499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500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501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502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503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50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05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506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507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508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509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51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11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512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513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514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515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51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17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518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519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520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521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52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23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524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525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526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527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52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29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530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P531" style:parent-style-name="Normal" style:family="paragraph">
      <style:text-properties style:font-name="Consolas" style:font-name-complex="Consolas" fo:color="#808080" fo:font-size="9.5pt" style:font-size-asian="9.5pt" style:font-size-complex="9.5pt"/>
    </style:style>
    <style:style style:name="P53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33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534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535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536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537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538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53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40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541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542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543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544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54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46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547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548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549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550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55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52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553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554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555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556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55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58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559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560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561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562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T563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564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565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566" style:parent-style-name="Fuentedepárrafopredeter." style:family="text">
      <style:text-properties style:font-name="Consolas" style:font-name-complex="Consolas" fo:color="#FF0000" fo:font-size="9.5pt" style:font-size-asian="9.5pt" style:font-size-complex="9.5pt"/>
    </style:style>
    <style:style style:name="T567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568" style:parent-style-name="Fuentedepárrafopredeter." style:family="text">
      <style:text-properties style:font-name="Consolas" style:font-name-complex="Consolas" fo:color="#FF0000" fo:font-size="9.5pt" style:font-size-asian="9.5pt" style:font-size-complex="9.5pt"/>
    </style:style>
    <style:style style:name="T569" style:parent-style-name="Fuentedepárrafopredeter." style:family="text">
      <style:text-properties style:font-name="Consolas" style:font-name-complex="Consolas" fo:color="#808080" fo:font-size="9.5pt" style:font-size-asian="9.5pt" style:font-size-complex="9.5pt"/>
    </style:style>
    <style:style style:name="P57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71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572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P573" style:parent-style-name="Normal" style:family="paragraph">
      <style:text-properties style:font-name="Consolas" style:font-name-complex="Consolas" fo:color="#808080" fo:font-size="9.5pt" style:font-size-asian="9.5pt" style:font-size-complex="9.5pt"/>
    </style:style>
  </office:automatic-styles>
  <office:body>
    <office:text text:use-soft-page-breaks="true">
      <text:p text:style-name="P1">SQL SERVER</text:p>
      <text:p text:style-name="Normal">Crear una tabla:</text:p>
      <text:p text:style-name="Normal"><text:span text:style-name="T2">create table</text:span><text:s/><text:span text:style-name="T3">peliculas(</text:span></text:p>
      <text:p text:style-name="P4"><text:tab/>nombre varchar(50),</text:p>
      <text:p text:style-name="P5"><text:tab/>director varchar(50),</text:p>
      <text:p text:style-name="P6"><text:tab/>duración integer,</text:p>
      <text:p text:style-name="P7"><text:tab/>cantidad integer</text:p>
      <text:p text:style-name="P8">);</text:p>
      <text:p text:style-name="Normal">Eliminar una tabla:</text:p>
      <text:p text:style-name="Normal"><text:span text:style-name="T9">drop</text:span><text:span text:style-name="T10"><text:s/></text:span><text:span text:style-name="T11">table</text:span><text:span text:style-name="T12"><text:s/>peliculas</text:span><text:span text:style-name="T13">;</text:span></text:p>
      <text:p text:style-name="Normal">Comprobar si existe una tabla:</text:p>
      <text:p text:style-name="Normal"><text:span text:style-name="T14">if</text:span><text:span text:style-name="T15"><text:s/></text:span><text:span text:style-name="T16">object_id</text:span><text:span text:style-name="T17"><text:s/></text:span><text:span text:style-name="T18">(</text:span><text:span text:style-name="T19">'peliculas'</text:span><text:span text:style-name="T20">)</text:span><text:span text:style-name="T21"><text:s/></text:span><text:span text:style-name="T22">is</text:span><text:span text:style-name="T23"><text:s/></text:span><text:span text:style-name="T24">not</text:span><text:span text:style-name="T25"><text:s/></text:span><text:span text:style-name="T26">null</text:span></text:p>
      <text:p text:style-name="Normal"><text:span text:style-name="T27"><text:tab/></text:span><text:span text:style-name="T28">drop</text:span><text:span text:style-name="T29"><text:s/></text:span><text:span text:style-name="T30">table</text:span><text:span text:style-name="T31"><text:s/>peliculas</text:span><text:span text:style-name="T32">;</text:span></text:p>
      <text:p text:style-name="Normal">Insertar filas en una tabla:</text:p>
      <text:p text:style-name="P33"><text:span text:style-name="T34">insert</text:span><text:span text:style-name="T35"><text:s/></text:span><text:span text:style-name="T36">into</text:span><text:span text:style-name="T37"><text:s/>peliculas</text:span><text:span text:style-name="T38">(</text:span><text:span text:style-name="T39">nombre</text:span><text:span text:style-name="T40">,</text:span><text:span text:style-name="T41"><text:s/>actor</text:span><text:span text:style-name="T42">,</text:span><text:span text:style-name="T43"><text:s/>duracion</text:span><text:span text:style-name="T44">,</text:span><text:span text:style-name="T45"><text:s/>cantidad</text:span><text:span text:style-name="T46">)</text:span><text:span text:style-name="T47"><text:s/></text:span><text:span text:style-name="T48">values</text:span><text:span text:style-name="T49">(</text:span><text:span text:style-name="T50">'Matrix'</text:span><text:span text:style-name="T51">,</text:span><text:span text:style-name="T52"><text:s/></text:span><text:span text:style-name="T53">'keanu Riu'</text:span><text:span text:style-name="T54">,</text:span><text:span text:style-name="T55">150</text:span><text:span text:style-name="T56">,</text:span><text:span text:style-name="T57">128</text:span><text:span text:style-name="T58">);</text:span></text:p>
      <text:p text:style-name="P59"><text:span text:style-name="T60">insert</text:span><text:span text:style-name="T61"><text:s/></text:span><text:span text:style-name="T62">into</text:span><text:span text:style-name="T63"><text:s/>peliculas</text:span><text:span text:style-name="T64">(</text:span><text:span text:style-name="T65">nombre</text:span><text:span text:style-name="T66">,</text:span><text:span text:style-name="T67"><text:s/>actor</text:span><text:span text:style-name="T68">,</text:span><text:span text:style-name="T69"><text:s/></text:span><text:span text:style-name="T70">duracion</text:span><text:span text:style-name="T71">,</text:span><text:span text:style-name="T72"><text:s/>cantidad</text:span><text:span text:style-name="T73">)</text:span><text:span text:style-name="T74"><text:s/></text:span><text:span text:style-name="T75">values</text:span><text:span text:style-name="T76">(</text:span><text:span text:style-name="T77">'Jurasic Park'</text:span><text:span text:style-name="T78">,</text:span><text:span text:style-name="T79">'Steven Spelver'</text:span><text:span text:style-name="T80">,</text:span><text:span text:style-name="T81">180</text:span><text:span text:style-name="T82">,</text:span><text:span text:style-name="T83">94</text:span><text:span text:style-name="T84">);</text:span></text:p>
      <text:p text:style-name="P85"><text:span text:style-name="T86">insert</text:span><text:span text:style-name="T87"><text:s/></text:span><text:span text:style-name="T88">into</text:span><text:span text:style-name="T89"><text:s/>peliculas</text:span><text:span text:style-name="T90">(</text:span><text:span text:style-name="T91">nombre</text:span><text:span text:style-name="T92">,</text:span><text:span text:style-name="T93"><text:s/>actor</text:span><text:span text:style-name="T94">,</text:span><text:span text:style-name="T95"><text:s/>duracion</text:span><text:span text:style-name="T96">,</text:span><text:span text:style-name="T97"><text:s/>cantidad</text:span><text:span text:style-name="T98">)</text:span><text:span text:style-name="T99"><text:s/></text:span><text:span text:style-name="T100">values</text:span><text:span text:style-name="T101">(</text:span><text:span text:style-name="T102">'El señor de los anillos'</text:span><text:span text:style-name="T103">,</text:span><text:span text:style-name="T104">'defern diols'</text:span><text:span text:style-name="T105">,</text:span><text:span text:style-name="T106">175</text:span><text:span text:style-name="T107">,</text:span><text:span text:style-name="T108">73</text:span><text:span text:style-name="T109">);</text:span></text:p>
      <text:p text:style-name="P110"/>
      <text:p text:style-name="Normal">Borrar registros</text:p>
      <text:p text:style-name="P111"><text:span text:style-name="T112">delete</text:span><text:span text:style-name="T113"><text:s/></text:span><text:span text:style-name="T114">from</text:span><text:span text:style-name="T115"><text:s/>usuarios<text:s/></text:span><text:span text:style-name="T116">where</text:span><text:span text:style-name="T117"><text:s/>nombre</text:span><text:span text:style-name="T118">=</text:span><text:span text:style-name="T119">'Marcelo'</text:span><text:span text:style-name="T120">;</text:span></text:p>
      <text:p text:style-name="P121"/>
      <text:p text:style-name="Normal">Recuperar<text:s/>campos</text:p>
      <text:p text:style-name="Normal"><text:span text:style-name="T122">select<text:s/></text:span><text:span text:style-name="T123">* from peliculas;</text:span></text:p>
      <text:p text:style-name="Normal">Recuperar algunos registros y ordenar</text:p>
      <text:p text:style-name="P124"><text:span text:style-name="T125">select</text:span><text:span text:style-name="T126"><text:s/></text:span><text:span text:style-name="T127">*</text:span><text:span text:style-name="T128"><text:s/></text:span><text:span text:style-name="T129">from</text:span><text:span text:style-name="T130"><text:s/>libros<text:s/></text:span><text:span text:style-name="T131">where</text:span><text:span text:style-name="T132"><text:s/></text:span><text:span text:style-name="T133">len</text:span><text:span text:style-name="T134">(</text:span><text:span text:style-name="T135">titulo</text:span><text:span text:style-name="T136">)&gt;</text:span><text:span text:style-name="T137">10<text:s/></text:span><text:span text:style-name="T138">order</text:span><text:span text:style-name="T139"><text:s/></text:span><text:span text:style-name="T140">by</text:span><text:span text:style-name="T141"><text:s/>autor</text:span><text:span text:style-name="T142">;</text:span></text:p>
      <text:p text:style-name="P143"/>
      <text:p text:style-name="Normal">Recuperar y quitar duplicados</text:p>
      <text:p text:style-name="P144"><text:span text:style-name="T145">select</text:span><text:span text:style-name="T146"><text:s/></text:span><text:span text:style-name="T147">distinct</text:span><text:span text:style-name="T148"><text:s/>autor<text:s/></text:span><text:span text:style-name="T149">from</text:span><text:span text:style-name="T150"><text:s/>libros</text:span><text:span text:style-name="T151">;</text:span></text:p>
      <text:p text:style-name="P152"/>
      <text:p text:style-name="Normal">Actualizar registros</text:p>
      <text:p text:style-name="P153"><text:span text:style-name="T154">update</text:span><text:span text:style-name="T155"><text:s/>libros<text:s/></text:span><text:span text:style-name="T156">set</text:span><text:span text:style-name="T157"><text:s/>editorial</text:span><text:span text:style-name="T158">=</text:span><text:span text:style-name="T159">'anaya'</text:span><text:span text:style-name="T160"><text:s/></text:span><text:span text:style-name="T161">where</text:span><text:span text:style-name="T162"><text:s/>editorial</text:span><text:span text:style-name="T163">=</text:span><text:span text:style-name="T164">'emece2'</text:span><text:span text:style-name="T165">;</text:span></text:p>
      <text:p text:style-name="P166"/>
      <text:p text:style-name="Normal">Funciones de cadenas</text:p>
      <text:p text:style-name="Normal"><text:span text:style-name="T167">select</text:span><text:span text:style-name="T168"><text:s/>substring</text:span><text:span text:style-name="T169">(</text:span><text:span text:style-name="T170">'buenas tardes'</text:span><text:span text:style-name="T171">,</text:span><text:span text:style-name="T172"><text:s/>8</text:span><text:span text:style-name="T173">,</text:span><text:span text:style-name="T174"><text:s/>6</text:span><text:span text:style-name="T175">); <text:s text:c="3"/>devuelve tardes</text:span></text:p>
      <text:p text:style-name="Normal"><text:span text:style-name="T176">select</text:span><text:span text:style-name="T177"><text:s/></text:span><text:span text:style-name="T178">str</text:span><text:span text:style-name="T179">(</text:span><text:span text:style-name="T180">1254.255</text:span><text:span text:style-name="T181">,</text:span><text:span text:style-name="T182"><text:s/>7</text:span><text:span text:style-name="T183">,</text:span><text:span text:style-name="T184"><text:s/>3</text:span><text:span text:style-name="T185">); <text:s/>convierte a string</text:span></text:p>
      <text:p text:style-name="Normal"><text:span text:style-name="T186">select</text:span><text:span text:style-name="T187"><text:s/></text:span><text:span text:style-name="T188">left(</text:span><text:span text:style-name="T189">'buenas tardes'</text:span><text:span text:style-name="T190">,</text:span><text:span text:style-name="T191"><text:s/>8</text:span><text:span text:style-name="T192">); <text:s text:c="2"/>devuelve ‘buenas t’</text:span></text:p>
      <text:p text:style-name="Normal"><text:span text:style-name="T193">select</text:span><text:span text:style-name="T194"><text:s/></text:span><text:span text:style-name="T195">right(</text:span><text:span text:style-name="T196">'buenas tardes'</text:span><text:span text:style-name="T197">,</text:span><text:span text:style-name="T198"><text:s/>8</text:span><text:span text:style-name="T199">); <text:s text:c="2"/>devuelve<text:s/></text:span><text:span text:style-name="T200">‘s tardes’</text:span></text:p>
      <text:p text:style-name="Normal"><text:span text:style-name="T201">select</text:span><text:span text:style-name="T202"><text:s/></text:span><text:span text:style-name="T203">lower</text:span><text:span text:style-name="T204">(</text:span><text:span text:style-name="T205">'BUENAS TARDES'</text:span><text:span text:style-name="T206">); <text:s text:c="2"/>devuelve buenas tardes</text:span></text:p>
      <text:p text:style-name="Normal"><text:span text:style-name="T207">select</text:span><text:span text:style-name="T208"><text:s/></text:span><text:span text:style-name="T209">upper</text:span><text:span text:style-name="T210">(</text:span><text:span text:style-name="T211">'buenas tardes'</text:span><text:span text:style-name="T212">);</text:span><text:span text:style-name="T213"><text:tab/>devuelve BUENAS TARDES</text:span></text:p>
      <text:p text:style-name="Normal"><text:span text:style-name="T214">select</text:span><text:span text:style-name="T215"><text:s/></text:span><text:span text:style-name="T216">replace</text:span><text:span text:style-name="T217">(</text:span><text:span text:style-name="T218">'xxx.paginaweb.com'</text:span><text:span text:style-name="T219">,</text:span><text:span text:style-name="T220"><text:s/></text:span><text:span text:style-name="T221">'x'</text:span><text:span text:style-name="T222">,</text:span><text:span text:style-name="T223"><text:s/></text:span><text:span text:style-name="T224">'w'</text:span><text:span text:style-name="T225">); devuelve<text:s/></text:span><text:a xlink:href="http://www.paginaweb.com" office:target-frame-name="_top" xlink:show="replace"><text:span text:style-name="T226">www.paginaweb.com</text:span></text:a></text:p>
      <text:p text:style-name="Normal"><text:span text:style-name="T227">select</text:span><text:span text:style-name="T228"><text:s/></text:span><text:span text:style-name="T229">replicate</text:span><text:span text:style-name="T230">(</text:span><text:span text:style-name="T231">'h</text:span><text:span text:style-name="T232">ola, '</text:span><text:span text:style-name="T233">,</text:span><text:span text:style-name="T234"><text:s/>3</text:span><text:span text:style-name="T235">); <text:s/>devuelve hola, hola, hola</text:span></text:p>
      <text:p text:style-name="Normal"><text:span text:style-name="T236">select</text:span><text:span text:style-name="T237"><text:s/></text:span><text:span text:style-name="T238">'hola'</text:span><text:span text:style-name="T239"><text:s/></text:span><text:span text:style-name="T240">+</text:span><text:span text:style-name="T241"><text:s/></text:span><text:span text:style-name="T242">space</text:span><text:span text:style-name="T243">(</text:span><text:span text:style-name="T244">1</text:span><text:span text:style-name="T245">)</text:span><text:span text:style-name="T246"><text:s/></text:span><text:span text:style-name="T247">+</text:span><text:span text:style-name="T248"><text:s/></text:span><text:span text:style-name="T249">'que tal'</text:span><text:span text:style-name="T250">; devuelve hola que tal</text:span></text:p>
      <text:p text:style-name="Normal">Funciones matemáticas:</text:p>
      <text:p text:style-name="Normal"><text:span text:style-name="T251">select</text:span><text:span text:style-name="T252"><text:s/></text:span><text:span text:style-name="T253">abs</text:span><text:span text:style-name="T254">(-</text:span><text:span text:style-name="T255">20</text:span><text:span text:style-name="T256">);</text:span><text:span text:style-name="T257"><text:tab/>devuelve valor absoluto 20</text:span></text:p>
      <text:p text:style-name="P258"><text:span text:style-name="T259">select</text:span><text:span text:style-name="T260"><text:s/></text:span><text:span text:style-name="T261">ceiling</text:span><text:span text:style-name="T262">(</text:span><text:span text:style-name="T263">12.34</text:span><text:span text:style-name="T264">);</text:span><text:span text:style-name="T265"><text:tab/>redondea hacia arriba 13</text:span></text:p>
      <text:p text:style-name="P266"/>
      <text:p text:style-name="Normal"><text:span text:style-name="T267">select</text:span><text:span text:style-name="T268"><text:s/></text:span><text:span text:style-name="T269">floor</text:span><text:span text:style-name="T270">(</text:span><text:span text:style-name="T271">12.34</text:span><text:span text:style-name="T272">);</text:span><text:span text:style-name="T273"><text:tab/></text:span><text:span text:style-name="T274"><text:tab/>redondea hacia<text:s/></text:span><text:span text:style-name="T275">abajo 12</text:span></text:p>
      <text:p text:style-name="Normal"><text:span text:style-name="T276">select</text:span><text:span text:style-name="T277"><text:s/></text:span><text:span text:style-name="T278">round</text:span><text:span text:style-name="T279">(</text:span><text:span text:style-name="T280">125.256</text:span><text:span text:style-name="T281">,<text:s/></text:span><text:span text:style-name="T282">2</text:span><text:span text:style-name="T283">);</text:span><text:span text:style-name="T284"><text:tab/>redondea según los decimales del 2º argumento</text:span></text:p>
      <text:p text:style-name="Normal">Funciones fecha y hora:</text:p>
      <text:p text:style-name="P285"><text:span text:style-name="T286">select</text:span><text:span text:style-name="T287"><text:s/></text:span><text:span text:style-name="T288">getdate</text:span><text:span text:style-name="T289">();</text:span></text:p>
      <text:p text:style-name="P290"><text:span text:style-name="T291">select</text:span><text:span text:style-name="T292"><text:s/></text:span><text:span text:style-name="T293">datepart</text:span><text:span text:style-name="T294">(</text:span><text:span text:style-name="T295">month</text:span><text:span text:style-name="T296">,</text:span><text:span text:style-name="T297">getdate</text:span><text:span text:style-name="T298">());</text:span><text:span text:style-name="T299"><text:tab/></text:span><text:span text:style-name="T300">devuelve 12</text:span></text:p>
      <text:p text:style-name="P301"><text:span text:style-name="T302">select</text:span><text:span text:style-name="T303"><text:s/></text:span><text:span text:style-name="T304">datepart</text:span><text:span text:style-name="T305">(</text:span><text:span text:style-name="T306">day</text:span><text:span text:style-name="T307">,</text:span><text:span text:style-name="T308">getdate</text:span><text:span text:style-name="T309">());</text:span><text:span text:style-name="T310"><text:tab/></text:span><text:span text:style-name="T311">devuelve <text:s/>8</text:span></text:p>
      <text:p text:style-name="P312"><text:span text:style-name="T313">select</text:span><text:span text:style-name="T314"><text:s/></text:span><text:span text:style-name="T315">datepart</text:span><text:span text:style-name="T316">(</text:span><text:span text:style-name="T317">hour</text:span><text:span text:style-name="T318">,</text:span><text:span text:style-name="T319">getdate</text:span><text:span text:style-name="T320">());</text:span><text:span text:style-name="T321"><text:tab/></text:span><text:span text:style-name="T322">devuelve<text:s/></text:span><text:span text:style-name="T323">21</text:span></text:p>
      <text:p text:style-name="P324"><text:span text:style-name="T325">select</text:span><text:span text:style-name="T326"><text:s/></text:span><text:span text:style-name="T327">datename</text:span><text:span text:style-name="T328">(</text:span><text:span text:style-name="T329">month</text:span><text:span text:style-name="T330">,</text:span><text:span text:style-name="T331">getdate</text:span><text:span text:style-name="T332">());</text:span><text:span text:style-name="T333"><text:s/></text:span><text:span text:style-name="T334">devuelve diciembre</text:span></text:p>
      <text:p text:style-name="P335"><text:span text:style-name="T336">select</text:span><text:span text:style-name="T337"><text:s/></text:span><text:span text:style-name="T338">datename</text:span><text:span text:style-name="T339">(</text:span><text:span text:style-name="T340">day</text:span><text:span text:style-name="T341">,</text:span><text:span text:style-name="T342">getdate</text:span><text:span text:style-name="T343">());</text:span><text:span text:style-name="T344"><text:tab/></text:span><text:span text:style-name="T345">devuelve 8</text:span></text:p>
      <text:p text:style-name="P346"><text:span text:style-name="T347">set</text:span><text:span text:style-name="T348"><text:s/></text:span><text:span text:style-name="T349">dateformat</text:span><text:span text:style-name="T350"><text:s/>dmy</text:span><text:span text:style-name="T351">;</text:span><text:span text:style-name="T352"><text:tab/></text:span><text:span text:style-name="T353"><text:tab/></text:span><text:span text:style-name="T354">Selecciona formato fecha dia-mes-año</text:span></text:p>
      <text:p text:style-name="P355"><text:span text:style-name="T356">select</text:span><text:span text:style-name="T357"><text:s/></text:span><text:span text:style-name="T358">dateadd</text:span><text:span text:style-name="T359">(</text:span><text:span text:style-name="T360">day</text:span><text:span text:style-name="T361">,</text:span><text:span text:style-name="T362">3</text:span><text:span text:style-name="T363">,</text:span><text:span text:style-name="T364">'02/11/1980'</text:span><text:span text:style-name="T365">);</text:span><text:span text:style-name="T366"><text:s/></text:span><text:span text:style-name="T367">suma tres días a la fecha pasada</text:span></text:p>
      <text:p text:style-name="P368"><text:span text:style-name="T369">select</text:span><text:span text:style-name="T370"><text:s/></text:span><text:span text:style-name="T371">day</text:span><text:span text:style-name="T372">(</text:span><text:span text:style-name="T373">getdate</text:span><text:span text:style-name="T374">());</text:span><text:span text:style-name="T375"><text:tab/></text:span><text:span text:style-name="T376">12</text:span></text:p>
      <text:p text:style-name="P377"><text:span text:style-name="T378">select</text:span><text:span text:style-name="T379"><text:s/></text:span><text:span text:style-name="T380">month</text:span><text:span text:style-name="T381">(</text:span><text:span text:style-name="T382">getdate</text:span><text:span text:style-name="T383">());</text:span><text:span text:style-name="T384"><text:s/></text:span><text:span text:style-name="T385"><text:tab/></text:span><text:span text:style-name="T386">8</text:span></text:p>
      <text:p text:style-name="Normal"><text:span text:style-name="T387">select</text:span><text:span text:style-name="T388"><text:s/></text:span><text:span text:style-name="T389">year</text:span><text:span text:style-name="T390">(</text:span><text:span text:style-name="T391">getdate</text:span><text:span text:style-name="T392">());</text:span><text:span text:style-name="T393"><text:tab/></text:span><text:span text:style-name="T394">2024</text:span></text:p>
      <text:p text:style-name="Normal">Operadores relacionales:</text:p>
      <text:p text:style-name="Normal">=, &lt;&gt;, &lt;, &lt;=, &gt;, &gt;=</text:p>
      <text:p text:style-name="P395"><text:span text:style-name="T396">where</text:span><text:span text:style-name="T397"><text:s/>editorial<text:s/></text:span><text:span text:style-name="T398">is</text:span><text:span text:style-name="T399"><text:s/></text:span><text:span text:style-name="T400">null</text:span></text:p>
      <text:p text:style-name="P401"><text:span text:style-name="T402">where</text:span><text:span text:style-name="T403"><text:s/>precio<text:s/></text:span><text:span text:style-name="T404">between</text:span><text:span text:style-name="T405"><text:s/>20<text:s/></text:span><text:span text:style-name="T406">and</text:span><text:span text:style-name="T407"><text:s/>40</text:span></text:p>
      <text:p text:style-name="P408"><text:span text:style-name="T409">where</text:span><text:span text:style-name="T410"><text:s/>autor<text:s/></text:span><text:span text:style-name="T411">in(</text:span><text:span text:style-name="T412">'Borges'</text:span><text:span text:style-name="T413">,</text:span><text:span text:style-name="T414">'Paenza'</text:span><text:span text:style-name="T415">);</text:span></text:p>
      <text:p text:style-name="Normal"><text:span text:style-name="T416">where</text:span><text:span text:style-name="T417"><text:s/>titulo<text:s/></text:span><text:span text:style-name="T418">like</text:span><text:span text:style-name="T419"><text:s/></text:span><text:span text:style-name="T420">'M%'</text:span><text:span text:style-name="T421">;</text:span></text:p>
      <text:p text:style-name="Normal"/>
      <text:p text:style-name="Normal">Clave primaria</text:p>
      <text:p text:style-name="P422"><text:span text:style-name="T423">create</text:span><text:span text:style-name="T424"><text:s/></text:span><text:span text:style-name="T425">table</text:span><text:span text:style-name="T426"><text:s/>libro</text:span><text:span text:style-name="T427"><text:s/></text:span><text:span text:style-name="T428">(</text:span></text:p>
      <text:p text:style-name="P429"><text:span text:style-name="T430"><text:tab/>no</text:span><text:span text:style-name="T431">mbre<text:s/></text:span><text:span text:style-name="T432">varchar</text:span><text:span text:style-name="T433">(</text:span><text:span text:style-name="T434">50</text:span><text:span text:style-name="T435">),</text:span></text:p>
      <text:p text:style-name="P436"><text:span text:style-name="T437"><text:tab/>autor<text:s/></text:span><text:span text:style-name="T438">varchar</text:span><text:span text:style-name="T439">(</text:span><text:span text:style-name="T440">30</text:span><text:span text:style-name="T441">),</text:span></text:p>
      <text:p text:style-name="P442"><text:span text:style-name="T443"><text:tab/>editorial<text:s/></text:span><text:span text:style-name="T444">varchar</text:span><text:span text:style-name="T445">(</text:span><text:span text:style-name="T446">15</text:span><text:span text:style-name="T447">),</text:span></text:p>
      <text:p text:style-name="P448"><text:span text:style-name="T449"><text:tab/>precio<text:s/></text:span><text:span text:style-name="T450">float</text:span></text:p>
      <text:p text:style-name="P451"><text:span text:style-name="T452"><text:tab/></text:span><text:span text:style-name="T453">primary</text:span><text:span text:style-name="T454"><text:s/></text:span><text:span text:style-name="T455">key<text:s/></text:span><text:span text:style-name="T456">(</text:span><text:span text:style-name="T457">nombre</text:span><text:span text:style-name="T458">)</text:span></text:p>
      <text:p text:style-name="P459">);</text:p>
      <text:p text:style-name="Normal">Clave primaria compuesta</text:p>
      <text:p text:style-name="P460"><text:span text:style-name="T461">create</text:span><text:span text:style-name="T462"><text:s/></text:span><text:span text:style-name="T463">table</text:span><text:span text:style-name="T464"><text:s/>clientes</text:span><text:span text:style-name="T465"><text:s/></text:span><text:span text:style-name="T466">(</text:span></text:p>
      <text:p text:style-name="P467"><text:span text:style-name="T468"><text:tab/>nombre<text:s/></text:span><text:span text:style-name="T469">varchar</text:span><text:span text:style-name="T470">(</text:span><text:span text:style-name="T471">50</text:span><text:span text:style-name="T472">),</text:span></text:p>
      <text:p text:style-name="P473"><text:span text:style-name="T474"><text:tab/>direccion<text:s/></text:span><text:span text:style-name="T475">varchar</text:span><text:span text:style-name="T476">(</text:span><text:span text:style-name="T477">30</text:span><text:span text:style-name="T478">),</text:span></text:p>
      <text:p text:style-name="P479"><text:span text:style-name="T480"><text:tab/>provincia<text:s/></text:span><text:span text:style-name="T481">varchar</text:span><text:span text:style-name="T482">(</text:span><text:span text:style-name="T483">15</text:span><text:span text:style-name="T484">),</text:span></text:p>
      <text:p text:style-name="P485"><text:span text:style-name="T486"><text:tab/>totalComprado<text:s/></text:span><text:span text:style-name="T487">float</text:span></text:p>
      <text:p text:style-name="P488"><text:span text:style-name="T489"><text:tab/></text:span><text:span text:style-name="T490">primary</text:span><text:span text:style-name="T491"><text:s/></text:span><text:span text:style-name="T492">key<text:s/></text:span><text:span text:style-name="T493">(</text:span><text:span text:style-name="T494">nombre,direccion</text:span><text:span text:style-name="T495">)</text:span></text:p>
      <text:p text:style-name="Normal"><text:span text:style-name="T496">);</text:span></text:p>
      <text:p text:style-name="Normal"/>
      <text:p text:style-name="Normal">Establece el campo nombre como un campo con valores únicos que no admite valores nulos</text:p>
      <text:p text:style-name="Normal">Atributo identity</text:p>
      <text:p text:style-name="Normal">El atributo identity aumenta automáticamente 1<text:s/>unidad en cada registro del campo seleccionado. Ese campo no es editable, para insertar valores, omitir esta valor</text:p>
      <text:p text:style-name="P497"><text:span text:style-name="T498">create</text:span><text:span text:style-name="T499"><text:s/></text:span><text:span text:style-name="T500">table</text:span><text:span text:style-name="T501"><text:s/>libro</text:span><text:span text:style-name="T502"><text:s/></text:span><text:span text:style-name="T503">(</text:span></text:p>
      <text:p text:style-name="P504"><text:span text:style-name="T505"><text:tab/>codigo<text:s/></text:span><text:span text:style-name="T506">int</text:span><text:span text:style-name="T507"><text:s/></text:span><text:span text:style-name="T508">identity</text:span><text:span text:style-name="T509">,</text:span></text:p>
      <text:p text:style-name="P510"><text:span text:style-name="T511"><text:tab/>nombre<text:s/></text:span><text:span text:style-name="T512">varchar</text:span><text:span text:style-name="T513">(</text:span><text:span text:style-name="T514">50</text:span><text:span text:style-name="T515">),</text:span></text:p>
      <text:p text:style-name="P516"><text:span text:style-name="T517"><text:tab/>autor<text:s/></text:span><text:span text:style-name="T518">varchar</text:span><text:span text:style-name="T519">(</text:span><text:span text:style-name="T520">30</text:span><text:span text:style-name="T521">),</text:span></text:p>
      <text:p text:style-name="P522"><text:span text:style-name="T523"><text:tab/>editorial<text:s/></text:span><text:span text:style-name="T524">varchar</text:span><text:span text:style-name="T525">(</text:span><text:span text:style-name="T526">15</text:span><text:span text:style-name="T527">),</text:span></text:p>
      <text:p text:style-name="P528"><text:span text:style-name="T529"><text:tab/>precio<text:s/></text:span><text:span text:style-name="T530">float</text:span></text:p>
      <text:p text:style-name="P531">);</text:p>
      <text:p text:style-name="Normal">Clausula default</text:p>
      <text:p text:style-name="Normal">Se puede estableces valores por defecto para cuando no se ingresen valores en algunos campos, si el campo se ha declarado como not null</text:p>
      <text:p text:style-name="P532"><text:span text:style-name="T533">create</text:span><text:span text:style-name="T534"><text:s/></text:span><text:span text:style-name="T535">table</text:span><text:span text:style-name="T536"><text:s/>libro</text:span><text:span text:style-name="T537"><text:s/></text:span><text:span text:style-name="T538">(</text:span></text:p>
      <text:p text:style-name="P539"><text:span text:style-name="T540"><text:tab/>codigo<text:s/></text:span><text:span text:style-name="T541">int</text:span><text:span text:style-name="T542"><text:s/></text:span><text:span text:style-name="T543">identity</text:span><text:span text:style-name="T544">,</text:span></text:p>
      <text:p text:style-name="P545"><text:span text:style-name="T546"><text:tab/>nombre<text:s/></text:span><text:span text:style-name="T547">varchar</text:span><text:span text:style-name="T548">(</text:span><text:span text:style-name="T549">50</text:span><text:span text:style-name="T550">),</text:span></text:p>
      <text:p text:style-name="P551"><text:span text:style-name="T552"><text:tab/>autor<text:s/></text:span><text:span text:style-name="T553">varchar</text:span><text:span text:style-name="T554">(</text:span><text:span text:style-name="T555">30</text:span><text:span text:style-name="T556">),</text:span></text:p>
      <text:p text:style-name="P557"><text:span text:style-name="T558"><text:tab/>editorial<text:s/></text:span><text:span text:style-name="T559">varchar</text:span><text:span text:style-name="T560">(</text:span><text:span text:style-name="T561">15</text:span><text:span text:style-name="T562">) is not null</text:span><text:span text:style-name="T563"><text:s/></text:span><text:span text:style-name="T564">default</text:span><text:span text:style-name="T565"><text:s/></text:span><text:span text:style-name="T566">‘</text:span><text:span text:style-name="T567">desconocido</text:span><text:span text:style-name="T568">’</text:span><text:span text:style-name="T569">,</text:span></text:p>
      <text:p text:style-name="P570"><text:span text:style-name="T571"><text:tab/>precio<text:s/></text:span><text:span text:style-name="T572">float</text:span></text:p>
      <text:p text:style-name="P573">);</text:p>
      <text:p text:style-name="Normal">Where y Having</text:p>
      <text:p text:style-name="Normal">La cláusula where aplica filtros al resultado descartando los valores que no cumplan la condición. Se pone antes del group by</text:p>
      <text:p text:style-name="Normal">La cláusula having aplica los filtros al resultado agrupado descartando los<text:s/>grupos que no cumplan la condición. Se pone después del group by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fonso Santos</meta:initial-creator>
    <dc:creator>Alfonso Santos</dc:creator>
    <meta:creation-date>2024-12-08T19:29:00Z</meta:creation-date>
    <dc:date>2024-12-10T22:41:00Z</dc:date>
    <meta:template xlink:href="Normal" xlink:type="simple"/>
    <meta:editing-cycles>6</meta:editing-cycles>
    <meta:editing-duration>PT14040S</meta:editing-duration>
    <meta:document-statistic meta:page-count="1" meta:paragraph-count="7" meta:word-count="573" meta:character-count="3723" meta:row-count="26" meta:non-whitespace-character-count="3157"/>
  </office:meta>
</office:document-meta>
</file>