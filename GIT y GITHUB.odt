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text-shadow="0in 0.0277in 0.0416in #6E747A" fo:color="#5B9BD5"/>
    </style:style>
    <style:style style:name="T3" style:parent-style-name="Fuentedepárrafopredeter." style:family="text">
      <style:text-properties fo:text-shadow="0in 0.0277in 0.0416in #6E747A" fo:color="#5B9BD5"/>
    </style:style>
    <style:style style:name="T4" style:parent-style-name="Fuentedepárrafopredeter." style:family="text">
      <style:text-properties fo:text-shadow="0in 0.0277in 0.0416in #6E747A" fo:color="#5B9BD5"/>
    </style:style>
    <style:style style:name="T5" style:parent-style-name="Fuentedepárrafopredeter." style:family="text">
      <style:text-properties fo:text-shadow="0in 0.0277in 0.0416in #6E747A" fo:color="#5B9BD5"/>
    </style:style>
    <style:style style:name="T6" style:parent-style-name="Fuentedepárrafopredeter." style:family="text">
      <style:text-properties fo:text-shadow="0in 0.0277in 0.0416in #6E747A" fo:color="#5B9BD5"/>
    </style:style>
    <style:style style:name="P7" style:parent-style-name="Normal" style:family="paragraph">
      <style:text-properties fo:text-shadow="0in 0.0277in 0.0416in #6E747A" fo:color="#5B9BD5"/>
    </style:style>
    <style:style style:name="T8" style:parent-style-name="Fuentedepárrafopredeter." style:family="text">
      <style:text-properties fo:text-shadow="0in 0.0277in 0.0416in #6E747A" fo:color="#5B9BD5"/>
    </style:style>
    <style:style style:name="T9" style:parent-style-name="Fuentedepárrafopredeter." style:family="text">
      <style:text-properties fo:text-shadow="0in 0.0277in 0.0416in #6E747A" fo:color="#5B9BD5"/>
    </style:style>
    <style:style style:name="T10" style:parent-style-name="Fuentedepárrafopredeter." style:family="text">
      <style:text-properties fo:text-shadow="0in 0.0277in 0.0416in #6E747A" fo:color="#5B9BD5"/>
    </style:style>
    <style:style style:name="P11" style:parent-style-name="Normal" style:family="paragraph">
      <style:text-properties fo:text-shadow="0in 0.0277in 0.0416in #6E747A" fo:color="#5B9BD5"/>
    </style:style>
    <style:style style:name="T12" style:parent-style-name="Fuentedepárrafopredeter." style:family="text">
      <style:text-properties style:language-asian="es" style:country-asian="ES"/>
    </style:style>
    <style:style style:name="T13" style:parent-style-name="Fuentedepárrafopredeter." style:family="text">
      <style:text-properties style:language-asian="es" style:country-asian="ES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GIT / GITHUH</text:p>
      <text:p text:style-name="Normal">Abrir terminal en virtual studio code</text:p>
      <text:p text:style-name="Normal">1ª vez en visual studio code, ejecutar comandos:</text:p>
      <text:p text:style-name="P2">git config –gobal user.name “AlfonsoSantos”</text:p>
      <text:p text:style-name="Normal"><text:span text:style-name="T3">git config –gobal user.email<text:s/></text:span><text:span text:style-name="T4">“</text:span><text:a xlink:href="mailto:alfonsosantos81@hotmail.com" office:target-frame-name="_top" xlink:show="replace"><text:span text:style-name="T5">alfonsosantos81@hotmail.com</text:span></text:a><text:span text:style-name="T6">”</text:span></text:p>
      <text:p text:style-name="Normal">para comprobar</text:p>
      <text:p text:style-name="P7">git config –gobal user.name</text:p>
      <text:p text:style-name="Normal">y aparece el usuario en el terminal, lo mismo en email</text:p>
      <text:p text:style-name="Normal"><draw:frame draw:z-index="251658240" draw:style-name="a0" draw:name="Imagen 1" text:anchor-type="paragraph" svg:x="3.19931in" svg:y="0.25625in" svg:width="2.13889in" svg:height="1.08542in" style:rel-width="scale" style:rel-height="scale"><draw:image xlink:href="media/image1.png" xlink:type="simple" xlink:show="embed" xlink:actuate="onLoad"/><svg:title/><svg:desc/></draw:frame>Dentro de la carpeta que se quiere subir al repositorio ejecutar, solo una vez:</text:p>
      <text:p text:style-name="Normal"><text:span text:style-name="T8">git init</text:span><text:span text:style-name="T9"><text:s text:c="5"/></text:span>inicializa el repositorio</text:p>
      <text:p text:style-name="Normal">en el explorador los nombres de los artículos aparecen de otro color y la letra U a la derecha</text:p>
      <text:p text:style-name="Normal"><draw:frame draw:z-index="251660288" draw:style-name="a1" draw:name="Imagen 3" text:anchor-type="paragraph" svg:x="3.70764in" svg:y="0.29583in" svg:width="1.92361in" svg:height="1.61111in" style:rel-width="scale" style:rel-height="scale"><draw:image xlink:href="media/image2.png" xlink:type="simple" xlink:show="embed" xlink:actuate="onLoad"/><svg:title/><svg:desc/></draw:frame><draw:frame draw:z-index="251659264" draw:style-name="a2" draw:name="Imagen 2" text:anchor-type="paragraph" svg:x="0.17986in" svg:y="0.00486in" svg:width="2.32014in" svg:height="1.05556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p text:style-name="Normal">también se puede comprobar en el área source control que el repositorio se ha iniciado</text:p>
      <text:p text:style-name="Normal"/>
      <text:p text:style-name="Normal"><draw:frame draw:z-index="251661312" draw:style-name="a3" draw:name="Imagen 4" text:anchor-type="paragraph" svg:x="2.96458in" svg:y="0.00486in" svg:width="2.13889in" svg:height="1.31944in" style:rel-width="scale" style:rel-height="scale"><draw:image xlink:href="media/image4.png" xlink:type="simple" xlink:show="embed" xlink:actuate="onLoad"/><svg:title/><svg:desc/></draw:frame>después ejecutar:<text:s/></text:p>
      <text:p text:style-name="Normal"><text:span text:style-name="T10">git add .</text:span><text:s text:c="2"/>(git + add + espacio + punto)<text:s/></text:p>
      <text:p text:style-name="Normal">y los archivos vuelven a cambiar de color</text:p>
      <text:p text:style-name="Normal">y una letra A a la derecha</text:p>
      <text:p text:style-name="Normal">a continuación ejecutar:</text:p>
      <text:p text:style-name="P11">git commit –m “Miprimer commit”</text:p>
      <text:p text:style-name="Normal">Los archivos vuelven a cambiar de color y desaparecen las letras</text:p>
      <text:p text:style-name="Normal">Ya está creado el repositorio local</text:p>
      <text:p text:style-name="Normal"/>
      <text:p text:style-name="Normal"/>
      <text:p text:style-name="Normal"><draw:frame draw:z-index="251662336" draw:style-name="a4" draw:name="Imagen 5" text:anchor-type="paragraph" svg:x="2.72153in" svg:y="0in" svg:width="2.8125in" svg:height="4.6875in" style:rel-width="scale" style:rel-height="scale"><draw:image xlink:href="media/image5.png" xlink:type="simple" xlink:show="embed" xlink:actuate="onLoad"/><svg:title/><svg:desc/></draw:frame></text:p>
      <text:p text:style-name="Normal">GITHUB</text:p>
      <text:p text:style-name="Normal">Abrir github <text:s/><text:a xlink:href="https://github.com/" office:target-frame-name="_top" xlink:show="replace"><text:span text:style-name="Hipervínculo">https://github.com/</text:span></text:a></text:p>
      <text:p text:style-name="Normal">Y click en nuevo repositorio</text:p>
      <text:p text:style-name="Normal">Rellenar nombre repositorio</text:p>
      <text:p text:style-name="Normal">Elegir público o privado (para compartir mas tarde)</text:p>
      <text:p text:style-name="Normal">Copiar los comandos que te da a continuación y ejecutar en el terminal de virtual studio code</text:p>
      <text:p text:style-name="Normal">git remote origin https://…</text:p>
      <text:p text:style-name="Normal">git branch –M main</text:p>
      <text:p text:style-name="Normal">git push –u origin main</text:p>
      <text:p text:style-name="Normal">Ya está subido a la web el repositorio</text:p>
      <text:p text:style-name="Normal"/>
      <text:p text:style-name="Normal">Para actualizar los archivos al repositorio y a la web:</text:p>
      <text:p text:style-name="Normal">git add .</text:p>
      <text:p text:style-name="Normal">git commit – m “mensaje”</text:p>
      <text:p text:style-name="Normal"><draw:frame draw:z-index="251663360" draw:style-name="a5" draw:name="Imagen 6" text:anchor-type="paragraph" svg:x="2.60347in" svg:y="0.31042in" svg:width="2.10486in" svg:height="1.6625in" style:rel-width="scale" style:rel-height="scale"><draw:image xlink:href="media/image6.png" xlink:type="simple" xlink:show="embed" xlink:actuate="onLoad"/><svg:title/><svg:desc/></draw:frame>git push</text:p>
      <text:p text:style-name="Normal">Publicar en la WEB</text:p>
      <text:p text:style-name="Normal">En el portar, abrir el repositorio</text:p>
      <text:p text:style-name="Normal">Buscar menú SETTINGS y PAGES<text:span text:style-name="T12"><text:s/></text:span></text:p>
      <text:p text:style-name="Normal"><text:span text:style-name="T13">Seleccionar el branch main o master</text:span></text:p>
      <text:p text:style-name="Normal">Y GRABAR</text:p>
      <text:p text:style-name="Normal"/>
      <text:p text:style-name="Normal">Ignorar archvos</text:p>
      <text:p text:style-name="Normal">Crear Archivo: .gitignore para ignorar archivos y no subirlos a github</text:p>
      <text:p text:style-name="Normal">Recuperar versiones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fonso Santos</meta:initial-creator>
    <dc:creator>Alfonso Santos</dc:creator>
    <meta:creation-date>2024-09-20T16:47:00Z</meta:creation-date>
    <dc:date>2024-09-20T19:06:00Z</dc:date>
    <meta:template xlink:href="Normal" xlink:type="simple"/>
    <meta:editing-cycles>3</meta:editing-cycles>
    <meta:editing-duration>PT8340S</meta:editing-duration>
    <meta:document-statistic meta:page-count="1" meta:paragraph-count="3" meta:word-count="259" meta:character-count="1682" meta:row-count="11" meta:non-whitespace-character-count="1426"/>
  </office:meta>
</office:document-meta>
</file>