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</style:style>
  </office:automatic-styles>
  <office:body>
    <office:text text:use-soft-page-breaks="true">
      <text:p text:style-name="P1">JQUERY</text:p>
      <text:p text:style-name="Normal">Tengamos bien en cuenta que en el archivo HTML debemos indicar donde se encuentran los archivos js, en este orden:</text:p>
      <text:p text:style-name="Normal"><text:s text:c="2"/>&lt;script<text:s/>src="https://code.jquery.com/jquery-3.4.1.min.js"&gt;&lt;/script&gt;</text:p>
      <text:p text:style-name="Normal"/>
      <text:p text:style-name="Normal">Es recomendable trabajando con jquery cargar todo el documento HTML antes de empezar a ejecutar el archivo JS</text:p>
      <text:p text:style-name="Normal">$(document).ready(función)</text:p>
      <text:p text:style-name="Normal"><text:span text:style-name="Textoennegrita">Selección de un elemento del documento mediante el id</text:span></text:p>
      <text:p text:style-name="Normal">$("#nombre del id")</text:p>
      <text:p text:style-name="Normal"><text:span text:style-name="Textoennegrita">Selección de elementos por el tipo de elementos.</text:span></text:p>
      <text:p text:style-name="Normal">$("nombre del elemento")</text:p>
      <text:p text:style-name="Normal"><text:span text:style-name="Textoennegrita">Selecció</text:span><text:span text:style-name="Textoennegrita">n de elementos utilizando los selectores CSS</text:span></text:p>
      <text:p text:style-name="Normal">x=$("li")</text:p>
      <text:p text:style-name="Normal"><text:span text:style-name="Textoennegrita">Selección de elementos utilizando las clases CSS definidas</text:span></text:p>
      <text:p text:style-name="Normal">x=$(".nombre de clase");</text:p>
      <text:p text:style-name="Normal">Selección primer elemento/ultimo elemento hijo</text:p>
      <text:p text:style-name="Normal">x=$(".container<text:s/>li:first")</text:p>
      <text:p text:style-name="Normal"/>
      <text:p text:style-name="Normal"><text:span text:style-name="Textoennegrita">Método text(), text(valor)</text:span></text:p>
      <text:p text:style-name="Normal">let x = $("#parrafo1")</text:p>
      <text:p text:style-name="Normal">x.text("Este es el texto nuevo")</text:p>
      <text:p text:style-name="Normal">Pero hay que tener mucho cuidado<text:s/>cuando utilizamos jQuery ya que podemos cambiar el contenido de muchos elementos con una sola llamada al método text</text:p>
      <text:p text:style-name="Normal">let x=$("p");</text:p>
      <text:p text:style-name="Normal">x.text("Este texto aparece en todos los párrafos del documento")</text:p>
      <text:p text:style-name="Normal"><text:span text:style-name="Textoennegrita">Método CSS</text:span></text:p>
      <text:p text:style-name="Normal">$(elemento).css(nombre parámetro, valor)</text:p>
      <text:p text:style-name="Normal">$(elemento).css(‘background-color’,’white’)</text:p>
      <text:p text:style-name="Normal">$(elemento).css(‘backgroundColor,’white’)</text:p>
      <text:p text:style-name="Normal">Cambiando varios estilos al mismo tiempo</text:p>
      <text:p text:style-name="Normal">$(elemento).css({color: ‘red’, width: ‘50px’})</text:p>
      <text:p text:style-name="Normal"/>
      <text:p text:style-name="Normal"/>
      <text:p text:style-name="Normal"><text:span text:style-name="Textoennegrita">Métodos attr(nombre de propiedad), attr(nombre de propiedad,</text:span><text:span text:style-name="Textoennegrita">valor) y removeAttr(nombre de propiedad)</text:span></text:p>
      <text:p text:style-name="Normal">Para recuperar el valor de una propiedad (si hay muchos elementos que recupera la función $, solo retorna la propiedad del primero):</text:p>
      <text:p text:style-name="Normal">$(elemento).attr(nombre de propiedad)</text:p>
      <text:p text:style-name="Normal">Para fijar el valor de una propiedad (si hay<text:s/>muchos elementos que recupera la función $, se inicializan para todos):</text:p>
      <text:p text:style-name="Normal">$(elemento).attr(nombre de propiedad,valor)</text:p>
      <text:p text:style-name="Normal">Para eliminar una propiedad de un elemento o conjunto de elementos tenemos:</text:p>
      <text:p text:style-name="Normal">$(elemento).removeAttr(nombre de la propiedad)</text:p>
      <text:p text:style-name="Normal"><text:span text:style-name="Textoennegrita">Métodos addClass</text:span><text:span text:style-name="Textoennegrita"><text:s/>y removeClass.</text:span></text:p>
      <text:p text:style-name="Normal">$(elemento).addClass("recuadro")</text:p>
      <text:p text:style-name="Normal">$(elemento).removeClass("recuadro")</text:p>
      <text:p text:style-name="Normal"><text:span text:style-name="Textoennegrita">Método html() y html(valor)</text:span></text:p>
      <text:p text:style-name="Normal">x.html('&lt;input type=”text”&gt;')</text:p>
      <text:p text:style-name="Normal"><text:span text:style-name="Textoennegrita">Administración de eventos con jQuery.</text:span></text:p>
      <text:p text:style-name="Normal">$(documento).ready(nombre de función)</text:p>
      <text:p text:style-name="Normal">$(documento).click(nombre de función)</text:p>
      <text:p text:style-name="Normal">Objeto this: es el elemento que realizó el evento</text:p>
      <text:p text:style-name="Normal">function xxx(){$(this).css(‘background-color’, ‘pink’)<text:s/>}</text:p>
      <text:p text:style-name="Normal"><text:span text:style-name="Textoennegrita">Eventos mouseover y mouseout</text:span></text:p>
      <text:p text:style-name="Normal">$(documento).mouseover(entraMouse);</text:p>
      <text:p text:style-name="Normal">$(documento).mouseout(saleMouse)</text:p>
      <text:p text:style-name="Normal"><text:span text:style-name="Textoennegrita">Evento hover</text:span></text:p>
      <text:p text:style-name="Normal">$(elemento).hover([función de ingreso<text:s/>del mouse],[función de salida del mouse])</text:p>
      <text:p text:style-name="Normal">Al evento hover asociamos dos funciones, la primera se ejecuta cuando ingresamos la flecha del mouse dentro del elemento y la segunda cuando retiramos la flecha del mouse.</text:p>
      <text:p text:style-name="Normal"><text:span text:style-name="Textoennegrita">Evento mousemove</text:span></text:p>
      <text:p text:style-name="Normal">Este evento se dispara cuando se mueve la flecha del mouse dentro del elemento HTML respectivo.</text:p>
      <text:p text:style-name="Normal">$(document).mousemove(moverMouse);</text:p>
      <text:p text:style-name="Normal">function moverMouse(event) {</text:p>
      <text:p text:style-name="Normal">$("#corx").text("coordenada x=" + event.clientX);</text:p>
      <text:p text:style-name="Normal">$("#cory").text("coordenada y=" + event.clientY);</text:p>
      <text:p text:style-name="Normal">}</text:p>
      <text:p text:style-name="Normal"><text:span text:style-name="Textoennegrita">Eventos mousedown<text:s/></text:span><text:span text:style-name="Textoennegrita">y mouseup</text:span></text:p>
      <text:p text:style-name="Normal">$("td").mousedown(presionaMouse);</text:p>
      <text:p text:style-name="Normal">$("td").mouseup(sueltaMouse)</text:p>
      <text:p text:style-name="Normal"><text:span text:style-name="Textoennegrita">Evento dblclick</text:span></text:p>
      <text:p text:style-name="Normal">El evento dblclick se dispara cuando se presiona dos veces seguidas el botón izquierdo del mouse</text:p>
      <text:p text:style-name="Normal">$(elemento).dblclick(dobleClic)</text:p>
      <text:p text:style-name="Normal"><text:span text:style-name="Textoennegrita">Evento focus</text:span></text:p>
      <text:p text:style-name="Normal">El evento focus se<text:s/>produce cuando se activa el control. Podemos capturar el evento focus de un control de tipo text, textarea, button, checkbox, fileupload, password, radio, reset y submit</text:p>
      <text:p text:style-name="Normal">$(elemente).focus(tomaFoco)</text:p>
      <text:p text:style-name="Normal"><text:span text:style-name="Textoennegrita">Evento blur</text:span></text:p>
      <text:p text:style-name="Normal">El evento blur se dispara cuando pierde el foco el control</text:p>
      <text:p text:style-name="Normal">$(elemento).focus(tomaFoco)</text:p>
      <text:p text:style-name="Normal"><text:span text:style-name="Textoennegrita">Manipulación de los elementos del DOM.</text:span></text:p>
      <text:p text:style-name="Normal">Eliminar contenido elemento</text:p>
      <text:p text:style-name="Normal">$(elemento).empty()</text:p>
      <text:p text:style-name="Normal">Añadir elemento al final</text:p>
      <text:p text:style-name="Normal">$(elemento).append("&lt;li&gt;otro item al final&lt;/li&gt;")</text:p>
      <text:p text:style-name="Normal">Añadir elemento al principio</text:p>
      <text:p text:style-name="Normal">$(elemento).prepend("&lt;li&gt;otro item al principio&lt;/li&gt;")</text:p>
      <text:p text:style-name="Normal">Eliminar elemento según índice. La función eq devuelve el elemento que indica el indice</text:p>
      <text:p text:style-name="Normal">$(elemento).eq(indice).remove()</text:p>
      <text:p text:style-name="Normal">Eliminar un rango de elementos. La función slice devuelve los elementos contenidos en ese rango</text:p>
      <text:p text:style-name="Normal">$(elemento).slice(0, 2).remove()</text:p>
      <text:p text:style-name="Normal"><text:span text:style-name="Textoennegrita">Efectos con los métodos show y hide.</text:span></text:p>
      <text:p text:style-name="Normal">Oculta y muestra un elemento lentamente</text:p>
      <text:p text:style-name="Normal">$(elemento).show("fast")</text:p>
      <text:p text:style-name="Normal">$(elemento).show("slow", myFunction)</text:p>
      <text:p text:style-name="Normal">$(elemento).show(3000)</text:p>
      <text:p text:style-name="Normal"><text:span text:style-name="Textoennegrita">Efectos con los métodos fadeIn y fadeOut</text:span></text:p>
      <text:p text:style-name="Normal">Oculta y muestra un elemento lentamente con opacidad</text:p>
      <text:p text:style-name="Normal">$(elemento).fadeOut("slow")</text:p>
      <text:p text:style-name="Normal">$(elemento).fadeIn(2000)</text:p>
      <text:p text:style-name="Normal"><text:span text:style-name="Textoennegrita">Efecto con el método fadeTo</text:span></text:p>
      <text:p text:style-name="Normal">El método fadeTo puede modificar la opacidad de un elemento, el efecto es llevar la opacidad actual hasta el valor que le<text:s/>pasamos al método fadeTo</text:p>
      <text:p text:style-name="Normal">fadeTo([velocidad],[valor de opacidad],[función])</text:p>
      <text:p text:style-name="Normal">$(elemento).fadeTo("slow", 1)</text:p>
      <text:p text:style-name="Normal"/>
      <text:p text:style-name="Normal"><text:span text:style-name="Textoennegrita">Efecto con el método toggle.</text:span></text:p>
      <text:p text:style-name="Normal">El método toggle permite cada vez que se ejecute cambiar de estado la visibilidad del elemento HTML, es decir si está visible pasa a oculto y si se encuentra oculto pasa a visible</text:p>
      <text:p text:style-name="Normal">$(elemento).toggle("slow")</text:p>
      <text:p text:style-name="Normal"><text:span text:style-name="Textoennegrita">Iteración por los elementos (each)</text:span></text:p>
      <text:p text:style-name="Normal">jQuery dispone de un método que nos permite asociar una función que se ejecutará por cada elemento que contenga la lista del objeto jQuery.</text:p>
      <text:p text:style-name="Normal">$([elementos]).each([nombre de funcion])</text:p>
      <text:p text:style-name="Normal"><text:span text:style-name="Textoennegrita">Ajax: método load.</text:span></text:p>
      <text:p text:style-name="Normal">load([nombre de la página],[parámetros],[funcion final])</text:p>
      <text:p text:style-name="Normal">$(elemento).load(pagina);</text:p>
      <text:p text:style-name="Normal"/>
      <text:p text:style-name="Normal"><text:span text:style-name="Textoennegrita">Ajax: métodos ajaxStart y ajaxStop</text:span></text:p>
      <text:p text:style-name="Normal">ajaxStart([función])</text:p>
      <text:p text:style-name="Normal">La función de ajaxStart se dispara cuando se inicia la petición al servidor y<text:s/>nos puede servir para mostrar en pantalla al usuario que están llegando datos del servidor.</text:p>
      <text:p text:style-name="Normal">ajaxStop([función])</text:p>
      <text:p text:style-name="Normal">Se dispara esta función cuando finalizar la petición de datos al servidor.</text:p>
      <text:p text:style-name="Normal">$(document.ajaxStart(funcion)</text:p>
      <text:p text:style-name="Normal"/>
      <text:p text:style-name="Normal"><text:span text:style-name="Textoennegrita">$.get y $.post(Pasando datos al servid</text:span><text:span text:style-name="Textoennegrita">or por los métodos GET y POST)</text:span></text:p>
      <text:p text:style-name="Normal">$.get([nombre de la página],[parámetros a enviarse por el método get],</text:p>
      <text:p text:style-name="Normal"><text:s text:c="6"/>[función que recibe los datos del servidor])</text:p>
      <text:p text:style-name="Normal">La función $.post es idéntica a la función $.get, lo único que difiere es como el protocolo HTTP empaqueta los datos y los envía al servidor. Normalmente se utiliza la función $.post, ya que no está limitado la cantidad de datos que se pueden enviar al servidor.</text:p>
      <text:p text:style-name="Normal">$.get("pagina1.php", { numero: v }, llegadaDatos);</text:p>
      <text:p text:style-name="Normal">function llegadaDatos(datos) {</text:p>
      <text:p text:style-name="Normal"><text:s text:c="2"/>alert(datos);</text:p>
      <text:p text:style-name="Normal">}</text:p>
      <text:p text:style-name="Normal"><text:span text:style-name="Textoennegrita">$.getJSON</text:span></text:p>
      <text:p text:style-name="Normal">$.getJSON([nombre de la página], [parámetros], [función que recibe los datos])</text:p>
      <text:p text:style-name="Normal">La función getJSON procede a generar un objeto en JavaScript y nosotros en la función lo procesamos.</text:p>
      <text:p text:style-name="Normal"><text:span text:style-name="Textoennegrita">$.ajax</text:span></text:p>
      <text:p text:style-name="Normal">ajax([objeto literal])</text:p>
      <text:p text:style-name="Normal">$.ajax({</text:p>
      <text:p text:style-name="Normal"><text:s text:c="4"/>async: true,</text:p>
      <text:p text:style-name="Normal"><text:s text:c="4"/>type: "POST",</text:p>
      <text:p text:style-name="Normal"><text:s text:c="4"/>dataType: "html",</text:p>
      <text:p text:style-name="Normal"><text:s text:c="4"/>contentType: "application/x-www-form-urlencoded",</text:p>
      <text:p text:style-name="Normal"><text:s text:c="4"/>url: "pagina1.php",</text:p>
      <text:p text:style-name="Normal"><text:s text:c="4"/>data: "numero=" + v,</text:p>
      <text:p text:style-name="Normal"><text:s text:c="4"/>beforeSend: inicioEnvio,</text:p>
      <text:p text:style-name="Normal"><text:s text:c="4"/>success: llegadaDatos,</text:p>
      <text:p text:style-name="Normal"><text:s text:c="4"/>timeout: 4000,</text:p>
      <text:p text:style-name="Normal"><text:s text:c="4"/>error: problemas</text:p>
      <text:p text:style-name="Normal"><text:s text:c="2"/>})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onso Santos</meta:initial-creator>
    <dc:creator>Alfonso Santos</dc:creator>
    <meta:creation-date>2024-11-25T18:55:00Z</meta:creation-date>
    <dc:date>2024-11-30T19:42:00Z</dc:date>
    <meta:template xlink:href="Normal" xlink:type="simple"/>
    <meta:editing-cycles>14</meta:editing-cycles>
    <meta:editing-duration>PT95160S</meta:editing-duration>
    <meta:document-statistic meta:page-count="1" meta:paragraph-count="12" meta:word-count="984" meta:character-count="6385" meta:row-count="45" meta:non-whitespace-character-count="5413"/>
  </office:meta>
</office:document-meta>
</file>